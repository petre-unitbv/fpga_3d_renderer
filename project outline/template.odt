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T1" style:family="text">
      <style:text-properties officeooo:rsid="0000f686"/>
    </style:style>
    <style:style style:name="T2" style:family="text">
      <style:text-properties officeooo:rsid="0004b38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Charter Template</text:p>
      <text:p text:style-name="P1"/>
      <text:p text:style-name="P2">Scopul documentului:</text:p>
      <text:p text:style-name="Standard">Acest document explica capitolele principale ale unui project charter.</text:p>
      <text:p text:style-name="Standard"/>
      <text:p text:style-name="Standard">Este folosit de studenti pentru a construi un project charter specific proiectelor de diploma/licenta.</text:p>
      <text:p text:style-name="Standard"/>
      <text:p text:style-name="Standard">Un project charter permite o estimare a scopului, volumului de munca (efort) si a livrabilelor proiectului de diploma. Este prima etapa in lucrul l<text:span text:style-name="T1">a</text:span> un proiect.</text:p>
      <text:p text:style-name="Standard"/>
      <text:p text:style-name="P2">Capitole principale:</text:p>
      <text:p text:style-name="P3">Obiectivul proiectului</text:p>
      <text:p text:style-name="Standard">Descrie in linii mari care este obiectivul proiectului, fara a intra in detalii tehnice insa suficient pentru a intelege contexul si principalele rezultate asteptate.</text:p>
      <text:p text:style-name="Standard"/>
      <text:p text:style-name="P3">Obective masurabile si criteriile sale de succes</text:p>
      <text:p text:style-name="Standard">Explica modul de masurare a succesului, Daca obiectivele masurabile sunt realizate, proiectul va fi de succes.</text:p>
      <text:p text:style-name="Standard"/>
      <text:p text:style-name="P3">Cerinte de nivel inalt</text:p>
      <text:p text:style-name="Standard">Este cel mai important capitol si enumera care sunt cerintele pe care trebuie sa le indeplineasca proiectul.</text:p>
      <text:p text:style-name="Standard"/>
      <text:p text:style-name="Standard">Toate cerintele sunt numerotate si sunt urmarite de-a lungul implementarii proiectului.</text:p>
      <text:p text:style-name="Standard"/>
      <text:p text:style-name="P3">Descrierea proiectului, limite, livrabile cheie</text:p>
      <text:p text:style-name="Standard">O descriere generala aproiectului pentru a itelege mai bine lucrurile de realizat. O schema bloc sau o diagrama functionala ajuta aici.</text:p>
      <text:p text:style-name="Standard"/>
      <text:p text:style-name="Standard">Limite (boundaries) sunt utile pentru a intelege ce face si ce nu face parte din proiect. Ajuta pentru eliminarea confuziilor referitoare la rezultatele asteptate.</text:p>
      <text:p text:style-name="Standard"/>
      <text:p text:style-name="Standard">Livrabilele trebuie listate si apoi urmarite. In cazul unui proiect de licenta/dizertatie ne asteptam la:</text:p>
      <text:p text:style-name="Standard"/>
      <text:list text:style-name="L1">
        <text:list-item>
          <text:p text:style-name="P4">Planul proiectului</text:p>
        </text:list-item>
        <text:list-item>
          <text:p text:style-name="P4">Cuprinsul lucrarii</text:p>
        </text:list-item>
        <text:list-item>
          <text:p text:style-name="P4">Lucarea de licenta/dizertatie (document de 60+ pagini)</text:p>
        </text:list-item>
        <text:list-item>
          <text:p text:style-name="P4">Codul sursa</text:p>
        </text:list-item>
        <text:list-item>
          <text:p text:style-name="P4">Demonstratie functionala</text:p>
        </text:list-item>
        <text:list-item>
          <text:p text:style-name="P4">Prezentarea lucrarii (Powerpoint)</text:p>
        </text:list-item>
        <text:list-item>
          <text:p text:style-name="P4">Articole, conferinte (optional)</text:p>
        </text:list-item>
      </text:list>
      <text:p text:style-name="Standard"/>
      <text:p text:style-name="P3">Riscuri</text:p>
      <text:p text:style-name="Standard">O serie de riscuri identificate, cu probabilitate de a se intampla si moduri de corectie.</text:p>
      <text:p text:style-name="Standard"/>
      <text:p text:style-name="Standard">Principalele riscuri la care ne asteptam sunt:</text:p>
      <text:p text:style-name="Standard"/>
      <text:list text:style-name="L2">
        <text:list-item>
          <text:p text:style-name="P5">Timp - trebuie sa ne asiguram ca terminam lucrarea la timp</text:p>
        </text:list-item>
        <text:list-item>
          <text:p text:style-name="P5">Technic - trebuie sa validam ca implementarea poate fi facuta</text:p>
        </text:list-item>
        <text:list-item>
          <text:p text:style-name="P5">Stiintific - trebuie sa ne concentram pe descrierea si validarea partii stiintifice a lucrarii</text:p>
        </text:list-item>
      </text:list>
      <text:p text:style-name="Standard"><text:soft-page-break/></text:p>
      <text:p text:style-name="Standard">Date cheie (milestones)</text:p>
      <text:p text:style-name="Standard">Date limita la care ne asteptam sa vedem progrese.</text:p>
      <text:p text:style-name="Standard"/>
      <text:p text:style-name="Standard">Propun:</text:p>
      <text:p text:style-name="Standard"/>
      <text:p text:style-name="Standard">15 decembrie - incheiat fezabilitate, project charter, planificare, cuprinsul lucrarii</text:p>
      <text:p text:style-name="Standard">15 februarie - codul sursa intr-o forma stabila</text:p>
      <text:p text:style-name="Standard">15 aprilie - documentul intr-o forma initiala si codul demonstrabil</text:p>
      <text:p text:style-name="Standard">15 iunie - predare</text:p>
      <text:p text:style-name="Standard"/>
      <text:p text:style-name="P3">Resurse</text:p>
      <text:p text:style-name="P3">resurse financiare, tehnice, licente si timp.</text:p>
      <text:p text:style-name="Standard">Trebuie sa ne asiguram ca sunt disponibile la timp.</text:p>
      <text:p text:style-name="Standard"/>
      <text:p text:style-name="P3">Contributori (<text:span text:style-name="T2">s</text:span>takeholders)</text:p>
      <text:p text:style-name="Standard">Lista oamenilor implicati in proiect. In afara de student si indrumator mai trebuie sa vedem: comisia de licenta, mentorul de an, etc.</text:p>
      <text:p text:style-name="Standard"/>
      <text:p text:style-name="P3">Lista de cerinte pentru aprobare</text:p>
      <text:p text:style-name="Standard">Ce trebuie sa contina proiectul pentru a avea succes.</text:p>
      <text:p text:style-name="Standard"/>
      <text:p text:style-name="P3">Criteriile de terminare ale proiectului</text:p>
      <text:p text:style-name="Standard">Ce trebuie sa se intample pentru a abandona proiectu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8:29:25.706341878</meta:creation-date>
    <dc:date>2025-12-02T18:34:36.934432522</dc:date>
    <meta:editing-duration>PT4M29S</meta:editing-duration>
    <meta:editing-cycles>6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46" meta:word-count="404" meta:character-count="2703" meta:non-whitespace-character-count="2355"/>
  </office:meta>
</office:document-meta>
</file>