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5.4444in" table:align="left"/>
    </style:style>
    <style:style style:name="Table1.A" style:family="table-column">
      <style:table-column-properties style:column-width="0.667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2.56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UT Sans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UT Sans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UT Sans" officeooo:rsid="00083df2" officeooo:paragraph-rsid="00083df2"/>
    </style:style>
    <style:style style:name="P4" style:family="paragraph" style:parent-style-name="Standard">
      <style:text-properties style:font-name="UT Sans"/>
    </style:style>
    <style:style style:name="P5" style:family="paragraph" style:parent-style-name="Standard">
      <style:text-properties style:font-name="UT Sans" fo:font-weight="bold" style:font-weight-asian="bold" style:font-weight-complex="bold"/>
    </style:style>
    <style:style style:name="P6" style:family="paragraph" style:parent-style-name="Standard" style:list-style-name="L1">
      <style:text-properties style:font-name="UT Sans" officeooo:rsid="0014c122" officeooo:paragraph-rsid="0014c122"/>
    </style:style>
    <style:style style:name="P7" style:family="paragraph" style:parent-style-name="Standard" style:list-style-name="L1">
      <style:text-properties style:font-name="UT Sans" officeooo:rsid="00083df2" officeooo:paragraph-rsid="0014c122"/>
    </style:style>
    <style:style style:name="P8" style:family="paragraph" style:parent-style-name="Standard" style:list-style-name="L1">
      <style:text-properties style:font-name="UT Sans" officeooo:rsid="00171e5d" officeooo:paragraph-rsid="00171e5d"/>
    </style:style>
    <style:style style:name="P9" style:family="paragraph" style:parent-style-name="Standard" style:list-style-name="L1">
      <style:text-properties style:font-name="UT Sans" officeooo:rsid="0016728d" officeooo:paragraph-rsid="0016728d"/>
    </style:style>
    <style:style style:name="P10" style:family="paragraph" style:parent-style-name="Standard">
      <style:text-properties style:font-name="UT San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style:font-name="UT Sans"/>
    </style:style>
    <style:style style:name="P13" style:family="paragraph" style:parent-style-name="Standard">
      <style:text-properties style:font-name="UT Sans" fo:font-size="15pt" fo:font-style="normal" style:font-size-asian="15pt" style:font-style-asian="normal" style:font-size-complex="15pt" style:font-style-complex="normal"/>
    </style:style>
    <style:style style:name="P14" style:family="paragraph" style:parent-style-name="Standard">
      <style:text-properties style:font-name="UT Sans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UT Sans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UT Sans"/>
    </style:style>
    <style:style style:name="P17" style:family="paragraph" style:parent-style-name="Text_20_body" style:list-style-name="L3">
      <style:text-properties style:font-name="UT Sans"/>
    </style:style>
    <style:style style:name="P18" style:family="paragraph" style:parent-style-name="Text_20_body" style:list-style-name="L4">
      <style:text-properties style:font-name="UT Sans"/>
    </style:style>
    <style:style style:name="P19" style:family="paragraph" style:parent-style-name="Standard">
      <style:text-properties style:font-name="UT Sans" fo:font-size="15pt" style:font-size-asian="15pt" style:font-size-complex="15pt"/>
    </style:style>
    <style:style style:name="P20" style:family="paragraph" style:parent-style-name="Table_20_Heading">
      <style:text-properties style:font-name="UT Sans"/>
    </style:style>
    <style:style style:name="P21" style:family="paragraph" style:parent-style-name="Table_20_Contents">
      <style:text-properties style:font-name="UT Sans"/>
    </style:style>
    <style:style style:name="P22" style:family="paragraph" style:parent-style-name="Text_20_body" style:list-style-name="L5">
      <style:text-properties style:font-name="UT Sans"/>
    </style:style>
    <style:style style:name="P23" style:family="paragraph" style:parent-style-name="Standard">
      <style:text-properties style:font-name="UT Sans" officeooo:paragraph-rsid="0005ef09"/>
    </style:style>
    <style:style style:name="P24" style:family="paragraph" style:parent-style-name="Standard">
      <style:text-properties style:font-name="UT Sans" fo:font-size="15pt" fo:font-style="normal" officeooo:paragraph-rsid="002af9cb" style:font-size-asian="15pt" style:font-style-asian="normal" style:font-size-complex="15pt" style:font-style-complex="normal"/>
    </style:style>
    <style:style style:name="P25" style:family="paragraph" style:parent-style-name="Standard">
      <style:text-properties style:font-name="UT Sans" fo:font-style="italic" fo:font-weight="bold" officeooo:paragraph-rsid="002af9cb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UT Sans" officeooo:paragraph-rsid="002af9cb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text-properties style:font-name="UT Sans"/>
    </style:style>
    <style:style style:name="P29" style:family="paragraph" style:parent-style-name="Text_20_body" style:list-style-name="L7"/>
    <style:style style:name="P30" style:family="paragraph" style:parent-style-name="Text_20_body" style:list-style-name="L7">
      <style:text-properties style:font-name="UT Sans"/>
    </style:style>
    <style:style style:name="T1" style:family="text">
      <style:text-properties officeooo:rsid="00182dea"/>
    </style:style>
    <style:style style:name="T2" style:family="text">
      <style:text-properties officeooo:rsid="00129568"/>
    </style:style>
    <style:style style:name="T3" style:family="text">
      <style:text-properties officeooo:rsid="00188ce3"/>
    </style:style>
    <style:style style:name="T4" style:family="text">
      <style:text-properties officeooo:rsid="001a0bcb"/>
    </style:style>
    <style:style style:name="T5" style:family="text">
      <style:text-properties officeooo:rsid="0010f76c"/>
    </style:style>
    <style:style style:name="T6" style:family="text">
      <style:text-properties officeooo:rsid="0022220d"/>
    </style:style>
    <style:style style:name="T7" style:family="text">
      <style:text-properties officeooo:rsid="00145a7e"/>
    </style:style>
    <style:style style:name="T8" style:family="text">
      <style:text-properties officeooo:rsid="0014c122"/>
    </style:style>
    <style:style style:name="T9" style:family="text">
      <style:text-properties officeooo:rsid="0016728d"/>
    </style:style>
    <style:style style:name="T10" style:family="text">
      <style:text-properties style:font-name="UT Sans"/>
    </style:style>
    <style:style style:name="T11" style:family="text">
      <style:text-properties fo:font-weight="bold" officeooo:rsid="00145a7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db1cf"/>
    </style:style>
    <style:style style:name="T14" style:family="text">
      <style:text-properties officeooo:rsid="000aade5"/>
    </style:style>
    <style:style style:name="T15" style:family="text">
      <style:text-properties officeooo:rsid="0004b380"/>
    </style:style>
    <style:style style:name="T16" style:family="text">
      <style:text-properties officeooo:rsid="0005ef09"/>
    </style:style>
    <style:style style:name="T17" style:family="text">
      <style:text-properties officeooo:rsid="0007726e"/>
    </style:style>
    <style:style style:name="T18" style:family="text">
      <style:text-properties officeooo:rsid="001b8955"/>
    </style:style>
    <style:style style:name="T19" style:family="text">
      <style:text-properties officeooo:rsid="002ed4b1"/>
    </style:style>
    <style:style style:name="T20" style:family="text">
      <style:text-properties style:font-name="UT Sans" officeooo:rsid="002901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Charter: <text:span text:style-name="T1">Grafica 3D implementata pe FPGA</text:span></text:p>
      <text:p text:style-name="P2"/>
      <text:p text:style-name="P2"><text:span text:style-name="T2">1. </text:span>Obiectivul proiectului</text:p>
      <text:p text:style-name="P2"/>
      <text:p text:style-name="P3"><text:span text:style-name="T3">Proiectul urmareste </text:span><text:span text:style-name="T4">randarea si afisarea</text:span> <text:span text:style-name="T4">unui</text:span> model 3D la alegere <text:span text:style-name="T4">pe un monitor</text:span>, care se roteste pentru vizualizare mai detaliata, <text:span text:style-name="T5">implementa</text:span><text:span text:style-name="T4">t</text:span><text:span text:style-name="T5"> pe </text:span><text:span text:style-name="T4">FPGA-ul</text:span><text:span text:style-name="T5"> </text:span>Zynq <text:span text:style-name="T5">Z</text:span>7 10.</text:p>
      <text:p text:style-name="P3">Scopul este de a demonstra capabilitățile hardware ale FPGA-ului pentru procesarea grafică în timp real <text:span text:style-name="T6">și înțelegerea graficii 3D.</text:span></text:p>
      <text:p text:style-name="P4"/>
      <text:p text:style-name="P2"><text:span text:style-name="T7">2. </text:span>Obective masurabile si criteriile sale de succes</text:p>
      <text:p text:style-name="P5"/>
      <text:list text:style-name="L1">
        <text:list-item>
          <text:p text:style-name="P6">Compilarea completa a programului</text:p>
        </text:list-item>
        <text:list-item>
          <text:p text:style-name="P7">Afisarea <text:span text:style-name="T8">cu succes punctelor pe monitor</text:span></text:p>
        </text:list-item>
        <text:list-item>
          <text:p text:style-name="P6">Muchiile sunt tiparite prin algoritmul Bresenham <text:span text:style-name="T9">pe monitor</text:span></text:p>
        </text:list-item>
        <text:list-item>
          <text:p text:style-name="P8">Programul poate extrage varfurile si muchiile dintr-un fisier de tip .obj</text:p>
        </text:list-item>
        <text:list-item>
          <text:p text:style-name="P9">Cadrele se actualizeaza corespunzator</text:p>
        </text:list-item>
        <text:list-item>
          <text:p text:style-name="P9">Modelul se roteste 180 de grade pe o axa la alegere</text:p>
        </text:list-item>
      </text:list>
      <text:p text:style-name="P4"/>
      <text:p text:style-name="P10"><text:span text:style-name="T7">3. </text:span>Cerinte de nivel inalt</text:p>
      <text:p text:style-name="P10"/>
      <text:list text:style-name="L2">
        <text:list-item>
          <text:p text:style-name="P11"><text:span text:style-name="T10">Suport hardware FPGA: implementarea pe </text:span><text:span text:style-name="Strong_20_Emphasis"><text:span text:style-name="T10">Zynq Z7 10</text:span></text:span><text:span text:style-name="T10">.</text:span></text:p>
        </text:list-item>
        <text:list-item>
          <text:p text:style-name="P11"><text:span text:style-name="T10">Citirea și parsarea fișierelor </text:span><text:span text:style-name="Source_20_Text"><text:span text:style-name="T10">.obj</text:span></text:span><text:span text:style-name="T10">.</text:span></text:p>
        </text:list-item>
        <text:list-item>
          <text:p text:style-name="P12">Randarea punctelor și muchiilor pe monitor.</text:p>
        </text:list-item>
        <text:list-item>
          <text:p text:style-name="P12">Algoritm de rotație pentru animația modelului 3D.</text:p>
        </text:list-item>
        <text:list-item>
          <text:p text:style-name="P12">Performanță suficientă pentru actualizarea fluentă a cadrelor.</text:p>
        </text:list-item>
        <text:list-item>
          <text:p text:style-name="P12">Structură modulară a codului pentru întreținere și extindere.</text:p>
        </text:list-item>
      </text:list>
      <text:p text:style-name="P4"/>
      <text:p text:style-name="P13"><text:span text:style-name="T11">4. </text:span><text:span text:style-name="T12">Descrierea proiectului, limite, livrabile cheie</text:span></text:p>
      <text:p text:style-name="P14"/>
      <text:p text:style-name="P15"><text:span text:style-name="Strong_20_Emphasis">Descriere generală:</text:span><text:line-break/>Proiectul combină hardware și software pentru implementarea unei aplicații de randare 3D pe FPGA. Input-ul principal este un fișier <text:span text:style-name="Source_20_Text">.obj</text:span>, iar output-ul este afișarea modelului 3D pe <text:soft-page-break/>monitor, cu animație de rotație. Scopul este de a demonstra capabilitățile FPGA-ului în procesarea grafică și manipularea modelelor 3D în timp real.</text:p>
      <text:p text:style-name="P16"><text:span text:style-name="Strong_20_Emphasis">Limite (boundaries):</text:span></text:p>
      <text:list text:style-name="L3">
        <text:list-item>
          <text:p text:style-name="P17">Proiectul <text:span text:style-name="Strong_20_Emphasis">nu va implementa shading complex sau texturi</text:span>; randarea se va baza doar pe puncte și muchii.</text:p>
        </text:list-item>
        <text:list-item>
          <text:p text:style-name="P17">Nu se va folosi GPU extern; toate calculele se fac pe FPGA.</text:p>
        </text:list-item>
        <text:list-item>
          <text:p text:style-name="P17">Nu se va implementa o interfață de utilizator complexă; singura interacțiune este afișarea și rotația automată a modelului.</text:p>
        </text:list-item>
      </text:list>
      <text:p text:style-name="P16"><text:span text:style-name="Strong_20_Emphasis">Livrabile cheie:</text:span></text:p>
      <text:list text:style-name="L4">
        <text:list-item>
          <text:p text:style-name="P18"><text:span text:style-name="Strong_20_Emphasis">Cod sursă complet</text:span> – implementare hardware/software completă, documentată și modulară.</text:p>
        </text:list-item>
        <text:list-item>
          <text:p text:style-name="P18"><text:span text:style-name="Strong_20_Emphasis">Document de licență</text:span> – raport detaliat (60+ pagini) explicând metodologia, implementarea și rezultatele.</text:p>
        </text:list-item>
        <text:list-item>
          <text:p text:style-name="P18"><text:span text:style-name="Strong_20_Emphasis">Demonstrație funcțională pe FPGA</text:span> – modelul 3D randat corect și rotația funcțională.</text:p>
        </text:list-item>
        <text:list-item>
          <text:p text:style-name="P18"><text:span text:style-name="Strong_20_Emphasis">Prezentare PowerPoint</text:span> – prezentare vizuală a proiectului pentru susținerea lucrării în fața comisiei.</text:p>
        </text:list-item>
      </text:list>
      <text:p text:style-name="P4"/>
      <text:p text:style-name="P19"><text:span text:style-name="T11">5. </text:span><text:span text:style-name="T12">Riscuri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0">Tip risc</text:p>
            </table:table-cell>
            <table:table-cell table:style-name="Table1.A1" office:value-type="string">
              <text:p text:style-name="P20">Descriere</text:p>
            </table:table-cell>
            <table:table-cell table:style-name="Table1.A1" office:value-type="string">
              <text:p text:style-name="P20">Măsuri de prevenție</text:p>
            </table:table-cell>
          </table:table-row>
        </table:table-header-rows>
        <table:table-row>
          <table:table-cell table:style-name="Table1.A1" office:value-type="string">
            <text:p text:style-name="P21">Timp</text:p>
          </table:table-cell>
          <table:table-cell table:style-name="Table1.A1" office:value-type="string">
            <text:p text:style-name="P21">Termen limită strâns</text:p>
          </table:table-cell>
          <table:table-cell table:style-name="Table1.A1" office:value-type="string">
            <text:p text:style-name="P21">Planificare detaliată, milestone-uri</text:p>
          </table:table-cell>
        </table:table-row>
        <table:table-row>
          <table:table-cell table:style-name="Table1.A1" office:value-type="string">
            <text:p text:style-name="P21">Tehnic</text:p>
          </table:table-cell>
          <table:table-cell table:style-name="Table1.A1" office:value-type="string">
            <text:p text:style-name="P21">Implementare hardware dificilă</text:p>
          </table:table-cell>
          <table:table-cell table:style-name="Table1.A1" office:value-type="string">
            <text:p text:style-name="P21">Testare incrementală, prototipuri</text:p>
          </table:table-cell>
        </table:table-row>
        <table:table-row>
          <table:table-cell table:style-name="Table1.A1" office:value-type="string">
            <text:p text:style-name="P21">Științific</text:p>
          </table:table-cell>
          <table:table-cell table:style-name="Table1.A1" office:value-type="string">
            <text:p text:style-name="P21">Validarea corectitudinii metodei</text:p>
          </table:table-cell>
          <table:table-cell table:style-name="Table1.A1" office:value-type="string">
            <text:p text:style-name="P21">Studii teoretice și simulări anterioare</text:p>
          </table:table-cell>
        </table:table-row>
      </table:table>
      <text:p text:style-name="P4"/>
      <text:p text:style-name="P4"/>
      <text:p text:style-name="P4">Date cheie (milestones):</text:p>
      <text:p text:style-name="P4"/>
      <text:p text:style-name="P4"><text:span text:style-name="T13">15</text:span> <text:span text:style-name="T14">ianuarie</text:span> - incheiat fezabilitate, project charter, planificare, cuprinsul lucrarii</text:p>
      <text:p text:style-name="P4">15 <text:span text:style-name="T14">martie</text:span> - codul sursa intr-o forma stabila</text:p>
      <text:p text:style-name="P4"><text:span text:style-name="T14">25</text:span> aprilie - documentul intr-o forma initiala si codul demonstrabil</text:p>
      <text:p text:style-name="P4"><text:soft-page-break/>15 iunie - predare</text:p>
      <text:p text:style-name="P4"/>
      <text:p text:style-name="P10"><text:span text:style-name="T7">6. </text:span>Resurse</text:p>
      <text:p text:style-name="P14"/>
      <text:p text:style-name="P16">Resursele necesare pentru implementarea proiectului includ:</text:p>
      <text:list text:style-name="L5">
        <text:list-item>
          <text:p text:style-name="P22"><text:span text:style-name="Strong_20_Emphasis">Hardware</text:span></text:p>
          <text:list>
            <text:list-item>
              <text:p text:style-name="P22">FPGA Zynq Z7 10.</text:p>
            </text:list-item>
            <text:list-item>
              <text:p text:style-name="P22">Monitor compatibil VGA/HDMI.</text:p>
            </text:list-item>
            <text:list-item>
              <text:p text:style-name="P22">Cablu HDMI/VGA și alte accesorii necesare conexiunilor.</text:p>
            </text:list-item>
            <text:list-item>
              <text:p text:style-name="P22">Alte componente hardware (dacă este cazul, de exemplu alimentare, breadboard, module suplimentare).</text:p>
            </text:list-item>
          </text:list>
        </text:list-item>
        <text:list-item>
          <text:p text:style-name="P22"><text:span text:style-name="Strong_20_Emphasis">Software</text:span></text:p>
          <text:list>
            <text:list-item>
              <text:p text:style-name="P22">Toolchain <text:span text:style-name="Strong_20_Emphasis">Xilinx Vivado</text:span> pentru dezvoltare și simulare.</text:p>
            </text:list-item>
            <text:list-item>
              <text:p text:style-name="P22">Editor de cod (ex: VS Code, Sublime, etc.).</text:p>
            </text:list-item>
            <text:list-item>
              <text:p text:style-name="P22">Simulatoare pentru testarea logicii și randarea 3D.</text:p>
            </text:list-item>
          </text:list>
        </text:list-item>
        <text:list-item>
          <text:p text:style-name="P22"><text:span text:style-name="Strong_20_Emphasis">Timp</text:span></text:p>
          <text:list>
            <text:list-item>
              <text:p text:style-name="P22">Disponibilitatea studenților implicați în proiect.</text:p>
            </text:list-item>
            <text:list-item>
              <text:p text:style-name="P22">Suportul și coordonarea îndrumătorului pe tot parcursul proiectului.</text:p>
            </text:list-item>
          </text:list>
        </text:list-item>
        <text:list-item>
          <text:p text:style-name="P22"><text:span text:style-name="Strong_20_Emphasis">Resurse financiare</text:span></text:p>
          <text:list>
            <text:list-item>
              <text:p text:style-name="P22">Buget minim pentru licențe software, cabluri și alte materiale hardware necesare.</text:p>
            </text:list-item>
          </text:list>
        </text:list-item>
        <text:list-item>
          <text:p text:style-name="P22"><text:span text:style-name="Strong_20_Emphasis">Alte resurse</text:span> (opțional)</text:p>
          <text:list>
            <text:list-item>
              <text:p text:style-name="P22">Documentație tehnică și tutoriale FPGA.</text:p>
            </text:list-item>
            <text:list-item>
              <text:p text:style-name="P22">Acces la laboratoare și echipamente ale facultății.</text:p>
            </text:list-item>
          </text:list>
        </text:list-item>
      </text:list>
      <text:p text:style-name="P4"/>
      <text:p text:style-name="P4"/>
      <text:p text:style-name="P2"><text:span text:style-name="T7">7. </text:span>Contributori (<text:span text:style-name="T15">s</text:span>takeholders)</text:p>
      <text:p text:style-name="P2"/>
      <text:p text:style-name="P23"><text:span text:style-name="T16">S</text:span>tudent: <text:span text:style-name="T17">B</text:span><text:span text:style-name="T18">RASOVEANU</text:span><text:span text:style-name="T17"> Petru Andrei</text:span></text:p>
      <text:p text:style-name="P23"><text:span text:style-name="T16">I</text:span>ndrumator: <text:span text:style-name="T18">SL Dr. Ing. ZAHARIA Corneliu</text:span></text:p>
      <text:p text:style-name="P23"><text:soft-page-break/><text:span text:style-name="T16">C</text:span>omisia de licenta</text:p>
      <text:p text:style-name="P23"><text:span text:style-name="T16">M</text:span>entorul de an</text:p>
      <text:p text:style-name="P4"/>
      <text:p text:style-name="P24"><text:span text:style-name="T11">8. </text:span><text:span text:style-name="T12">Lista de cerinte pentru aprobare</text:span></text:p>
      <text:p text:style-name="P25"/>
      <text:p text:style-name="P26">Proiectul va fi considerat aprobat atunci când toate cerințele următoare sunt îndeplinite:</text:p>
      <text:p text:style-name="P26"/>
      <text:list text:style-name="L6">
        <text:list-item>
          <text:p text:style-name="P27"><text:span text:style-name="Strong_20_Emphasis"><text:span text:style-name="T10">Model 3D afișat corect</text:span></text:span></text:p>
          <text:list>
            <text:list-item>
              <text:p text:style-name="P27"><text:span text:style-name="T10">Toate vârfurile și muchiile din fișierul </text:span><text:span text:style-name="Source_20_Text"><text:span text:style-name="T10">.obj</text:span></text:span><text:span text:style-name="T10"> sunt afișate pe monitor conform datelor de intrare.</text:span></text:p>
            </text:list-item>
          </text:list>
        </text:list-item>
        <text:list-item>
          <text:p text:style-name="P27"><text:span text:style-name="Strong_20_Emphasis"><text:span text:style-name="T10">Rotație funcțională</text:span></text:span></text:p>
          <text:list>
            <text:list-item>
              <text:p text:style-name="P28">Modelul se rotește 180° pe axa aleasă, cu cadre actualizate corespunzător și fără artefacte vizuale.</text:p>
            </text:list-item>
          </text:list>
        </text:list-item>
        <text:list-item>
          <text:p text:style-name="P27"><text:span text:style-name="Strong_20_Emphasis"><text:span text:style-name="T10">Cod sursă complet și documentație</text:span></text:span></text:p>
          <text:list>
            <text:list-item>
              <text:p text:style-name="P28">Codul este complet, comentat și organizat modular.</text:p>
            </text:list-item>
            <text:list-item>
              <text:p text:style-name="P28">Documentația explică algoritmii folosiți, structura proiectului și instrucțiunile de compilare și rulare.</text:p>
            </text:list-item>
          </text:list>
        </text:list-item>
        <text:list-item>
          <text:p text:style-name="P27"><text:span text:style-name="Strong_20_Emphasis"><text:span text:style-name="T10">Demonstrație funcțională pe FPGA</text:span></text:span></text:p>
          <text:list>
            <text:list-item>
              <text:p text:style-name="P28">Modelul 3D și rotația trebuie să fie vizibile și funcționale pe FPGA-ul Zynq Z7 10.</text:p>
            </text:list-item>
            <text:list-item>
              <text:p text:style-name="P28">Demonstrația trebuie să fie stabilă și repetabilă.</text:p>
            </text:list-item>
          </text:list>
        </text:list-item>
        <text:list-item>
          <text:p text:style-name="P27"><text:span text:style-name="Strong_20_Emphasis"><text:span text:style-name="T10">Compatibilitate și portabilitate</text:span></text:span><text:span text:style-name="T10"> </text:span></text:p>
          <text:list>
            <text:list-item>
              <text:p text:style-name="P28">Codul și implementarea trebuie să fie compatibile cu toolchain-ul standard Xilinx Vivado și hardware-ul specificat.</text:p>
            </text:list-item>
          </text:list>
        </text:list-item>
      </text:list>
      <text:p text:style-name="P4"/>
      <text:p text:style-name="P10"><text:span text:style-name="T7">9. </text:span>Criteriile de <text:span text:style-name="T19">abandonare</text:span> ale proiectului</text:p>
      <text:p text:style-name="P4"/>
      <text:p text:style-name="P16">Proiectul poate fi abandonat dacă apar următoarele situații:</text:p>
      <text:list text:style-name="L7">
        <text:list-item>
          <text:p text:style-name="P29"><text:span text:style-name="Strong_20_Emphasis"><text:span text:style-name="T10">Imposibilitate tehnică</text:span></text:span></text:p>
          <text:list>
            <text:list-item>
              <text:p text:style-name="P30">Hardware-ul FPGA nu poate suporta implementarea cerută (de exemplu, lipsă de resurse logice sau limitări de performanță imposibil de rezolvat).</text:p>
            </text:list-item>
            <text:list-item>
              <text:p text:style-name="P30"><text:soft-page-break/>Algoritmii de randare sau rotație nu pot fi implementați pe FPGA conform cerințelor.</text:p>
            </text:list-item>
          </text:list>
        </text:list-item>
        <text:list-item>
          <text:p text:style-name="P29"><text:span text:style-name="Strong_20_Emphasis"><text:span text:style-name="T10">Timp insuficient</text:span></text:span></text:p>
          <text:list>
            <text:list-item>
              <text:p text:style-name="P30">Termenele limită nu pot fi respectate din motive obiective (lipsă resurse, absența studenților sau îndrumătorului, probleme neprevăzute).</text:p>
            </text:list-item>
          </text:list>
        </text:list-item>
        <text:list-item>
          <text:p text:style-name="P29"><text:span text:style-name="Strong_20_Emphasis"><text:span text:style-name="T10">Resurse insuficiente</text:span></text:span></text:p>
          <text:list>
            <text:list-item>
              <text:p text:style-name="P30">Lipsa accesului la software, licențe sau componente hardware necesare proiectului.</text:p>
            </text:list-item>
          </text:list>
        </text:list-item>
        <text:list-item>
          <text:p text:style-name="P29"><text:span text:style-name="Strong_20_Emphasis"><text:span text:style-name="T10">Lipsa suportului științific sau academic</text:span></text:span></text:p>
          <text:list>
            <text:list-item>
              <text:p text:style-name="P30">Dacă abordarea teoretică sau metodologia nu poate fi validată sau demonstrată, iar soluții alternative nu sunt fezabile.</text:p>
            </text:list-item>
          </text:list>
        </text:list-item>
        <text:list-item>
          <text:p text:style-name="P29"><text:span text:style-name="Strong_20_Emphasis"><text:span text:style-name="T10">Decizie strategică</text:span></text:span></text:p>
          <text:list>
            <text:list-item>
              <text:p text:style-name="P30">Dacă studentul sau conducătorul de proiect decide că proiectul nu mai are relevanță sau valoare practică pentru licență, iar continuarea ar fi inutilă.</text:p>
            </text:list-item>
          </text:list>
        </text:list-item>
      </text:list>
      <text:p text:style-name="Text_20_body"><text:span text:style-name="Strong_20_Emphasis"><text:span text:style-name="T10">Notă:</text:span></text:span><text:span text:style-name="T10"> În cazul abandonării, motivele și realizările până în acel punct </text:span><text:span text:style-name="T20">vor fi documentate prin repository-ul fpga-3d-renderer din GitHub</text:span><text:span text:style-name="T10"> pentru a păstra un istoric și pentru a putea folosi rezultatele parțiale în alte proiecte sau lucrări.</text:span></text:p>
      <text:p text:style-name="P1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8:29:25.706341878</meta:creation-date>
    <dc:date>2026-01-15T22:36:54.201914384</dc:date>
    <meta:editing-duration>PT1H2M48S</meta:editing-duration>
    <meta:editing-cycles>42</meta:editing-cycles>
    <meta:generator>LibreOffice/25.8.4.2$Linux_X86_64 LibreOffice_project/290daaa01b999472f0c7a3890eb6a550fd74c6df</meta:generator>
    <meta:document-statistic meta:table-count="1" meta:image-count="0" meta:object-count="0" meta:page-count="5" meta:paragraph-count="99" meta:word-count="834" meta:character-count="5645" meta:non-whitespace-character-count="4964"/>
  </office:meta>
</office:document-meta>
</file>