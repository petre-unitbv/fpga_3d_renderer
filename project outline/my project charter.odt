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83df2" officeooo:paragraph-rsid="00083df2"/>
    </style:style>
    <style:style style:name="P5" style:family="paragraph" style:parent-style-name="Standard" style:list-style-name="L1">
      <style:text-properties officeooo:rsid="0014c122" officeooo:paragraph-rsid="0014c122"/>
    </style:style>
    <style:style style:name="P6" style:family="paragraph" style:parent-style-name="Standard" style:list-style-name="L1">
      <style:text-properties officeooo:rsid="00083df2" officeooo:paragraph-rsid="0014c122"/>
    </style:style>
    <style:style style:name="P7" style:family="paragraph" style:parent-style-name="Standard" style:list-style-name="L1">
      <style:text-properties officeooo:rsid="00171e5d" officeooo:paragraph-rsid="00171e5d"/>
    </style:style>
    <style:style style:name="P8" style:family="paragraph" style:parent-style-name="Standard" style:list-style-name="L1">
      <style:text-properties officeooo:rsid="0016728d" officeooo:paragraph-rsid="0016728d"/>
    </style:style>
    <style:style style:name="P9" style:family="paragraph" style:parent-style-name="Standard" style:list-style-name="L2"/>
    <style:style style:name="P10" style:family="paragraph" style:parent-style-name="Standard">
      <style:text-properties officeooo:paragraph-rsid="0005ef09"/>
    </style:style>
    <style:style style:name="T1" style:family="text">
      <style:text-properties officeooo:rsid="00182dea"/>
    </style:style>
    <style:style style:name="T2" style:family="text">
      <style:text-properties officeooo:rsid="00129568"/>
    </style:style>
    <style:style style:name="T3" style:family="text">
      <style:text-properties officeooo:rsid="00188ce3"/>
    </style:style>
    <style:style style:name="T4" style:family="text">
      <style:text-properties officeooo:rsid="001a0bcb"/>
    </style:style>
    <style:style style:name="T5" style:family="text">
      <style:text-properties officeooo:rsid="0010f76c"/>
    </style:style>
    <style:style style:name="T6" style:family="text">
      <style:text-properties officeooo:rsid="00145a7e"/>
    </style:style>
    <style:style style:name="T7" style:family="text">
      <style:text-properties officeooo:rsid="0014c122"/>
    </style:style>
    <style:style style:name="T8" style:family="text">
      <style:text-properties officeooo:rsid="0016728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officeooo:rsid="00145a7e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db1cf"/>
    </style:style>
    <style:style style:name="T13" style:family="text">
      <style:text-properties officeooo:rsid="000aade5"/>
    </style:style>
    <style:style style:name="T14" style:family="text">
      <style:text-properties officeooo:rsid="0004b380"/>
    </style:style>
    <style:style style:name="T15" style:family="text">
      <style:text-properties officeooo:rsid="0005ef09"/>
    </style:style>
    <style:style style:name="T16" style:family="text">
      <style:text-properties officeooo:rsid="0007726e"/>
    </style:style>
    <style:style style:name="T17" style:family="text">
      <style:text-properties officeooo:rsid="001b895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harter: <text:span text:style-name="T1">Grafica 3D implementata pe FPGA</text:span></text:p>
      <text:p text:style-name="P2"/>
      <text:p text:style-name="P3"><text:span text:style-name="T2">1. </text:span>Obiectivul proiectului</text:p>
      <text:p text:style-name="P4"><text:span text:style-name="T3">Proiectul urmareste </text:span><text:span text:style-name="T4">randarea si afisarea</text:span> <text:span text:style-name="T4">unui</text:span> model 3D la alegere <text:span text:style-name="T4">pe un monitor</text:span>, care se roteste pentru vizualizare mai detaliata, <text:span text:style-name="T5">implementa</text:span><text:span text:style-name="T4">t</text:span><text:span text:style-name="T5"> pe </text:span><text:span text:style-name="T4">FPGA-ul</text:span><text:span text:style-name="T5"> </text:span>Zynq <text:span text:style-name="T5">Z</text:span>7 10.</text:p>
      <text:p text:style-name="Standard"/>
      <text:p text:style-name="P3"><text:span text:style-name="T6">2. </text:span>Obective masurabile si criteriile sale de succes</text:p>
      <text:p text:style-name="P3"/>
      <text:list text:style-name="L1">
        <text:list-item>
          <text:p text:style-name="P5">Compilarea completa a programului</text:p>
        </text:list-item>
        <text:list-item>
          <text:p text:style-name="P6">Afisarea <text:span text:style-name="T7">cu succes punctelor pe monitor</text:span></text:p>
        </text:list-item>
        <text:list-item>
          <text:p text:style-name="P5">Muchiile sunt tiparite prin algoritmul Bresenham <text:span text:style-name="T8">pe monitor</text:span></text:p>
        </text:list-item>
        <text:list-item>
          <text:p text:style-name="P7">Programul poate extrage varfurile si muchiile dintr-un fisier de tip .obj</text:p>
        </text:list-item>
        <text:list-item>
          <text:p text:style-name="P8">Cadrele se actualizeaza corespunzator</text:p>
        </text:list-item>
        <text:list-item>
          <text:p text:style-name="P8">Modelul se roteste 180 de grade pe o axa la alegere</text:p>
        </text:list-item>
      </text:list>
      <text:p text:style-name="Standard"/>
      <text:p text:style-name="P3"><text:span text:style-name="T6">3. </text:span><text:span text:style-name="T9">Cerinte de nivel inalt</text:span></text:p>
      <text:p text:style-name="Standard"/>
      <text:p text:style-name="Standard"/>
      <text:p text:style-name="Standard"><text:span text:style-name="T10">4. </text:span><text:span text:style-name="T11">Descrierea proiectului, limite, livrabile cheie</text:span></text:p>
      <text:p text:style-name="Standard"/>
      <text:p text:style-name="P3"><text:span text:style-name="T6">5. </text:span>Riscuri</text:p>
      <text:p text:style-name="Standard"/>
      <text:p text:style-name="Standard">Principalele riscuri la care ne asteptam sunt:</text:p>
      <text:p text:style-name="Standard"/>
      <text:list text:style-name="L2">
        <text:list-item>
          <text:p text:style-name="P9">Timp - trebuie sa ne asiguram ca terminam lucrarea la timp</text:p>
        </text:list-item>
        <text:list-item>
          <text:p text:style-name="P9">Technic - trebuie sa validam ca implementarea poate fi facuta</text:p>
        </text:list-item>
        <text:list-item>
          <text:p text:style-name="P9">Stiintific - trebuie sa ne concentram pe descrierea si validarea partii stiintifice a lucrarii</text:p>
        </text:list-item>
      </text:list>
      <text:p text:style-name="Standard"/>
      <text:p text:style-name="Standard">Date cheie (milestones):</text:p>
      <text:p text:style-name="Standard"/>
      <text:p text:style-name="Standard"><text:span text:style-name="T12">15</text:span> <text:span text:style-name="T13">ianuarie</text:span> - incheiat fezabilitate, project charter, planificare, cuprinsul lucrarii</text:p>
      <text:p text:style-name="Standard">15 <text:span text:style-name="T13">martie</text:span> - codul sursa intr-o forma stabila</text:p>
      <text:p text:style-name="Standard"><text:span text:style-name="T13">25</text:span> aprilie - documentul intr-o forma initiala si codul demonstrabil</text:p>
      <text:p text:style-name="Standard">15 iunie - predare</text:p>
      <text:p text:style-name="Standard"/>
      <text:p text:style-name="P3"><text:span text:style-name="T6">6. </text:span><text:span text:style-name="T9">Resurse:</text:span></text:p>
      <text:p text:style-name="Standard"/>
      <text:p text:style-name="Standard"/>
      <text:p text:style-name="P3"><text:span text:style-name="T6">7. </text:span>Contributori (<text:span text:style-name="T14">s</text:span>takeholders)</text:p>
      <text:p text:style-name="P10"><text:span text:style-name="T15">S</text:span>tudent: <text:span text:style-name="T16">B</text:span><text:span text:style-name="T17">RASOVEANU</text:span><text:span text:style-name="T16"> Petru Andrei</text:span></text:p>
      <text:p text:style-name="P10"><text:span text:style-name="T15">I</text:span>ndrumator: <text:span text:style-name="T17">SL Dr. Ing. ZAHARIA Corneliu</text:span></text:p>
      <text:p text:style-name="P10"><text:span text:style-name="T15">C</text:span>omisia de licenta</text:p>
      <text:p text:style-name="P10"><text:span text:style-name="T15">M</text:span>entorul de an</text:p>
      <text:p text:style-name="Standard"/>
      <text:p text:style-name="P3"><text:span text:style-name="T6">8. </text:span><text:span text:style-name="T9">Lista de cerinte pentru aprobare</text:span></text:p>
      <text:p text:style-name="Standard"/>
      <text:p text:style-name="Standard"/>
      <text:p text:style-name="Standard"/>
      <text:p text:style-name="P3"><text:span text:style-name="T6">9. </text:span><text:span text:style-name="T9">Criteriile de terminare ale proiectului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8:29:25.706341878</meta:creation-date>
    <dc:date>2026-01-12T21:21:53.538015486</dc:date>
    <meta:editing-duration>PT53M42S</meta:editing-duration>
    <meta:editing-cycles>28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30" meta:word-count="220" meta:character-count="1394" meta:non-whitespace-character-count="1213"/>
  </office:meta>
</office:document-meta>
</file>