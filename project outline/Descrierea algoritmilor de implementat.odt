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2056in" table:align="left"/>
    </style:style>
    <style:style style:name="Table1.A" style:family="table-column">
      <style:table-column-properties style:column-width="1.4694in"/>
    </style:style>
    <style:style style:name="Table1.B" style:family="table-column">
      <style:table-column-properties style:column-width="1.736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Times New Roman" fo:font-size="20pt" fo:font-weight="bold" officeooo:rsid="0006d638" officeooo:paragraph-rsid="0006d638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officeooo:paragraph-rsid="0006d638"/>
    </style:style>
    <style:style style:name="P3" style:family="paragraph" style:parent-style-name="Standard">
      <style:text-properties style:font-name="Times New Roman" officeooo:rsid="0006d638" officeooo:paragraph-rsid="0006d638"/>
    </style:style>
    <style:style style:name="P4" style:family="paragraph" style:parent-style-name="Standard" style:list-style-name="L1">
      <style:text-properties style:font-name="Times New Roman" officeooo:rsid="0006d638" officeooo:paragraph-rsid="0006d638"/>
    </style:style>
    <style:style style:name="P5" style:family="paragraph" style:parent-style-name="Standard" style:list-style-name="L1">
      <style:text-properties style:font-name="Times New Roman" officeooo:rsid="00227870" officeooo:paragraph-rsid="00227870"/>
    </style:style>
    <style:style style:name="P6" style:family="paragraph" style:parent-style-name="Standard">
      <style:text-properties style:font-name="Times New Roman" fo:font-size="15pt" fo:font-weight="bold" officeooo:paragraph-rsid="0006d638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officeooo:paragraph-rsid="00216f5a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tyle="italic" officeooo:paragraph-rsid="0006d638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tyle="italic" officeooo:paragraph-rsid="00085a8a" style:font-style-asian="italic" style:font-style-complex="italic"/>
    </style:style>
    <style:style style:name="P11" style:family="paragraph" style:parent-style-name="Standard">
      <style:text-properties style:font-name="Times New Roman" officeooo:paragraph-rsid="000b75a9"/>
    </style:style>
    <style:style style:name="P12" style:family="paragraph" style:parent-style-name="Standard">
      <style:text-properties style:font-name="Times New Roman" officeooo:paragraph-rsid="0020992d"/>
    </style:style>
    <style:style style:name="P13" style:family="paragraph" style:parent-style-name="Standard">
      <style:text-properties style:font-name="Times New Roman" fo:font-size="15pt" fo:font-weight="bold" officeooo:paragraph-rsid="000e1a55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paragraph-rsid="002528c4"/>
    </style:style>
    <style:style style:name="P15" style:family="paragraph" style:parent-style-name="Standard">
      <style:text-properties style:font-name="Times New Roman" officeooo:paragraph-rsid="002528c4"/>
    </style:style>
    <style:style style:name="P16" style:family="paragraph" style:parent-style-name="Standard">
      <style:text-properties style:font-name="Times New Roman" officeooo:paragraph-rsid="000e1a55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officeooo:paragraph-rsid="002528c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normal" officeooo:rsid="002528c4" officeooo:paragraph-rsid="002528c4" style:font-weight-asian="normal" style:font-weight-complex="normal"/>
    </style:style>
    <style:style style:name="P19" style:family="paragraph" style:parent-style-name="Standard">
      <style:text-properties style:font-name="Times New Roman" fo:font-weight="bold" officeooo:paragraph-rsid="000e1a55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tyle="italic" fo:font-weight="normal" officeooo:paragraph-rsid="0011326a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officeooo:paragraph-rsid="000e1a55"/>
    </style:style>
    <style:style style:name="P22" style:family="paragraph" style:parent-style-name="Standard" style:list-style-name="L2">
      <style:text-properties style:font-name="Times New Roman" officeooo:paragraph-rsid="0025febf"/>
    </style:style>
    <style:style style:name="P23" style:family="paragraph" style:parent-style-name="Standard">
      <style:text-properties style:font-name="Times New Roman" officeooo:rsid="0012b34c" officeooo:paragraph-rsid="0012b34c"/>
    </style:style>
    <style:style style:name="P24" style:family="paragraph" style:parent-style-name="Standard">
      <style:text-properties style:font-name="Times New Roman" officeooo:paragraph-rsid="0026f3b7"/>
    </style:style>
    <style:style style:name="P25" style:family="paragraph" style:parent-style-name="Standard">
      <style:text-properties style:font-name="Times New Roman" officeooo:paragraph-rsid="0012b34c"/>
    </style:style>
    <style:style style:name="P26" style:family="paragraph" style:parent-style-name="Standard">
      <style:text-properties style:font-name="Times New Roman" officeooo:rsid="0013f96a" officeooo:paragraph-rsid="0013f96a"/>
    </style:style>
    <style:style style:name="P27" style:family="paragraph" style:parent-style-name="Standard">
      <style:text-properties officeooo:paragraph-rsid="00288998"/>
    </style:style>
    <style:style style:name="P28" style:family="paragraph" style:parent-style-name="Standard">
      <style:text-properties style:font-name="Times New Roman" officeooo:paragraph-rsid="00288998"/>
    </style:style>
    <style:style style:name="P29" style:family="paragraph" style:parent-style-name="Standard">
      <style:text-properties style:font-name="Times New Roman" fo:font-style="italic" fo:font-weight="normal" officeooo:rsid="0013f96a" officeooo:paragraph-rsid="0013f96a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13f96a" officeooo:paragraph-rsid="0013f96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159bc2" officeooo:paragraph-rsid="00198603" style:font-style-asian="italic" style:font-weight-asian="normal" style:font-style-complex="italic" style:font-weight-complex="normal"/>
    </style:style>
    <style:style style:name="P32" style:family="paragraph" style:parent-style-name="Standard" style:list-style-name="L3">
      <style:text-properties style:font-name="Times New Roman" officeooo:paragraph-rsid="000e1a55"/>
    </style:style>
    <style:style style:name="P33" style:family="paragraph" style:parent-style-name="Standard" style:list-style-name="L3">
      <style:text-properties style:font-name="Times New Roman" officeooo:rsid="00198603" officeooo:paragraph-rsid="00198603"/>
    </style:style>
    <style:style style:name="P34" style:family="paragraph" style:parent-style-name="Standard">
      <style:text-properties style:font-name="Times New Roman" officeooo:rsid="001b1782" officeooo:paragraph-rsid="001b1782"/>
    </style:style>
    <style:style style:name="P35" style:family="paragraph" style:parent-style-name="Standard" style:list-style-name="L4">
      <style:text-properties style:font-name="Times New Roman" officeooo:paragraph-rsid="000e1a55"/>
    </style:style>
    <style:style style:name="P36" style:family="paragraph" style:parent-style-name="Standard" style:list-style-name="L4">
      <style:text-properties style:font-name="Times New Roman" officeooo:rsid="001b1782" officeooo:paragraph-rsid="001b1782"/>
    </style:style>
    <style:style style:name="P37" style:family="paragraph" style:parent-style-name="Standard" style:list-style-name="L4">
      <style:text-properties style:font-name="Times New Roman" officeooo:rsid="0030d69a" officeooo:paragraph-rsid="0030d69a"/>
    </style:style>
    <style:style style:name="P38" style:family="paragraph" style:parent-style-name="Standard">
      <style:text-properties style:font-name="Times New Roman" officeooo:paragraph-rsid="001c72a7"/>
    </style:style>
    <style:style style:name="P39" style:family="paragraph" style:parent-style-name="Standard">
      <style:text-properties style:font-name="Times New Roman" fo:font-size="15pt" fo:font-weight="bold" officeooo:paragraph-rsid="001c72a7" style:font-size-asian="15pt" style:font-weight-asian="bold" style:font-size-complex="15pt" style:font-weight-complex="bold"/>
    </style:style>
    <style:style style:name="P40" style:family="paragraph" style:parent-style-name="Standard">
      <style:text-properties style:font-name="Times New Roman" officeooo:paragraph-rsid="00342076"/>
    </style:style>
    <style:style style:name="P41" style:family="paragraph" style:parent-style-name="Standard">
      <style:text-properties style:font-name="Times New Roman" fo:font-size="12pt" fo:font-weight="normal" officeooo:paragraph-rsid="00342076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text-properties style:font-name="Times New Roman" fo:font-size="12pt" fo:font-weight="normal" officeooo:rsid="00371517" officeooo:paragraph-rsid="00371517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fo:font-weight="normal" officeooo:rsid="00371517" officeooo:paragraph-rsid="00371517" style:font-size-asian="12pt" style:font-weight-asian="normal" style:font-size-complex="12pt" style:font-weight-complex="normal"/>
    </style:style>
    <style:style style:name="P44" style:family="paragraph" style:parent-style-name="Standard">
      <style:text-properties officeooo:paragraph-rsid="00371517"/>
    </style:style>
    <style:style style:name="P45" style:family="paragraph" style:parent-style-name="Standard" style:list-style-name="L6">
      <style:text-properties style:font-name="Times New Roman" fo:font-size="12pt" fo:font-weight="normal" officeooo:rsid="001cd86b" officeooo:paragraph-rsid="001c72a7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Times New Roman" fo:font-size="12pt" fo:font-weight="normal" officeooo:paragraph-rsid="001c72a7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Times New Roman" fo:font-size="15pt" fo:font-weight="bold" officeooo:rsid="000f6d16" officeooo:paragraph-rsid="000f6d16" style:font-size-asian="15pt" style:font-weight-asian="bold" style:font-size-complex="15pt" style:font-weight-complex="bold"/>
    </style:style>
    <style:style style:name="P48" style:family="paragraph" style:parent-style-name="Standard">
      <style:text-properties style:font-name="Times New Roman" officeooo:paragraph-rsid="00399b22"/>
    </style:style>
    <style:style style:name="P49" style:family="paragraph" style:parent-style-name="Standard">
      <style:text-properties style:font-name="Times New Roman" fo:font-size="12pt" fo:font-weight="normal" officeooo:rsid="000f6d16" officeooo:paragraph-rsid="000f6d16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text-properties style:font-name="Times New Roman" fo:font-size="12pt" fo:font-weight="normal" officeooo:rsid="000f6d16" officeooo:paragraph-rsid="000f6d16" style:font-size-asian="12pt" style:font-weight-asian="normal" style:font-size-complex="12pt" style:font-weight-complex="normal"/>
    </style:style>
    <style:style style:name="P51" style:family="paragraph" style:parent-style-name="Standard" style:list-style-name="L7">
      <style:text-properties officeooo:paragraph-rsid="000f6d16"/>
    </style:style>
    <style:style style:name="P52" style:family="paragraph" style:parent-style-name="Standard">
      <style:text-properties style:font-name="Times New Roman" fo:font-size="12pt" fo:font-weight="normal" officeooo:rsid="000f6d16" officeooo:paragraph-rsid="000f6d16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Times New Roman" fo:font-size="12pt" fo:font-weight="normal" officeooo:rsid="003c915c" officeooo:paragraph-rsid="003c915c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Times New Roman" fo:font-size="12pt" fo:font-weight="normal" officeooo:rsid="001cd86b" officeooo:paragraph-rsid="001cd86b" style:font-size-asian="10.5pt" style:font-weight-asian="normal" style:font-size-complex="12pt" style:font-weight-complex="normal"/>
    </style:style>
    <style:style style:name="P55" style:family="paragraph" style:parent-style-name="Heading_20_1">
      <style:text-properties style:font-name="Times New Roman" fo:font-size="12pt" fo:font-weight="normal" officeooo:rsid="001cd86b" officeooo:paragraph-rsid="001cd86b" style:font-size-asian="10.5pt" style:font-weight-asian="normal" style:font-size-complex="12pt" style:font-weight-complex="normal"/>
    </style:style>
    <style:style style:name="P56" style:family="paragraph" style:parent-style-name="Heading_20_2">
      <style:text-properties style:font-name="Times New Roman" officeooo:rsid="001cd86b"/>
    </style:style>
    <style:style style:name="P57" style:family="paragraph" style:parent-style-name="Text_20_body" style:list-style-name="L8">
      <style:paragraph-properties fo:margin-top="0in" fo:margin-bottom="0in" style:contextual-spacing="false"/>
      <style:text-properties style:font-name="Times New Roman" officeooo:rsid="001cd86b"/>
    </style:style>
    <style:style style:name="P58" style:family="paragraph" style:parent-style-name="Text_20_body" style:list-style-name="L8">
      <style:text-properties style:font-name="Times New Roman" officeooo:rsid="001cd86b"/>
    </style:style>
    <style:style style:name="P59" style:family="paragraph" style:parent-style-name="Text_20_body">
      <style:text-properties style:font-name="Times New Roman" officeooo:rsid="001cd86b"/>
    </style:style>
    <style:style style:name="P60" style:family="paragraph" style:parent-style-name="Text_20_body">
      <style:paragraph-properties fo:margin-top="0in" fo:margin-bottom="0in" style:contextual-spacing="false"/>
      <style:text-properties style:font-name="Times New Roman" officeooo:rsid="001cd86b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style:font-name="Times New Roman" officeooo:rsid="001cd86b"/>
    </style:style>
    <style:style style:name="P62" style:family="paragraph" style:parent-style-name="Text_20_body" style:list-style-name="L9">
      <style:text-properties style:font-name="Times New Roman" officeooo:rsid="001cd86b"/>
    </style:style>
    <style:style style:name="P63" style:family="paragraph" style:parent-style-name="Heading_20_3">
      <style:text-properties style:font-name="Times New Roman" fo:font-size="12pt" fo:font-weight="normal" officeooo:rsid="001cd86b" style:font-size-asian="10.5pt" style:font-weight-asian="normal" style:font-size-complex="12pt" style:font-weight-complex="normal"/>
    </style:style>
    <style:style style:name="P64" style:family="paragraph" style:parent-style-name="Text_20_body" style:list-style-name="L10">
      <style:paragraph-properties fo:margin-top="0in" fo:margin-bottom="0in" style:contextual-spacing="false"/>
      <style:text-properties style:font-name="Times New Roman" officeooo:rsid="001cd86b"/>
    </style:style>
    <style:style style:name="P65" style:family="paragraph" style:parent-style-name="Preformatted_20_Text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2pt" officeooo:rsid="001cd86b" style:font-size-asian="10.5pt" style:font-size-complex="12pt"/>
    </style:style>
    <style:style style:name="P66" style:family="paragraph" style:parent-style-name="Preformatted_20_Text">
      <style:paragraph-properties fo:text-align="center" style:justify-single-word="false" style:writing-mode="lr-tb"/>
      <style:text-properties style:font-name="Times New Roman" fo:font-size="12pt" officeooo:rsid="001cd86b" style:font-size-asian="10.5pt" style:font-size-complex="12pt"/>
    </style:style>
    <style:style style:name="P67" style:family="paragraph" style:parent-style-name="Preformatted_20_Text">
      <style:paragraph-properties fo:margin-top="0in" fo:margin-bottom="0.1965in" style:contextual-spacing="false" fo:text-align="center" style:justify-single-word="false" style:writing-mode="lr-tb"/>
      <style:text-properties style:font-name="Times New Roman" fo:font-size="12pt" officeooo:rsid="001cd86b" style:font-size-asian="10.5pt" style:font-size-complex="12pt"/>
    </style:style>
    <style:style style:name="P68" style:family="paragraph" style:parent-style-name="Preformatted_20_Text">
      <style:paragraph-properties fo:margin-left="0in" fo:margin-right="0in" fo:text-indent="0in" style:auto-text-indent="false" style:writing-mode="lr-tb"/>
      <style:text-properties style:font-name="Times New Roman" fo:font-size="12pt" officeooo:rsid="001cd86b" style:font-size-asian="10.5pt" style:font-size-complex="12pt"/>
    </style:style>
    <style:style style:name="P69" style:family="paragraph" style:parent-style-name="Preformatted_20_Text">
      <style:paragraph-properties style:writing-mode="lr-tb"/>
      <style:text-properties style:font-name="Times New Roman" fo:font-size="12pt" officeooo:rsid="001cd86b" style:font-size-asian="10.5pt" style:font-size-complex="12pt"/>
    </style:style>
    <style:style style:name="P70" style:family="paragraph" style:parent-style-name="Preformatted_20_Text">
      <style:paragraph-properties fo:margin-top="0in" fo:margin-bottom="0in" style:contextual-spacing="false" style:writing-mode="lr-tb"/>
      <style:text-properties style:font-name="Times New Roman" officeooo:rsid="001cd86b" officeooo:paragraph-rsid="003e6d04"/>
    </style:style>
    <style:style style:name="P71" style:family="paragraph" style:parent-style-name="Heading_20_2">
      <style:paragraph-properties fo:margin-top="0in" fo:margin-bottom="0in" style:contextual-spacing="false"/>
      <style:text-properties style:font-name="Times New Roman" officeooo:rsid="001cd86b"/>
    </style:style>
    <style:style style:name="P72" style:family="paragraph" style:parent-style-name="Heading_20_2">
      <style:text-properties style:font-name="Times New Roman" fo:font-size="12pt" fo:font-weight="normal" officeooo:rsid="001cd86b" style:font-size-asian="12pt" style:font-weight-asian="normal" style:font-size-complex="12pt" style:font-weight-complex="normal"/>
    </style:style>
    <style:style style:name="P73" style:family="paragraph" style:parent-style-name="Heading_20_2">
      <style:text-properties style:font-name="Times New Roman" fo:font-size="12pt" fo:font-weight="normal" officeooo:rsid="001cd86b" style:font-size-asian="10.5pt" style:font-weight-asian="normal" style:font-size-complex="12pt" style:font-weight-complex="normal"/>
    </style:style>
    <style:style style:name="P74" style:family="paragraph" style:parent-style-name="Text_20_body" style:list-style-name="L11">
      <style:text-properties style:font-name="Times New Roman" officeooo:rsid="001cd86b"/>
    </style:style>
    <style:style style:name="P75" style:family="paragraph" style:parent-style-name="Text_20_body" style:list-style-name="L11">
      <style:text-properties style:font-name="Times New Roman" officeooo:rsid="001cd86b" officeooo:paragraph-rsid="003e7032"/>
    </style:style>
    <style:style style:name="P76" style:family="paragraph" style:parent-style-name="Text_20_body">
      <style:text-properties style:font-name="Times New Roman" officeooo:rsid="001cd86b" officeooo:paragraph-rsid="003e7032"/>
    </style:style>
    <style:style style:name="P77" style:family="paragraph" style:parent-style-name="Text_20_body" style:list-style-name="L12">
      <style:text-properties style:font-name="Times New Roman" officeooo:rsid="001cd86b"/>
    </style:style>
    <style:style style:name="P78" style:family="paragraph" style:parent-style-name="Text_20_body" style:list-style-name="L13">
      <style:text-properties style:font-name="Times New Roman" officeooo:rsid="001cd86b"/>
    </style:style>
    <style:style style:name="P79" style:family="paragraph" style:parent-style-name="Heading_20_1">
      <style:text-properties style:font-name="Times New Roman" fo:font-size="12pt" officeooo:rsid="001cd86b" style:font-size-asian="10.5pt" style:font-size-complex="12pt"/>
    </style:style>
    <style:style style:name="P80" style:family="paragraph" style:parent-style-name="Preformatted_20_Text">
      <style:paragraph-properties fo:margin-top="0in" fo:margin-bottom="0.1965in" style:contextual-spacing="false" style:writing-mode="lr-tb"/>
      <style:text-properties style:font-name="Times New Roman" fo:font-size="12pt" officeooo:rsid="001cd86b" style:font-size-asian="10.5pt" style:font-size-complex="12pt"/>
    </style:style>
    <style:style style:name="P81" style:family="paragraph" style:parent-style-name="Heading_20_2">
      <style:text-properties style:font-name="Times New Roman" fo:font-size="12pt" fo:font-weight="bold" officeooo:rsid="001cd86b" style:font-size-asian="10.5pt" style:font-weight-asian="bold" style:font-size-complex="12pt" style:font-weight-complex="bold"/>
    </style:style>
    <style:style style:name="P82" style:family="paragraph" style:parent-style-name="Text_20_body" style:list-style-name="L14">
      <style:text-properties style:font-name="Times New Roman" officeooo:rsid="001cd86b"/>
    </style:style>
    <style:style style:name="P83" style:family="paragraph" style:parent-style-name="Heading_20_1">
      <style:text-properties style:font-name="Times New Roman" fo:font-size="15pt" fo:font-weight="bold" officeooo:rsid="001cd86b" style:font-size-asian="15pt" style:font-weight-asian="bold" style:font-size-complex="15pt" style:font-weight-complex="bold"/>
    </style:style>
    <style:style style:name="P84" style:family="paragraph" style:parent-style-name="Text_20_body" style:list-style-name="L15">
      <style:text-properties style:font-name="Times New Roman" officeooo:rsid="001cd86b"/>
    </style:style>
    <style:style style:name="P85" style:family="paragraph" style:parent-style-name="Text_20_body" style:list-style-name="L16">
      <style:text-properties style:font-name="Times New Roman" officeooo:rsid="001cd86b"/>
    </style:style>
    <style:style style:name="P86" style:family="paragraph" style:parent-style-name="Standard">
      <style:text-properties style:font-name="Times New Roman" fo:font-size="12pt" fo:font-weight="normal" officeooo:rsid="003fb96a" officeooo:paragraph-rsid="003fb96a" style:font-size-asian="10.5pt" style:font-weight-asian="normal" style:font-size-complex="12pt" style:font-weight-complex="normal"/>
    </style:style>
    <style:style style:name="P87" style:family="paragraph" style:parent-style-name="Table_20_Heading">
      <style:text-properties style:font-name="Times New Roman"/>
    </style:style>
    <style:style style:name="P88" style:family="paragraph" style:parent-style-name="Table_20_Contents">
      <style:text-properties style:font-name="Times New Roman"/>
    </style:style>
    <style:style style:name="P89" style:family="paragraph" style:parent-style-name="Heading_20_1">
      <style:text-properties style:font-name="Times New Roman" fo:font-size="15pt" fo:font-weight="bold" officeooo:rsid="001cd86b" officeooo:paragraph-rsid="001cd86b" style:font-size-asian="15pt" style:font-weight-asian="bold" style:font-size-complex="15pt" style:font-weight-complex="bold"/>
    </style:style>
    <style:style style:name="P90" style:family="paragraph" style:parent-style-name="Text_20_body" style:list-style-name="L17">
      <style:paragraph-properties fo:margin-top="0in" fo:margin-bottom="0in" style:contextual-spacing="false"/>
      <style:text-properties style:font-name="Times New Roman" officeooo:rsid="001cd86b"/>
    </style:style>
    <style:style style:name="P91" style:family="paragraph" style:parent-style-name="Text_20_body" style:list-style-name="L18">
      <style:paragraph-properties fo:margin-top="0in" fo:margin-bottom="0in" style:contextual-spacing="false"/>
      <style:text-properties style:font-name="Times New Roman" officeooo:rsid="003fbc8b" officeooo:paragraph-rsid="003fbc8b"/>
    </style:style>
    <style:style style:name="P92" style:family="paragraph" style:parent-style-name="Text_20_body" style:list-style-name="L18">
      <style:paragraph-properties fo:margin-top="0in" fo:margin-bottom="0in" style:contextual-spacing="false"/>
      <style:text-properties style:font-name="Times New Roman" officeooo:rsid="001cd86b" officeooo:paragraph-rsid="004125a0"/>
    </style:style>
    <style:style style:name="P93" style:family="paragraph" style:parent-style-name="Text_20_body" style:list-style-name="L18">
      <style:paragraph-properties fo:margin-top="0in" fo:margin-bottom="0in" style:contextual-spacing="false"/>
      <style:text-properties style:font-name="Times New Roman" officeooo:rsid="001cd86b"/>
    </style:style>
    <style:style style:name="P94" style:family="paragraph" style:parent-style-name="Text_20_body" style:list-style-name="L18">
      <style:paragraph-properties fo:margin-top="0in" fo:margin-bottom="0in" style:contextual-spacing="false"/>
      <style:text-properties style:font-name="Times New Roman" officeooo:rsid="004125a0" officeooo:paragraph-rsid="00428abf"/>
    </style:style>
    <style:style style:name="T1" style:family="text">
      <style:text-properties officeooo:rsid="00216f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d638"/>
    </style:style>
    <style:style style:name="T4" style:family="text">
      <style:text-properties fo:font-weight="bold" officeooo:rsid="00216f5a" style:font-weight-asian="bold" style:font-weight-complex="bold"/>
    </style:style>
    <style:style style:name="T5" style:family="text">
      <style:text-properties officeooo:rsid="00079a5a"/>
    </style:style>
    <style:style style:name="T6" style:family="text">
      <style:text-properties officeooo:rsid="000b75a9"/>
    </style:style>
    <style:style style:name="T7" style:family="text">
      <style:text-properties officeooo:rsid="000c94c6"/>
    </style:style>
    <style:style style:name="T8" style:family="text">
      <style:text-properties officeooo:rsid="0023a68c"/>
    </style:style>
    <style:style style:name="T9" style:family="text">
      <style:text-properties officeooo:rsid="001ed545"/>
    </style:style>
    <style:style style:name="T10" style:family="text">
      <style:text-properties officeooo:rsid="0024e66b"/>
    </style:style>
    <style:style style:name="T11" style:family="text">
      <style:text-properties fo:font-weight="bold" officeooo:rsid="000b75a9" style:font-weight-asian="bold" style:font-weight-complex="bold"/>
    </style:style>
    <style:style style:name="T12" style:family="text">
      <style:text-properties officeooo:rsid="00331d90"/>
    </style:style>
    <style:style style:name="T13" style:family="text">
      <style:text-properties officeooo:rsid="000e1a55"/>
    </style:style>
    <style:style style:name="T14" style:family="text">
      <style:text-properties style:font-name="Times New Roman" fo:font-weight="bold" officeooo:rsid="002528c4" style:font-weight-asian="bold" style:font-weight-complex="bold"/>
    </style:style>
    <style:style style:name="T15" style:family="text">
      <style:text-properties style:font-name="Times New Roman" officeooo:rsid="002528c4"/>
    </style:style>
    <style:style style:name="T16" style:family="text">
      <style:text-properties style:font-name="Times New Roman"/>
    </style:style>
    <style:style style:name="T17" style:family="text">
      <style:text-properties fo:font-weight="bold" officeooo:rsid="000e1a55" style:font-weight-asian="bold" style:font-weight-complex="bold"/>
    </style:style>
    <style:style style:name="T18" style:family="text">
      <style:text-properties style:text-position="sub 58%"/>
    </style:style>
    <style:style style:name="T19" style:family="text">
      <style:text-properties officeooo:rsid="0025febf"/>
    </style:style>
    <style:style style:name="T20" style:family="text">
      <style:text-properties officeooo:rsid="0012b34c"/>
    </style:style>
    <style:style style:name="T21" style:family="text">
      <style:text-properties fo:font-size="15pt" fo:font-weight="bold" officeooo:rsid="00342076" style:font-size-asian="15pt" style:font-weight-asian="bold" style:font-size-complex="15pt" style:font-weight-complex="bold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style:font-name="Times New Roman" fo:font-weight="bold" officeooo:rsid="00288998" style:font-weight-asian="bold" style:font-weight-complex="bold"/>
    </style:style>
    <style:style style:name="T24" style:family="text">
      <style:text-properties style:font-name="Times New Roman" officeooo:rsid="00288998"/>
    </style:style>
    <style:style style:name="T25" style:family="text">
      <style:text-properties officeooo:rsid="00198603"/>
    </style:style>
    <style:style style:name="T26" style:family="text">
      <style:text-properties officeooo:rsid="0017bff6"/>
    </style:style>
    <style:style style:name="T27" style:family="text">
      <style:text-properties fo:font-weight="bold" officeooo:rsid="0012b34c" style:font-weight-asian="bold" style:font-weight-complex="bold"/>
    </style:style>
    <style:style style:name="T28" style:family="text">
      <style:text-properties fo:font-weight="bold" officeooo:rsid="00198603" style:font-weight-asian="bold" style:font-weight-complex="bold"/>
    </style:style>
    <style:style style:name="T29" style:family="text">
      <style:text-properties officeooo:rsid="0029b595"/>
    </style:style>
    <style:style style:name="T30" style:family="text">
      <style:text-properties officeooo:rsid="002b9937"/>
    </style:style>
    <style:style style:name="T31" style:family="text">
      <style:text-properties officeooo:rsid="00322e15"/>
    </style:style>
    <style:style style:name="T32" style:family="text">
      <style:text-properties officeooo:rsid="0031c1c9"/>
    </style:style>
    <style:style style:name="T33" style:family="text">
      <style:text-properties fo:font-weight="bold" officeooo:rsid="0031c1c9" style:font-weight-asian="bold" style:font-weight-complex="bold"/>
    </style:style>
    <style:style style:name="T34" style:family="text">
      <style:text-properties fo:font-size="12pt" fo:font-weight="bold" officeooo:rsid="00342076" style:font-size-asian="12pt" style:font-weight-asian="bold" style:font-size-complex="12pt" style:font-weight-complex="bold"/>
    </style:style>
    <style:style style:name="T35" style:family="text">
      <style:text-properties style:font-name="Times New Roman" fo:font-weight="bold" style:font-weight-asian="bold" style:font-weight-complex="bold"/>
    </style:style>
    <style:style style:name="T36" style:family="text">
      <style:text-properties officeooo:rsid="001cd86b"/>
    </style:style>
    <style:style style:name="T37" style:family="text">
      <style:text-properties officeooo:rsid="002fd2f7"/>
    </style:style>
    <style:style style:name="T38" style:family="text">
      <style:text-properties fo:font-size="12pt" fo:font-weight="normal" officeooo:rsid="00342076" style:font-size-asian="12pt" style:font-weight-asian="normal" style:font-size-complex="12pt" style:font-weight-complex="normal"/>
    </style:style>
    <style:style style:name="T39" style:family="text">
      <style:text-properties officeooo:rsid="00399b22"/>
    </style:style>
    <style:style style:name="T40" style:family="text">
      <style:text-properties style:font-name="Times New Roman" fo:font-weight="normal" style:font-weight-asian="normal" style:font-weight-complex="normal"/>
    </style:style>
    <style:style style:name="T41" style:family="text">
      <style:text-properties style:font-name="Times New Roman" fo:font-size="12pt" officeooo:rsid="000f6d16" style:font-size-asian="12pt" style:font-size-complex="12pt"/>
    </style:style>
    <style:style style:name="T42" style:family="text">
      <style:text-properties style:font-name="Times New Roman" fo:font-size="12pt" fo:font-weight="normal" officeooo:rsid="000f6d16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bold" officeooo:rsid="000f6d16" style:font-size-asian="12pt" style:font-weight-asian="bold" style:font-size-complex="12pt" style:font-weight-complex="bold"/>
    </style:style>
    <style:style style:name="T44" style:family="text">
      <style:text-properties officeooo:rsid="003cf60e"/>
    </style:style>
    <style:style style:name="T45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46" style:family="text">
      <style:text-properties fo:font-size="12pt" fo:font-weight="bold" style:font-size-asian="10.5pt" style:font-weight-asian="bold" style:font-size-complex="12pt" style:font-weight-complex="bold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officeooo:rsid="003e6d04"/>
    </style:style>
    <style:style style:name="T49" style:family="text">
      <style:text-properties style:font-name="Times New Roman" fo:font-style="italic" style:font-style-asian="italic" style:font-style-complex="italic"/>
    </style:style>
    <style:style style:name="T50" style:family="text">
      <style:text-properties style:font-name="Times New Roman" fo:font-size="12pt" style:font-size-asian="10.5pt" style:font-size-complex="12pt"/>
    </style:style>
    <style:style style:name="T5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style:font-size-asian="10.5pt" style:font-weight-asian="normal" style:font-size-complex="12pt" style:font-weight-complex="normal"/>
    </style:style>
    <style:style style:name="T53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font-weight="normal" officeooo:rsid="003ead28" style:font-size-asian="10.5pt" style:font-weight-asian="normal" style:font-size-complex="12pt" style:font-weight-complex="normal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style:font-name="Times New Roman" officeooo:rsid="003e7032"/>
    </style:style>
    <style:style style:name="T57" style:family="text">
      <style:text-properties officeooo:rsid="003ead28"/>
    </style:style>
    <style:style style:name="T58" style:family="text">
      <style:text-properties style:font-name="Times New Roman" officeooo:rsid="003ead28"/>
    </style:style>
    <style:style style:name="T59" style:family="text">
      <style:text-properties officeooo:rsid="003fb96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ere algoritmi de implementat:</text:p>
      <text:p text:style-name="P2"/>
      <text:p text:style-name="P3">Proiectul defineste <text:span text:style-name="T1">3</text:span> structuri:</text:p>
      <text:list text:style-name="L1">
        <text:list-item>
          <text:p text:style-name="P4"><text:span text:style-name="T2">Vec3</text:span> – punct 3D (x, y, z)</text:p>
        </text:list-item>
        <text:list-item>
          <text:p text:style-name="P4"><text:span text:style-name="T2">Edge</text:span> – muchie intre 2 varfuri (a, b), a si b sunt indici in vectorul de varfuri</text:p>
        </text:list-item>
        <text:list-item>
          <text:p text:style-name="P5"><text:span text:style-name="T2">Framebuffer</text:span> – buffer care scrie pixelii, inainte de a fi afisati pe ecran</text:p>
        </text:list-item>
      </text:list>
      <text:p text:style-name="P3"/>
      <text:p text:style-name="P3"/>
      <text:p text:style-name="P6"><text:span text:style-name="T1">1</text:span>. <text:span text:style-name="T3">Rotirea unui punct in jurul axei Y</text:span>:</text:p>
      <text:p text:style-name="P7"/>
      <text:p text:style-name="P8"><text:span text:style-name="T4">Scop:</text:span><text:span text:style-name="T1"> </text:span>Rotirea unui punct/puncte din spațiul 3D în jurul axei verticale (Y) <text:span text:style-name="T1">pentru ca modelul sa para animat.</text:span></text:p>
      <text:p text:style-name="P8"/>
      <text:p text:style-name="P2"><text:span text:style-name="T3">O functie </text:span><text:span text:style-name="T2">rotate_y(Vec3 v, float angle)</text:span> <text:span text:style-name="T5">foloseste formula clasica de rotatie 3D:</text:span></text:p>
      <text:p text:style-name="P2"/>
      <text:p text:style-name="P9">x′ = xcosθ + zsinθ</text:p>
      <text:p text:style-name="P10">y′ = y</text:p>
      <text:p text:style-name="P10">z′ = −xsinθ + zcosθ​</text:p>
      <text:p text:style-name="P10"/>
      <text:p text:style-name="P11"><text:span text:style-name="T6">Pentru fiecare </text:span>punct, se calculează coordonatele noi folosind cosinus și sinus. <text:span text:style-name="T7"><text:s/></text:span><text:span text:style-name="T8">F</text:span><text:span text:style-name="T9">ormula se aplica pe coordonatele X si Z, </text:span><text:span text:style-name="T8">deci coordonata Y ramane neschimbata </text:span><text:span text:style-name="T10">(putem extinde algoritmul ptr animatii mai complexe)</text:span></text:p>
      <text:p text:style-name="P11"/>
      <text:p text:style-name="P12"><text:span text:style-name="T11">Complexitate:</text:span><text:span text:style-name="T6"> O(1), per punct, </text:span><text:span text:style-name="T7">foarte rapid.</text:span></text:p>
      <text:p text:style-name="P11"/>
      <text:p text:style-name="P11"/>
      <text:p text:style-name="P13"><text:span text:style-name="T12">2</text:span>. <text:span text:style-name="T13">Proiectia 3D-2D (perspectiva simpla)</text:span>:</text:p>
      <text:p text:style-name="P13"/>
      <text:p text:style-name="P14"><text:span text:style-name="T14">Scop:</text:span><text:span text:style-name="T15"> </text:span><text:span text:style-name="T16">Transformarea coordonatelor 3D într-un sistem de coordonate 2D pentru a fi desenate pe ecran, </text:span><text:span text:style-name="T15">creand</text:span><text:span text:style-name="T16"> efectul de </text:span><text:span text:style-name="Strong_20_Emphasis"><text:span text:style-name="T16">perspectivă</text:span></text:span><text:span text:style-name="T16">, astfel încât obiectele mai îndepărtate par mai mici.</text:span></text:p>
      <text:p text:style-name="P15"/>
      <text:p text:style-name="P16">Funcția <text:span text:style-name="T17">project() </text:span>convertește un punct 3D în coordonate de ecran:</text:p>
      <text:p text:style-name="P16"/>
      <text:p text:style-name="P17"><draw:frame draw:style-name="fr1" draw:name="Object1" text:anchor-type="as-char" svg:y="-0.2445in" svg:width="1.1744in" svg:height="0.4201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8">(factorul de scalare depinde de distanta Z fata de camera)</text:p>
      <text:p text:style-name="P19"/>
      <text:p text:style-name="P20">x<text:span text:style-name="T18">screen</text:span>​ = <text:s/>x ⋅ factor + w<text:span text:style-name="T19">idth</text:span>/2</text:p>
      <text:p text:style-name="P20">y<text:span text:style-name="T18">screen</text:span>​ = −y ⋅ factor + h<text:span text:style-name="T19">eight</text:span>/2​</text:p>
      <text:p text:style-name="P21"/>
      <text:list text:style-name="L2">
        <text:list-item>
          <text:p text:style-name="P22"><text:span text:style-name="T20">Se ajustează Z-ul cu distanța camerei </text:span><text:span text:style-name="T19">(zoff)</text:span><text:span text:style-name="T20"> pentru a evita distanțele negative.</text:span></text:p>
        </text:list-item>
        <text:list-item>
          <text:p text:style-name="P22">Se aplică formula perspectivei simple: obiectele îndepărtate sunt scalate mai mic.</text:p>
        </text:list-item>
        <text:list-item>
          <text:p text:style-name="P22"><text:span text:style-name="T19">S</text:span>e centerizează pe ecran adăugând jumătate din lățimea și înălțimea ferestrei.</text:p>
        </text:list-item>
        <text:list-item>
          <text:p text:style-name="P22">Se inversează Y-ul <text:span text:style-name="T19">(-y)</text:span> deoarece coordonata verticală a ferestrei crește de sus în jos, dar în spațiul 3D Y crește de jos în sus.</text:p>
        </text:list-item>
      </text:list>
      <text:p text:style-name="P23"/>
      <text:p text:style-name="P24"><text:span text:style-name="T11">Complexitate:</text:span><text:span text:style-name="T6"> O(1), per punct, </text:span><text:span text:style-name="T7">foarte rapid.</text:span></text:p>
      <text:p text:style-name="P23"/>
      <text:p text:style-name="P25"><text:span text:style-name="T21">3</text:span><text:span text:style-name="T22">. Algoritmul de generare wireframe din fețe .obj:</text:span></text:p>
      <text:p text:style-name="P26"/>
      <text:p text:style-name="P27"><text:soft-page-break/><text:span text:style-name="T23">Scop:</text:span><text:span text:style-name="T24"> D</text:span><text:span text:style-name="T16">intr-un model .</text:span><text:span text:style-name="T24">obj</text:span><text:span text:style-name="T16">, extrage vârfurile și fețele și le transformă în </text:span><text:span text:style-name="Strong_20_Emphasis"><text:span text:style-name="T16">muchii</text:span></text:span><text:span text:style-name="T16"> pentru a fi desenate cu Bresenham.</text:span></text:p>
      <text:p text:style-name="P28"/>
      <text:p text:style-name="P26">Un fisier de tip .obj <text:span text:style-name="T25">(la modul cel mai simplu)</text:span> contine proprietatile unui model 3D prin urmatoarea sintaxa:</text:p>
      <text:p text:style-name="P26"/>
      <text:p text:style-name="P29"/>
      <text:p text:style-name="P30">o Cube</text:p>
      <text:p text:style-name="P30"/>
      <text:p text:style-name="P31">#Lista de puncte 3D (vertices), cu coordonatele x, y, z</text:p>
      <text:p text:style-name="P30">v 1.000000 1.000000 -1.000000</text:p>
      <text:p text:style-name="P30">v 1.000000 -1.000000 -1.000000</text:p>
      <text:p text:style-name="P30">v 1.000000 1.000000 1.000000</text:p>
      <text:p text:style-name="P30">v 1.000000 -1.000000 1.000000</text:p>
      <text:p text:style-name="P30">v -1.000000 1.000000 -1.000000</text:p>
      <text:p text:style-name="P30">v -1.000000 -1.000000 -1.000000</text:p>
      <text:p text:style-name="P30">v -1.000000 1.000000 1.000000</text:p>
      <text:p text:style-name="P30">v -1.000000 -1.000000 1.000000</text:p>
      <text:p text:style-name="P30"/>
      <text:p text:style-name="P31"># <text:span text:style-name="T26">Fetele corpului geometric, definite prin liste de varfuri</text:span></text:p>
      <text:p text:style-name="P30">f 1 5 7 3</text:p>
      <text:p text:style-name="P30">f 4 3 7 8</text:p>
      <text:p text:style-name="P30">f 8 7 5 6</text:p>
      <text:p text:style-name="P30">f 6 2 4 8</text:p>
      <text:p text:style-name="P30">f 2 1 3 4</text:p>
      <text:p text:style-name="P30">f 6 5 1 2</text:p>
      <text:p text:style-name="P26"/>
      <text:p text:style-name="P26"/>
      <text:p text:style-name="P16">Funcția<text:span text:style-name="T2"> </text:span><text:span text:style-name="T27">load_obj()</text:span><text:span text:style-name="T20"> </text:span>citește un fișier <text:span text:style-name="T20">de tip .obj </text:span>minimal:</text:p>
      <text:list text:style-name="L3">
        <text:list-item>
          <text:p text:style-name="P32">Linie <text:span text:style-name="T28">v x y z</text:span><text:span text:style-name="T25"> : </text:span>adaugă un vârf în vectorul <text:span text:style-name="T28">verts</text:span>.</text:p>
        </text:list-item>
        <text:list-item>
          <text:p text:style-name="P33">Linie <text:span text:style-name="T2">f i j k…</text:span>: genereaza muchii intre varfurile fetei</text:p>
          <text:list>
            <text:list-item>
              <text:p text:style-name="P33">Se genereaza muchii i→j, j→k,…..si ultima k→i.</text:p>
            </text:list-item>
            <text:list-item>
              <text:p text:style-name="P33">Deci, poligonul este descompus in muchii pentru randarea wireframe</text:p>
            </text:list-item>
          </text:list>
        </text:list-item>
      </text:list>
      <text:p text:style-name="P34">Algoritm<text:span text:style-name="T29">ul</text:span>:</text:p>
      <text:list text:style-name="L4">
        <text:list-item>
          <text:p text:style-name="P35">Citește fiecare linie.</text:p>
        </text:list-item>
        <text:list-item>
          <text:p text:style-name="P36">Dacă e <text:span text:style-name="T2">vârf</text:span>, parsează <text:span text:style-name="T30">coordonatele X,Y,Z</text:span> și adaugă în array.</text:p>
        </text:list-item>
        <text:list-item>
          <text:p text:style-name="P36">Dacă e <text:span text:style-name="T2">față</text:span>, parsează indici<text:span text:style-name="T30">i varfurilor</text:span> <text:span text:style-name="T31">ptr fete poligonale</text:span>.</text:p>
        </text:list-item>
        <text:list-item>
          <text:p text:style-name="P37">Se genereaza muchiile fetei:</text:p>
          <text:list>
            <text:list-item>
              <text:p text:style-name="P37">fiecare muchie = vârf[i] → vârf[i+1]</text:p>
            </text:list-item>
            <text:list-item>
              <text:p text:style-name="P37">ultima muchie = vârf[n-1] → vârf[0] (închide poligonul).</text:p>
            </text:list-item>
          </text:list>
        </text:list-item>
        <text:list-item>
          <text:p text:style-name="P37">Toate muchiile sunt stocate într-un vector dinami<text:span text:style-name="T32">c </text:span><text:span text:style-name="T33">edges[]</text:span><text:span text:style-name="T32"> </text:span>pentru desenarea wireframe-ului.</text:p>
        </text:list-item>
      </text:list>
      <text:p text:style-name="P16"/>
      <text:p text:style-name="P16"><text:span text:style-name="Strong_20_Emphasis"><text:span text:style-name="T16">Complexitate:</text:span></text:span><text:span text:style-name="T16"> O(n + m) pentru n vârfuri și m fețe, deoarece fiecare față se parcurge o singură dată.</text:span></text:p>
      <text:p text:style-name="P16"/>
      <text:p text:style-name="P16"/>
      <text:p text:style-name="P38"><text:span text:style-name="T21">4</text:span><text:span text:style-name="T22">. Algoritmul Bresenham pentru linii:</text:span></text:p>
      <text:p text:style-name="P39"/>
      <text:p text:style-name="P40"><text:span text:style-name="T34">Scop: </text:span>Desenarea unei linii între două puncte pe un grid discret (pixeli). Evită folosirea floating point și permite linie continuă fără spații vizibile.</text:p>
      <text:p text:style-name="P41"/>
      <text:list text:style-name="L5">
        <text:list-item>
          <text:p text:style-name="P42"><text:span text:style-name="T16">Se calculează diferențele absolute </text:span><text:span text:style-name="Source_20_Text"><text:span text:style-name="T35">dx = |x1 - x0|</text:span></text:span><text:span text:style-name="T35"> </text:span><text:span text:style-name="T16">și </text:span><text:span text:style-name="Source_20_Text"><text:span text:style-name="T35">dy = |y1 - y0|</text:span></text:span><text:span text:style-name="T16">.</text:span></text:p>
        </text:list-item>
        <text:list-item>
          <text:p text:style-name="P42"><text:span text:style-name="T16">Se determină direcțiile </text:span><text:span text:style-name="Source_20_Text"><text:span text:style-name="T35">sx</text:span></text:span><text:span text:style-name="T16"> și </text:span><text:span text:style-name="Source_20_Text"><text:span text:style-name="T35">sy</text:span></text:span><text:span text:style-name="T16"> (+1 sau -1) în funcție de poziția punctelor.</text:span></text:p>
        </text:list-item>
        <text:list-item>
          <text:p text:style-name="P42"><text:soft-page-break/><text:span text:style-name="T16">Se inițializează </text:span><text:span text:style-name="Source_20_Text"><text:span text:style-name="T35">err = dx + dy</text:span></text:span><text:span text:style-name="T16"> (sumă de erori).</text:span></text:p>
        </text:list-item>
        <text:list-item>
          <text:p text:style-name="P42">Într-un loop:</text:p>
          <text:list>
            <text:list-item>
              <text:p text:style-name="P42">Se colorează pixelul curent.</text:p>
            </text:list-item>
            <text:list-item>
              <text:p text:style-name="P42">Se verifică dacă am ajuns la destinație.</text:p>
            </text:list-item>
            <text:list-item>
              <text:p text:style-name="P42"><text:span text:style-name="T16">Se ajustează </text:span><text:span text:style-name="Source_20_Text"><text:span text:style-name="T16">err</text:span></text:span><text:span text:style-name="T16"> și se mută </text:span><text:span text:style-name="Source_20_Text"><text:span text:style-name="T16">x</text:span></text:span><text:span text:style-name="T16"> sau </text:span><text:span text:style-name="Source_20_Text"><text:span text:style-name="T16">y</text:span></text:span><text:span text:style-name="T16"> după cum e necesar pentru a menține linia continuă.</text:span></text:p>
            </text:list-item>
          </text:list>
        </text:list-item>
      </text:list>
      <text:p text:style-name="P43"/>
      <text:p text:style-name="P44"><text:span text:style-name="Strong_20_Emphasis"><text:span text:style-name="T16">Complexitate:</text:span></text:span><text:span text:style-name="T16"> O(n) unde n este lungimea liniei în pixeli.</text:span></text:p>
      <text:list text:style-name="L6">
        <text:list-header>
          <text:p text:style-name="P45"/>
        </text:list-header>
      </text:list>
      <text:p text:style-name="P46"/>
      <text:p text:style-name="P16"/>
      <text:p text:style-name="P47"><text:span text:style-name="T36">5. </text:span><text:span text:style-name="T37">Loop-ul principal</text:span>:</text:p>
      <text:p text:style-name="P47"/>
      <text:p text:style-name="P48"><text:span text:style-name="T34">Scop:</text:span><text:span text:style-name="T38"> </text:span>Actualizarea și afișarea continuă a wireframe-ului pe ecran (~60 FPS) <text:span text:style-name="T39">si rotirea modelului + gestionarea bufferului software + texture SDL</text:span></text:p>
      <text:p text:style-name="P49"/>
      <text:list text:style-name="L7">
        <text:list-item>
          <text:p text:style-name="P50"><text:span text:style-name="Strong_20_Emphasis"><text:span text:style-name="T16">Event polling:</text:span></text:span><text:span text:style-name="T16"> verifică dacă fereastra s-a închis (</text:span><text:span text:style-name="Source_20_Text"><text:span text:style-name="T35">SDL_QUIT</text:span></text:span><text:span text:style-name="T16">).</text:span></text:p>
        </text:list-item>
        <text:list-item>
          <text:p text:style-name="P50"><text:span text:style-name="Strong_20_Emphasis"><text:span text:style-name="T16">Redimensionare fereastră:</text:span></text:span></text:p>
          <text:list>
            <text:list-item>
              <text:p text:style-name="P50"><text:span text:style-name="Strong_20_Emphasis"><text:span text:style-name="T40">Dacă dimensiunea ferestrei s-a schimbat:</text:span></text:span></text:p>
              <text:list>
                <text:list-item>
                  <text:p text:style-name="P50"><text:span text:style-name="Strong_20_Emphasis"><text:span text:style-name="T40">Se recreează textura SDL cu dimensiunea nouă.</text:span></text:span></text:p>
                </text:list-item>
                <text:list-item>
                  <text:p text:style-name="P50"><text:span text:style-name="Strong_20_Emphasis"><text:span text:style-name="T40">Se realocă buffer-ul software.</text:span></text:span></text:p>
                </text:list-item>
              </text:list>
            </text:list-item>
          </text:list>
        </text:list-item>
        <text:list-item>
          <text:p text:style-name="P51"><text:span text:style-name="Strong_20_Emphasis"><text:span text:style-name="T41">Clearing buffer: </text:span></text:span><text:span text:style-name="Strong_20_Emphasis"><text:span text:style-name="T40">Se scrie </text:span></text:span><text:span text:style-name="Strong_20_Emphasis"><text:span text:style-name="Source_20_Text"><text:span text:style-name="T40">0xFF000000</text:span></text:span></text:span><text:span text:style-name="Strong_20_Emphasis"><text:span text:style-name="T40"> (negru opac) în fiecare pixel.</text:span></text:span></text:p>
        </text:list-item>
        <text:list-item>
          <text:p text:style-name="P51"><text:span text:style-name="Strong_20_Emphasis"><text:span text:style-name="T41">Rotație + proiecție + desenare:</text:span></text:span></text:p>
          <text:list>
            <text:list-item>
              <text:p text:style-name="P51"><text:span text:style-name="Strong_20_Emphasis"><text:span text:style-name="T42">Pentru fiecare muchie:</text:span></text:span></text:p>
              <text:list>
                <text:list-item>
                  <text:p text:style-name="P51"><text:span text:style-name="Strong_20_Emphasis"><text:span text:style-name="T42">Rotează vârfurile folosind </text:span></text:span><text:span text:style-name="Strong_20_Emphasis"><text:span text:style-name="Source_20_Text"><text:span text:style-name="T43">rotate_y</text:span></text:span></text:span><text:span text:style-name="Strong_20_Emphasis"><text:span text:style-name="T42">.</text:span></text:span></text:p>
                </text:list-item>
                <text:list-item>
                  <text:p text:style-name="P51"><text:span text:style-name="Strong_20_Emphasis"><text:span text:style-name="T42">Proiectează punctele 3D → 2D folosind </text:span></text:span><text:span text:style-name="Strong_20_Emphasis"><text:span text:style-name="Source_20_Text"><text:span text:style-name="T43">project</text:span></text:span></text:span><text:span text:style-name="Strong_20_Emphasis"><text:span text:style-name="T42">.</text:span></text:span></text:p>
                </text:list-item>
                <text:list-item>
                  <text:p text:style-name="P51"><text:span text:style-name="Strong_20_Emphasis"><text:span text:style-name="T42">Desenează linia cu Bresenham în buffer.</text:span></text:span></text:p>
                </text:list-item>
              </text:list>
            </text:list-item>
          </text:list>
        </text:list-item>
        <text:list-item>
          <text:p text:style-name="P51"><text:span text:style-name="Strong_20_Emphasis"><text:span text:style-name="T41">Actualizare SDL:</text:span></text:span></text:p>
          <text:list>
            <text:list-item>
              <text:p text:style-name="P51"><text:span text:style-name="Strong_20_Emphasis"><text:span text:style-name="T42">Copiază buffer-ul software în textura SDL </text:span></text:span><text:span text:style-name="Strong_20_Emphasis"><text:span text:style-name="T41">(</text:span></text:span><text:span text:style-name="Strong_20_Emphasis"><text:span text:style-name="Source_20_Text"><text:span text:style-name="T41">SDL_UpdateTexture</text:span></text:span></text:span><text:span text:style-name="Strong_20_Emphasis"><text:span text:style-name="T41">).</text:span></text:span></text:p>
            </text:list-item>
            <text:list-item>
              <text:p text:style-name="P51"><text:span text:style-name="Strong_20_Emphasis"><text:span text:style-name="T42">Desenează textura în renderer </text:span></text:span><text:span text:style-name="Strong_20_Emphasis"><text:span text:style-name="T41">(</text:span></text:span><text:span text:style-name="Strong_20_Emphasis"><text:span text:style-name="Source_20_Text"><text:span text:style-name="T41">SDL_RenderCopy</text:span></text:span></text:span><text:span text:style-name="Strong_20_Emphasis"><text:span text:style-name="T41">).</text:span></text:span></text:p>
            </text:list-item>
            <text:list-item>
              <text:p text:style-name="P51"><text:span text:style-name="Strong_20_Emphasis"><text:span text:style-name="T42">Prezintă frame-ul</text:span></text:span><text:span text:style-name="Strong_20_Emphasis"><text:span text:style-name="T41"> (</text:span></text:span><text:span text:style-name="Strong_20_Emphasis"><text:span text:style-name="Source_20_Text"><text:span text:style-name="T41">SDL_RenderPresent</text:span></text:span></text:span><text:span text:style-name="Strong_20_Emphasis"><text:span text:style-name="T41">).</text:span></text:span></text:p>
            </text:list-item>
          </text:list>
        </text:list-item>
        <text:list-item>
          <text:p text:style-name="P51"><text:span text:style-name="Strong_20_Emphasis"><text:span text:style-name="T41">Increment unghi: </text:span></text:span><text:span text:style-name="Strong_20_Emphasis"><text:span text:style-name="T42">pentru animație continuă.</text:span></text:span></text:p>
        </text:list-item>
        <text:list-item>
          <text:p text:style-name="P51"><text:span text:style-name="Strong_20_Emphasis"><text:span text:style-name="T41">Delay:</text:span></text:span><text:span text:style-name="Strong_20_Emphasis"><text:span text:style-name="T42"> pauză ~16ms (~60 FPS).</text:span></text:span></text:p>
        </text:list-item>
      </text:list>
      <text:p text:style-name="P52"/>
      <text:p text:style-name="P53">Observatie: Calculele grafice sunt realizate de catre software, SDL doar afiseaza buffer-ul pe ecran</text:p>
      <text:p text:style-name="P52"/>
      <text:p text:style-name="P52"/>
      <text:p text:style-name="P49">Vitis foloseste limbajul C pentru implementarea codului, aceasta suportand librariile <text:span text:style-name="T2">stdlib.h</text:span> (alocare memorie), <text:span text:style-name="T2">math.h</text:span> (functii matematice) si <text:span text:style-name="T2">stdio.h</text:span> (citire fisiere).</text:p>
      <text:p text:style-name="P54">Echivalentul codului in C simplu foloseste libraria SDL pentru a gestiona fereastra si bufferul grafic (mai precis <text:span text:style-name="T2">SDL_RenderClear</text:span>, <text:span text:style-name="T2">SDL_RenderPresent</text:span> si <text:span text:style-name="T2">SDL_GetWindowSize</text:span>), insa <text:span text:style-name="T44">in absenta acestuia in Vitis, </text:span>va trebui sa afisam manual pe un monitor prin HDMI modelul 3D:</text:p>
      <text:p text:style-name="P54"/>
      <text:p text:style-name="P54"/>
      <text:h text:style-name="P55" text:outline-level="1"><text:span text:style-name="T45">1. </text:span><text:span text:style-name="Strong_20_Emphasis"><text:span text:style-name="T45">Video Timing Generator (VTG):</text:span></text:span></text:h>
      <text:h text:style-name="P56" text:outline-level="2"><text:span text:style-name="T46">Scop:</text:span><text:span text:style-name="T47"> </text:span><text:span text:style-name="T47">Să genereze </text:span><text:span text:style-name="Strong_20_Emphasis"><text:span text:style-name="T47">sincronizările HDMI</text:span></text:span><text:span text:style-name="T47">:</text:span></text:h>
      <text:list text:style-name="L8">
        <text:list-item>
          <text:p text:style-name="P57">HSYNC</text:p>
        </text:list-item>
        <text:list-item>
          <text:p text:style-name="P57">VSYNC</text:p>
        </text:list-item>
        <text:list-item>
          <text:p text:style-name="P57">DE (Data Enable)</text:p>
        </text:list-item>
        <text:list-item>
          <text:p text:style-name="P58">Pixel Clock</text:p>
        </text:list-item>
      </text:list>
      <text:p text:style-name="P59"><text:soft-page-break/><text:span text:style-name="T48">Fara acestea, </text:span>monitorul rămâne albastru/negru.</text:p>
      <text:p text:style-name="P60"><text:span text:style-name="T16">Un VTG este un </text:span><text:span text:style-name="Strong_20_Emphasis"><text:span text:style-name="T16">automat finit</text:span></text:span><text:span text:style-name="T16"> bazat pe contoare:</text:span></text:p>
      <text:list text:style-name="L9">
        <text:list-item>
          <text:p text:style-name="P61"><text:span text:style-name="Source_20_Text"><text:span text:style-name="T16">h_counter</text:span></text:span><text:span text:style-name="T16"> → poziția pixelului pe linie</text:span></text:p>
        </text:list-item>
        <text:list-item>
          <text:p text:style-name="P62"><text:span text:style-name="Source_20_Text"><text:span text:style-name="T16">v_counter</text:span></text:span><text:span text:style-name="T16"> → linia curentă</text:span></text:p>
        </text:list-item>
      </text:list>
      <text:h text:style-name="P63" text:outline-level="3">Parametri (ex. 800x600@60Hz)</text:h>
      <text:list text:style-name="L10">
        <text:list-item>
          <text:p text:style-name="P64">Horizontal:</text:p>
          <text:list>
            <text:list-item>
              <text:p text:style-name="P64">active pixels</text:p>
            </text:list-item>
            <text:list-item>
              <text:p text:style-name="P64">front porch</text:p>
            </text:list-item>
            <text:list-item>
              <text:p text:style-name="P64">sync pulse</text:p>
            </text:list-item>
            <text:list-item>
              <text:p text:style-name="P64">back porch</text:p>
            </text:list-item>
          </text:list>
        </text:list-item>
        <text:list-item>
          <text:p text:style-name="P64">Vertical:</text:p>
          <text:list>
            <text:list-item>
              <text:p text:style-name="P64">active lines</text:p>
            </text:list-item>
            <text:list-item>
              <text:p text:style-name="P64">front porch</text:p>
            </text:list-item>
            <text:list-item>
              <text:p text:style-name="P64">sync pulse</text:p>
            </text:list-item>
            <text:list-item>
              <text:p text:style-name="P64">back porch</text:p>
            </text:list-item>
          </text:list>
        </text:list-item>
      </text:list>
      <text:h text:style-name="P63" text:outline-level="3"><text:span text:style-name="T2">Algoritm</text:span> (conceptual)</text:h>
      <text:p text:style-name="P65"><text:span text:style-name="Source_20_Text"><text:span text:style-name="T49">la fiecare pixel_clock:</text:span></text:span></text:p>
      <text:p text:style-name="P66"><text:span text:style-name="Source_20_Text"><text:span text:style-name="T49"><text:s text:c="4"/>h_counter++</text:span></text:span></text:p>
      <text:p text:style-name="P66"><text:span text:style-name="Source_20_Text"><text:span text:style-name="T49"><text:s text:c="4"/>dacă h_counter == H_TOTAL:</text:span></text:span></text:p>
      <text:p text:style-name="P66"><text:span text:style-name="Source_20_Text"><text:span text:style-name="T49"><text:s text:c="8"/>h_counter = 0</text:span></text:span></text:p>
      <text:p text:style-name="P66"><text:span text:style-name="Source_20_Text"><text:span text:style-name="T49"><text:s text:c="8"/>v_counter++</text:span></text:span></text:p>
      <text:p text:style-name="P66"><text:span text:style-name="Source_20_Text"><text:span text:style-name="T49"><text:s text:c="4"/>dacă v_counter == V_TOTAL:</text:span></text:span></text:p>
      <text:p text:style-name="P67"><text:span text:style-name="Source_20_Text"><text:span text:style-name="T49"><text:s text:c="8"/>v_counter = 0</text:span></text:span></text:p>
      <text:h text:style-name="P63" text:outline-level="3">Semnale generate:</text:h>
      <text:p text:style-name="P68"><text:span text:style-name="Source_20_Text"><text:span text:style-name="T16">HSYNC = (h_counter în zona de sync)</text:span></text:span></text:p>
      <text:p text:style-name="P69"><text:span text:style-name="Source_20_Text"><text:span text:style-name="T16">VSYNC = (v_counter în zona de sync)</text:span></text:span></text:p>
      <text:p text:style-name="P70"><text:span text:style-name="Source_20_Text"><text:span text:style-name="T50">DE <text:s text:c="3"/>= (h_counter &lt; H_ACTIVE &amp;&amp; v_counter &lt; V_ACTIVE)</text:span></text:span></text:p>
      <text:p text:style-name="P70"><text:span text:style-name="Source_20_Text"><text:span text:style-name="T50"/></text:span></text:p>
      <text:p text:style-name="P70"><text:span text:style-name="Source_20_Text"><text:span text:style-name="T50"/></text:span></text:p>
      <text:p text:style-name="P70"><text:span text:style-name="T45">2. Algoritmul de </text:span><text:span text:style-name="Strong_20_Emphasis"><text:span text:style-name="T45">scan-out framebuffer:</text:span></text:span></text:p>
      <text:p text:style-name="P70"><text:span text:style-name="Strong_20_Emphasis"><text:span text:style-name="T51"/></text:span></text:p>
      <text:h text:style-name="P71" text:outline-level="2"><text:span text:style-name="T46">Scop:</text:span><text:span text:style-name="T52"> </text:span><text:span text:style-name="T47">Citirea pixelilor din RAM EXACT în ordinea cerută de HDMI.</text:span></text:h>
      <text:h text:style-name="P72" text:outline-level="2">Principiu: HDMI NU știe ce e „linie Bresenham”. El cere: „Dă-mi pixelul (x,y) ACUM”</text:h>
      <text:h text:style-name="P73" text:outline-level="2">Algoritm:</text:h>
      <text:p text:style-name="P65"><text:span text:style-name="Source_20_Text"><text:span text:style-name="T49">dacă DE == 1:</text:span></text:span></text:p>
      <text:p text:style-name="P66"><text:span text:style-name="Source_20_Text"><text:span text:style-name="T49"><text:s text:c="4"/>address = y * WIDTH + x</text:span></text:span></text:p>
      <text:p text:style-name="P66"><text:span text:style-name="Source_20_Text"><text:span text:style-name="T49"><text:s text:c="4"/>pixel = framebuffer[address]</text:span></text:span></text:p>
      <text:p text:style-name="P66"><text:span text:style-name="Source_20_Text"><text:span text:style-name="T49">altfel:</text:span></text:span></text:p>
      <text:p text:style-name="P67"><text:span text:style-name="Source_20_Text"><text:span text:style-name="T49"><text:s text:c="4"/>pixel = 0 (negru)</text:span></text:span></text:p>
      <text:p text:style-name="P59">Unde:</text:p>
      <text:list text:style-name="L11">
        <text:list-item>
          <text:p text:style-name="P74"><text:span text:style-name="Source_20_Text"><text:span text:style-name="T16">x = h_counter</text:span></text:span></text:p>
        </text:list-item>
        <text:list-item>
          <text:p text:style-name="P75"><text:soft-page-break/><text:span text:style-name="Source_20_Text"><text:span text:style-name="T16">y = v_counter</text:span></text:span></text:p>
        </text:list-item>
      </text:list>
      <text:p text:style-name="P76"><text:span text:style-name="Source_20_Text"><text:span text:style-name="T16"/></text:span></text:p>
      <text:p text:style-name="P76"><text:span text:style-name="T22">3. Algoritmul DMA (când framebufferul e în DDR):</text:span></text:p>
      <text:h text:style-name="P56" text:outline-level="2"><text:span text:style-name="T46">Scop:</text:span><text:span text:style-name="T52"> </text:span><text:span text:style-name="T47">Să muți datele rapid din DDR → logică video.</text:span></text:h>
      <text:p text:style-name="P59">În Vitis:</text:p>
      <text:list text:style-name="L12">
        <text:list-item>
          <text:p text:style-name="P77">AXI VDMA</text:p>
        </text:list-item>
        <text:list-item>
          <text:p text:style-name="P77">AXI Stream</text:p>
        </text:list-item>
      </text:list>
      <text:h text:style-name="P73" text:outline-level="2">Flux:</text:h>
      <text:p text:style-name="P65"><text:span text:style-name="Source_20_Text"><text:span text:style-name="T49">DDR framebuffer</text:span></text:span></text:p>
      <text:p text:style-name="P66"><text:span text:style-name="Source_20_Text"><text:span text:style-name="T49"><text:s text:c="3"/>↓ (DMA burst)</text:span></text:span></text:p>
      <text:p text:style-name="P66"><text:span text:style-name="Source_20_Text"><text:span text:style-name="T49">Line Buffer</text:span></text:span></text:p>
      <text:p text:style-name="P66"><text:span text:style-name="Source_20_Text"><text:span text:style-name="T49"><text:s text:c="3"/>↓</text:span></text:span></text:p>
      <text:p text:style-name="P67"><text:span text:style-name="Source_20_Text"><text:span text:style-name="T49">HDMI pixel stream</text:span></text:span></text:p>
      <text:h text:style-name="P63" text:outline-level="3">Algoritm DMA</text:h>
      <text:list text:style-name="L13">
        <text:list-item>
          <text:p text:style-name="P78">Inițializează adresa de start framebuffer</text:p>
        </text:list-item>
        <text:list-item>
          <text:p text:style-name="P78">Pentru fiecare linie:</text:p>
          <text:list>
            <text:list-item>
              <text:p text:style-name="P78">citește WIDTH pixeli</text:p>
            </text:list-item>
            <text:list-item>
              <text:p text:style-name="P78">livrează la pixel clock</text:p>
            </text:list-item>
          </text:list>
        </text:list-item>
        <text:list-item>
          <text:p text:style-name="P78">Repetă pentru fiecare frame</text:p>
        </text:list-item>
      </text:list>
      <text:p text:style-name="P59"><text:span text:style-name="Strong_20_Emphasis"><text:span text:style-name="T16">DMA rulează independent de CPU. </text:span></text:span><text:span text:style-name="T16">CPU doar schimbă pointerul de framebuffer (double buffering).</text:span></text:p>
      <text:h text:style-name="P79" text:outline-level="1"><text:span text:style-name="T45">4. Algoritmul de </text:span><text:span text:style-name="Strong_20_Emphasis"><text:span text:style-name="T45">double buffering</text:span></text:span><text:span text:style-name="T45"> (esențial)</text:span></text:h>
      <text:h text:style-name="P56" text:outline-level="2"><text:span text:style-name="T53">Scop:</text:span><text:span text:style-name="T52"> </text:span><text:span text:style-name="T54">Evitarea fenomrnului de </text:span><text:span text:style-name="T55">tearing</text:span><text:span text:style-name="T47"> (jumătate cadru vechi, jumătate nou).</text:span></text:h>
      <text:h text:style-name="P73" text:outline-level="2">Structură</text:h>
      <text:p text:style-name="P68"><text:span text:style-name="Source_20_Text"><text:span text:style-name="T16">FB0 ← se afișează</text:span></text:span></text:p>
      <text:p text:style-name="P80"><text:span text:style-name="Source_20_Text"><text:span text:style-name="T16">FB1 ← CPU desenează (Bresenham, etc)</text:span></text:span></text:p>
      <text:h text:style-name="P81" text:outline-level="2">Algoritm:</text:h>
      <text:p text:style-name="P65"><text:span text:style-name="Source_20_Text"><text:span text:style-name="T49">la VSYNC:</text:span></text:span></text:p>
      <text:p text:style-name="P67"><text:span text:style-name="Source_20_Text"><text:span text:style-name="T49"><text:s text:c="4"/>swap(FB0, FB1)</text:span></text:span></text:p>
      <text:p text:style-name="P67"><text:span text:style-name="Source_20_Text"><text:span text:style-name="T49"/></text:span></text:p>
      <text:p text:style-name="P67"><text:span text:style-name="Source_20_Text"><text:span text:style-name="T49"/></text:span></text:p>
      <text:p text:style-name="P67"><text:span text:style-name="Source_20_Text"><text:span text:style-name="T49"/></text:span></text:p>
      <text:p text:style-name="P59"><text:soft-page-break/>CPU:</text:p>
      <text:list text:style-name="L14">
        <text:list-item>
          <text:p text:style-name="P82">scrie în bufferul invizibil<text:line-break/>Video:</text:p>
        </text:list-item>
        <text:list-item>
          <text:p text:style-name="P82">citește din bufferul activ</text:p>
        </text:list-item>
      </text:list>
      <text:p text:style-name="P59"><text:span text:style-name="Strong_20_Emphasis"><text:span text:style-name="T16">E</text:span></text:span><text:span text:style-name="Strong_20_Emphasis"><text:span text:style-name="T56">chivalentul lui</text:span></text:span><text:span text:style-name="Strong_20_Emphasis"><text:span text:style-name="T16"> SDL_RenderPresent(), dar în hardware</text:span></text:span></text:p>
      <text:h text:style-name="P83" text:outline-level="1"><text:span text:style-name="T57">5</text:span>. Algoritmul HDMI TMDS Encoding</text:h>
      <text:p text:style-name="P59">Asta <text:span text:style-name="T57">nu se face</text:span> manual.</text:p>
      <text:p text:style-name="P59">TMDS:</text:p>
      <text:list text:style-name="L15">
        <text:list-item>
          <text:p text:style-name="P84">8-bit → 10-bit encoding</text:p>
        </text:list-item>
        <text:list-item>
          <text:p text:style-name="P84">minimizare tranziții</text:p>
        </text:list-item>
        <text:list-item>
          <text:p text:style-name="P84">DC balancing</text:p>
        </text:list-item>
      </text:list>
      <text:p text:style-name="P59">În Vitis:</text:p>
      <text:list text:style-name="L16">
        <text:list-item>
          <text:p text:style-name="P85"><text:span text:style-name="Strong_20_Emphasis"><text:span text:style-name="T16">HDMI TX Subsystem</text:span></text:span></text:p>
        </text:list-item>
        <text:list-item>
          <text:p text:style-name="P85">sau IP dedicat</text:p>
        </text:list-item>
      </text:list>
      <text:p text:style-name="P59"><text:span text:style-name="T58">Proiectul</text:span><text:span text:style-name="T16"> livre</text:span><text:span text:style-name="T58">aza</text:span><text:span text:style-name="T16"> doar </text:span><text:span text:style-name="Strong_20_Emphasis"><text:span text:style-name="T16">pixeli + sync</text:span></text:span><text:span text:style-name="T16">, IP-ul face encoding-ul.</text:span></text:p>
      <text:p text:style-name="P54"/>
      <text:p text:style-name="P86">Echivalente SDL vs hardware:</text:p>
      <text:p text:style-name="P5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7">SDL</text:p>
            </table:table-cell>
            <table:table-cell table:style-name="Table1.A1" office:value-type="string">
              <text:p text:style-name="P87">HDMI hardware</text:p>
            </table:table-cell>
          </table:table-row>
        </table:table-header-rows>
        <table:table-row>
          <table:table-cell table:style-name="Table1.A1" office:value-type="string">
            <text:p text:style-name="P88">SDL_Window</text:p>
          </table:table-cell>
          <table:table-cell table:style-name="Table1.A1" office:value-type="string">
            <text:p text:style-name="P88">Video Timing Generator</text:p>
          </table:table-cell>
        </table:table-row>
        <table:table-row>
          <table:table-cell table:style-name="Table1.A1" office:value-type="string">
            <text:p text:style-name="P88">SDL_Texture</text:p>
          </table:table-cell>
          <table:table-cell table:style-name="Table1.A1" office:value-type="string">
            <text:p text:style-name="P88">Framebuffer DDR</text:p>
          </table:table-cell>
        </table:table-row>
        <table:table-row>
          <table:table-cell table:style-name="Table1.A1" office:value-type="string">
            <text:p text:style-name="P88">SDL_UpdateTexture</text:p>
          </table:table-cell>
          <table:table-cell table:style-name="Table1.A1" office:value-type="string">
            <text:p text:style-name="P88">DMA</text:p>
          </table:table-cell>
        </table:table-row>
        <table:table-row>
          <table:table-cell table:style-name="Table1.A1" office:value-type="string">
            <text:p text:style-name="P88">SDL_RenderCopy</text:p>
          </table:table-cell>
          <table:table-cell table:style-name="Table1.A1" office:value-type="string">
            <text:p text:style-name="P88">Scan-out</text:p>
          </table:table-cell>
        </table:table-row>
        <table:table-row>
          <table:table-cell table:style-name="Table1.A1" office:value-type="string">
            <text:p text:style-name="P88">SDL_RenderPresent</text:p>
          </table:table-cell>
          <table:table-cell table:style-name="Table1.A1" office:value-type="string">
            <text:p text:style-name="P88">VSYNC swap</text:p>
          </table:table-cell>
        </table:table-row>
      </table:table>
      <text:p text:style-name="P54"/>
      <text:h text:style-name="P89" text:outline-level="1">Lista FINALĂ de <text:span text:style-name="T59">algoritmi pentru echivalentul proiectului in hardware:</text:span></text:h>
      <text:h text:style-name="P63" text:outline-level="3">Algoritmi <text:span text:style-name="T2">VIDEO</text:span>:</text:h>
      <text:list text:style-name="L17">
        <text:list-item>
          <text:p text:style-name="P90">Video Timing Generator (HSYNC / VSYNC)</text:p>
        </text:list-item>
        <text:list-item>
          <text:p text:style-name="P90">Pixel Scan-out (x,y → framebuffer)</text:p>
        </text:list-item>
        <text:list-item>
          <text:p text:style-name="P90">DMA Burst Reader</text:p>
        </text:list-item>
        <text:list-item>
          <text:p text:style-name="P90">Double Buffering</text:p>
        </text:list-item>
        <text:list-item>
          <text:p text:style-name="P90">TMDS Encoding</text:p>
        </text:list-item>
      </text:list>
      <text:h text:style-name="P63" text:outline-level="3">Algoritmi <text:span text:style-name="T2">GRAFICI</text:span>:</text:h>
      <text:list text:style-name="L18">
        <text:list-item>
          <text:p text:style-name="P91">Parsarea fisierului OBJ</text:p>
        </text:list-item>
        <text:list-item>
          <text:p text:style-name="P92">Rotație 3D</text:p>
        </text:list-item>
        <text:list-item>
          <text:p text:style-name="P93">Proiecție 3D → 2D</text:p>
        </text:list-item>
        <text:list-item>
          <text:p text:style-name="P92"><text:soft-page-break/>Bresenham (linie)</text:p>
        </text:list-item>
        <text:list-item>
          <text:p text:style-name="P93">Clear framebuffer</text:p>
        </text:list-item>
        <text:list-item>
          <text:p text:style-name="P94">Scriere in framebuffer</text:p>
        </text:list-item>
      </text:list>
      <text:p text:style-name="P54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8:29:25.706341878</meta:creation-date>
    <dc:date>2026-01-06T17:45:45.451171926</dc:date>
    <meta:editing-duration>PT1H44M43S</meta:editing-duration>
    <meta:editing-cycles>63</meta:editing-cycles>
    <meta:generator>LibreOffice/25.8.4.2$Linux_X86_64 LibreOffice_project/290daaa01b999472f0c7a3890eb6a550fd74c6df</meta:generator>
    <meta:document-statistic meta:table-count="1" meta:image-count="0" meta:object-count="1" meta:page-count="7" meta:paragraph-count="203" meta:word-count="1257" meta:character-count="7628" meta:non-whitespace-character-count="6539"/>
  </office:meta>
</office:document-meta>
</file>

<file path=Object 1/content.xml><?xml version="1.0" encoding="utf-8"?>
<math xmlns="http://www.w3.org/1998/Math/MathML" display="block">
  <semantics>
    <mrow>
      <mi mathvariant="italic">factor</mi>
      <mo stretchy="false">=</mo>
      <mfrac>
        <mi mathvariant="italic">scale</mi>
        <mrow>
          <mi>z</mi>
          <mo stretchy="false">+</mo>
          <msub>
            <mi>z</mi>
            <mi mathvariant="italic">camera</mi>
          </msub>
        </mrow>
      </mfrac>
    </mrow>
    <annotation encoding="StarMath 5.0">factor = {scale} over {z + z_camera } </annotation>
  </semantics>
</math>
</file>