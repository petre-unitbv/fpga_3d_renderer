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2in" style:rel-column-width="16373*"/>
    </style:style>
    <style:style style:name="Table1.B" style:family="table-column">
      <style:table-column-properties style:column-width="1.6736in" style:rel-column-width="16387*"/>
    </style:style>
    <style:style style:name="Table1.C" style:family="table-column">
      <style:table-column-properties style:column-width="1.4375in" style:rel-column-width="14075*"/>
    </style:style>
    <style:style style:name="Table1.D" style:family="table-column">
      <style:table-column-properties style:column-width="1.9097in" style:rel-column-width="1870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75in" style:rel-column-width="1926*"/>
    </style:style>
    <style:style style:name="Table4.B" style:family="table-column">
      <style:table-column-properties style:column-width="1.3389in" style:rel-column-width="1928*"/>
    </style:style>
    <style:style style:name="Table4.C" style:family="table-column">
      <style:table-column-properties style:column-width="2.0722in" style:rel-column-width="2984*"/>
    </style:style>
    <style:style style:name="Table4.D" style:family="table-column">
      <style:table-column-properties style:column-width="1.0674in" style:rel-column-width="1537*"/>
    </style:style>
    <style:style style:name="Table4.E" style:family="table-column">
      <style:table-column-properties style:column-width="0.8771in" style:rel-column-width="126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2in" style:rel-column-width="16373*"/>
    </style:style>
    <style:style style:name="Table2.B" style:family="table-column">
      <style:table-column-properties style:column-width="1.6736in" style:rel-column-width="16387*"/>
    </style:style>
    <style:style style:name="Table2.C" style:family="table-column">
      <style:table-column-properties style:column-width="1.3764in" style:rel-column-width="13476*"/>
    </style:style>
    <style:style style:name="Table2.D" style:family="table-column">
      <style:table-column-properties style:column-width="1.9708in" style:rel-column-width="1929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632in" style:rel-column-width="11389*"/>
    </style:style>
    <style:style style:name="Table5.B" style:family="table-column">
      <style:table-column-properties style:column-width="1.1806in" style:rel-column-width="11559*"/>
    </style:style>
    <style:style style:name="Table5.C" style:family="table-column">
      <style:table-column-properties style:column-width="2.2569in" style:rel-column-width="22098*"/>
    </style:style>
    <style:style style:name="Table5.D" style:family="table-column">
      <style:table-column-properties style:column-width="1.1201in" style:rel-column-width="10967*"/>
    </style:style>
    <style:style style:name="Table5.E" style:family="table-column">
      <style:table-column-properties style:column-width="0.9722in" style:rel-column-width="9522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2in" style:rel-column-width="16373*"/>
    </style:style>
    <style:style style:name="Table3.B" style:family="table-column">
      <style:table-column-properties style:column-width="1.6736in" style:rel-column-width="16387*"/>
    </style:style>
    <style:style style:name="Table3.C" style:family="table-column">
      <style:table-column-properties style:column-width="1.316in" style:rel-column-width="12885*"/>
    </style:style>
    <style:style style:name="Table3.D" style:family="table-column">
      <style:table-column-properties style:column-width="2.0313in" style:rel-column-width="1989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1632in" style:rel-column-width="11389*"/>
    </style:style>
    <style:style style:name="Table6.B" style:family="table-column">
      <style:table-column-properties style:column-width="1.1806in" style:rel-column-width="11559*"/>
    </style:style>
    <style:style style:name="Table6.C" style:family="table-column">
      <style:table-column-properties style:column-width="2.2569in" style:rel-column-width="22098*"/>
    </style:style>
    <style:style style:name="Table6.D" style:family="table-column">
      <style:table-column-properties style:column-width="1.1201in" style:rel-column-width="10967*"/>
    </style:style>
    <style:style style:name="Table6.E" style:family="table-column">
      <style:table-column-properties style:column-width="0.9722in" style:rel-column-width="9522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T Sans" fo:font-size="20pt" fo:font-weight="bold" officeooo:rsid="0012b4bc" officeooo:paragraph-rsid="0012b4bc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UT Sans" officeooo:rsid="0012b4bc" officeooo:paragraph-rsid="0012b4bc"/>
    </style:style>
    <style:style style:name="P3" style:family="paragraph" style:parent-style-name="Standard">
      <style:text-properties style:font-name="UT Sans" fo:font-size="16pt" fo:font-weight="bold" officeooo:rsid="0012b4bc" officeooo:paragraph-rsid="00711662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UT Sans" fo:font-size="12pt" fo:font-style="normal" fo:font-weight="normal" officeooo:rsid="00711662" officeooo:paragraph-rsid="00711662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text-properties style:font-name="UT Sans" fo:font-size="12pt" fo:font-style="normal" fo:font-weight="normal" officeooo:rsid="00711662" officeooo:paragraph-rsid="0071166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T Sans" fo:font-size="12pt" fo:font-style="normal" fo:font-weight="normal" officeooo:rsid="005f81e2" officeooo:paragraph-rsid="0071166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officeooo:paragraph-rsid="00716e2c"/>
    </style:style>
    <style:style style:name="P8" style:family="paragraph" style:parent-style-name="Standard" style:list-style-name="L2">
      <style:text-properties style:font-name="UT Sans" fo:font-size="12pt" fo:font-style="normal" fo:font-weight="normal" officeooo:rsid="00716e2c" officeooo:paragraph-rsid="00716e2c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text-properties style:font-name="UT Sans" fo:font-size="12pt" fo:font-style="normal" fo:font-weight="normal" officeooo:rsid="00716e2c" officeooo:paragraph-rsid="0075600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UT Sans" fo:font-size="12pt" fo:font-style="normal" fo:font-weight="normal" officeooo:rsid="00720f41" officeooo:paragraph-rsid="0071166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text-properties style:font-name="UT Sans" fo:font-size="12pt" fo:font-weight="normal" officeooo:rsid="00140254" officeooo:paragraph-rsid="00711662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font-name="UT Sans" fo:font-size="12pt" fo:font-weight="normal" officeooo:rsid="00156196" officeooo:paragraph-rsid="00711662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UT Sans" fo:font-size="12pt" fo:font-style="normal" fo:font-weight="normal" officeooo:rsid="005f81e2" officeooo:paragraph-rsid="00feb37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UT Sans" fo:font-size="12pt" fo:font-style="normal" fo:font-weight="normal" officeooo:rsid="00c7120f" officeooo:paragraph-rsid="00c7120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">
      <style:text-properties style:font-name="UT Sans" fo:font-size="12pt" fo:font-style="normal" fo:font-weight="bold" officeooo:rsid="00c7120f" officeooo:paragraph-rsid="00c7120f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font-name="UT Sans" fo:font-size="12pt" fo:font-style="normal" fo:font-weight="bold" officeooo:rsid="00c96d61" officeooo:paragraph-rsid="00c96d61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UT Sans" fo:font-size="12pt" fo:font-weight="normal" officeooo:rsid="001fb7dc" officeooo:paragraph-rsid="00711662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UT Sans" fo:font-size="12pt" fo:font-weight="normal" officeooo:rsid="0020bed9" officeooo:paragraph-rsid="00711662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UT Sans" fo:font-size="12pt" fo:font-weight="normal" officeooo:rsid="0020bed9" officeooo:paragraph-rsid="00711662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UT Sans" fo:font-size="12pt" fo:font-weight="normal" officeooo:rsid="00c041fb" officeooo:paragraph-rsid="00c041f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UT Sans" fo:font-size="16pt" fo:font-weight="bold" officeooo:rsid="0012b4bc" officeooo:paragraph-rsid="0012b4bc" style:font-size-asian="16pt" style:font-weight-asian="bold" style:font-size-complex="16pt" style:font-weight-complex="bold"/>
    </style:style>
    <style:style style:name="P22" style:family="paragraph" style:parent-style-name="Standard">
      <style:text-properties style:font-name="UT Sans" fo:font-size="15pt" fo:font-weight="bold" officeooo:rsid="0012b4bc" officeooo:paragraph-rsid="0012b4bc" style:font-size-asian="15pt" style:font-weight-asian="bold" style:font-size-complex="15pt" style:font-weight-complex="bold"/>
    </style:style>
    <style:style style:name="P23" style:family="paragraph" style:parent-style-name="Standard">
      <style:text-properties style:font-name="UT Sans" fo:font-size="14pt" style:text-underline-style="solid" style:text-underline-width="auto" style:text-underline-color="font-color" fo:font-weight="bold" officeooo:rsid="0012b4bc" officeooo:paragraph-rsid="0012b4bc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UT Sans" fo:font-size="13pt" fo:font-weight="bold" officeooo:rsid="0012b4bc" officeooo:paragraph-rsid="0012b4bc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officeooo:paragraph-rsid="0012b4bc"/>
    </style:style>
    <style:style style:name="P26" style:family="paragraph" style:parent-style-name="Table_20_Contents">
      <style:text-properties style:font-name="UT Sans" fo:font-size="13pt" fo:font-weight="bold" officeooo:rsid="0061142c" officeooo:paragraph-rsid="0061142c" style:font-size-asian="11.3500003814697pt" style:font-weight-asian="bold" style:font-size-complex="13pt" style:font-weight-complex="bold"/>
    </style:style>
    <style:style style:name="P27" style:family="paragraph" style:parent-style-name="Table_20_Contents">
      <style:text-properties style:font-name="UT Sans" fo:font-size="13pt" officeooo:rsid="0061142c" officeooo:paragraph-rsid="0061142c" style:font-size-asian="11.3500003814697pt" style:font-size-complex="13pt"/>
    </style:style>
    <style:style style:name="P28" style:family="paragraph" style:parent-style-name="Table_20_Contents">
      <style:text-properties style:font-name="UT Sans" fo:font-size="13pt" officeooo:rsid="0064757b" officeooo:paragraph-rsid="0064757b" style:font-size-asian="11.3500003814697pt" style:font-size-complex="13pt"/>
    </style:style>
    <style:style style:name="P29" style:family="paragraph" style:parent-style-name="Table_20_Contents">
      <style:text-properties style:font-name="UT Sans" fo:font-size="13pt" officeooo:rsid="0064d5f2" officeooo:paragraph-rsid="0064d5f2" style:font-size-asian="11.3500003814697pt" style:font-size-complex="13pt"/>
    </style:style>
    <style:style style:name="P30" style:family="paragraph" style:parent-style-name="Table_20_Contents">
      <style:text-properties style:font-name="UT Sans" fo:font-size="13pt" officeooo:rsid="00651505" officeooo:paragraph-rsid="00651505" style:font-size-asian="11.3500003814697pt" style:font-size-complex="13pt"/>
    </style:style>
    <style:style style:name="P31" style:family="paragraph" style:parent-style-name="Table_20_Contents">
      <style:text-properties style:font-name="UT Sans" fo:font-size="13pt" officeooo:rsid="00c27e33" officeooo:paragraph-rsid="00c27e33" style:font-size-asian="11.3500003814697pt" style:font-size-complex="13pt"/>
    </style:style>
    <style:style style:name="P32" style:family="paragraph" style:parent-style-name="Table_20_Contents">
      <style:text-properties style:font-name="UT Sans" fo:font-size="13pt" officeooo:rsid="0062528d" officeooo:paragraph-rsid="0062528d" style:font-size-asian="11.3500003814697pt" style:font-size-complex="13pt"/>
    </style:style>
    <style:style style:name="P33" style:family="paragraph" style:parent-style-name="Table_20_Contents">
      <style:text-properties style:font-name="UT Sans" fo:font-size="13pt" officeooo:rsid="0066f110" officeooo:paragraph-rsid="0066f110" style:font-size-asian="11.3500003814697pt" style:font-size-complex="13pt"/>
    </style:style>
    <style:style style:name="P34" style:family="paragraph" style:parent-style-name="Standard">
      <style:text-properties style:font-name="UT Sans" fo:font-size="12pt" fo:font-style="normal" fo:font-weight="normal" officeooo:rsid="001db855" officeooo:paragraph-rsid="0012b4b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T Sans" fo:font-size="12pt" fo:font-weight="normal" officeooo:rsid="0020bed9" officeooo:paragraph-rsid="005f81e2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UT Sans" fo:font-size="12pt" fo:font-weight="normal" officeooo:rsid="002966f8" officeooo:paragraph-rsid="002966f8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UT Sans" fo:font-size="12pt" fo:font-style="italic" fo:font-weight="normal" officeooo:rsid="0020bed9" officeooo:paragraph-rsid="0020bed9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style:font-name="UT Sans" fo:font-size="12pt" fo:font-weight="normal" officeooo:rsid="0020bed9" officeooo:paragraph-rsid="0020bed9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UT Sans" fo:font-size="12pt" fo:font-style="italic" fo:font-weight="normal" officeooo:rsid="002187e6" officeooo:paragraph-rsid="002187e6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style:font-name="UT Sans" fo:font-size="12pt" fo:font-weight="normal" officeooo:rsid="002187e6" officeooo:paragraph-rsid="002187e6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UT Sans" fo:font-size="12pt" officeooo:rsid="002187e6" officeooo:paragraph-rsid="002187e6" style:font-size-asian="10.5pt" style:font-size-complex="12pt"/>
    </style:style>
    <style:style style:name="P42" style:family="paragraph" style:parent-style-name="Standard">
      <style:text-properties style:font-name="UT Sans" fo:font-size="12pt" fo:font-weight="normal" officeooo:rsid="0027f2ed" officeooo:paragraph-rsid="003dcbf6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style:font-name="UT Sans" fo:font-weight="bold" officeooo:paragraph-rsid="003dcbf6" style:font-weight-asian="bold" style:font-weight-complex="bold"/>
    </style:style>
    <style:style style:name="P44" style:family="paragraph" style:parent-style-name="Text_20_body">
      <style:text-properties style:font-name="UT Sans" fo:font-weight="bold" officeooo:rsid="00dfb9e3" officeooo:paragraph-rsid="00e2c979" style:font-weight-asian="bold" style:font-weight-complex="bold"/>
    </style:style>
    <style:style style:name="P45" style:family="paragraph" style:parent-style-name="Text_20_body">
      <style:text-properties style:font-name="UT Sans" fo:font-style="italic" fo:font-weight="normal" officeooo:rsid="00e2c979" officeooo:paragraph-rsid="00e2c979" style:font-style-asian="italic" style:font-weight-asian="normal" style:font-style-complex="italic" style:font-weight-complex="normal"/>
    </style:style>
    <style:style style:name="P46" style:family="paragraph" style:parent-style-name="Text_20_body">
      <style:text-properties style:font-name="UT Sans" fo:font-weight="bold" officeooo:rsid="00dfb9e3" officeooo:paragraph-rsid="00e3b806" style:font-weight-asian="bold" style:font-weight-complex="bold"/>
    </style:style>
    <style:style style:name="P47" style:family="paragraph" style:parent-style-name="Text_20_body">
      <style:text-properties style:font-name="UT Sans" fo:font-style="italic" fo:font-weight="normal" officeooo:rsid="00e3b806" officeooo:paragraph-rsid="00e3b806" style:font-style-asian="italic" style:font-weight-asian="normal" style:font-style-complex="italic" style:font-weight-complex="normal"/>
    </style:style>
    <style:style style:name="P48" style:family="paragraph" style:parent-style-name="Standard" style:list-style-name="L5">
      <style:text-properties style:font-name="UT Sans" officeooo:paragraph-rsid="0022c693"/>
    </style:style>
    <style:style style:name="P49" style:family="paragraph" style:parent-style-name="Standard">
      <style:text-properties style:font-name="UT Sans" fo:font-size="12pt" fo:font-weight="normal" officeooo:rsid="0022c693" officeooo:paragraph-rsid="0022c693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UT Sans" fo:font-size="12pt" fo:font-style="italic" fo:font-weight="normal" officeooo:rsid="0022c693" officeooo:paragraph-rsid="0022c693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 style:list-style-name="L5">
      <style:text-properties style:font-name="UT Sans" fo:font-size="12pt" fo:font-weight="normal" officeooo:rsid="0022c693" officeooo:paragraph-rsid="0022c693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UT Sans" fo:font-size="12pt" fo:font-style="italic" fo:font-weight="normal" officeooo:rsid="0022c693" officeooo:paragraph-rsid="002454b0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style:font-name="UT Sans" fo:font-weight="bold" officeooo:paragraph-rsid="002454b0" style:font-weight-asian="bold" style:font-weight-complex="bold"/>
    </style:style>
    <style:style style:name="P54" style:family="paragraph" style:parent-style-name="Text_20_body">
      <style:text-properties style:font-name="UT Sans" officeooo:rsid="002d885b" officeooo:paragraph-rsid="002d885b"/>
    </style:style>
    <style:style style:name="P55" style:family="paragraph" style:parent-style-name="Text_20_body">
      <style:text-properties style:font-name="UT Sans" fo:font-weight="bold" style:font-weight-asian="bold" style:font-weight-complex="bold"/>
    </style:style>
    <style:style style:name="P56" style:family="paragraph" style:parent-style-name="Text_20_body">
      <style:text-properties style:font-name="UT Sans" fo:font-style="italic" style:font-style-asian="italic" style:font-style-complex="italic"/>
    </style:style>
    <style:style style:name="P57" style:family="paragraph" style:parent-style-name="Text_20_body">
      <style:text-properties style:font-name="UT Sans" fo:font-weight="bold" officeooo:rsid="002f2090" officeooo:paragraph-rsid="002f2090" style:font-weight-asian="bold" style:font-weight-complex="bold"/>
    </style:style>
    <style:style style:name="P58" style:family="paragraph" style:parent-style-name="Text_20_body">
      <style:text-properties style:font-name="UT Sans" fo:font-weight="bold" officeooo:rsid="00311f65" officeooo:paragraph-rsid="002f2090" style:font-weight-asian="bold" style:font-weight-complex="bold"/>
    </style:style>
    <style:style style:name="P59" style:family="paragraph" style:parent-style-name="Text_20_body">
      <style:text-properties style:font-name="UT Sans"/>
    </style:style>
    <style:style style:name="P60" style:family="paragraph" style:parent-style-name="Text_20_body">
      <style:text-properties style:font-name="UT Sans" officeooo:rsid="003146a6" officeooo:paragraph-rsid="003146a6"/>
    </style:style>
    <style:style style:name="P61" style:family="paragraph" style:parent-style-name="Text_20_body">
      <style:text-properties style:font-name="UT Sans" officeooo:rsid="006f8962" officeooo:paragraph-rsid="006f8962"/>
    </style:style>
    <style:style style:name="P62" style:family="paragraph" style:parent-style-name="Standard">
      <style:text-properties style:font-name="UT Sans" fo:font-size="12pt" fo:font-weight="normal" officeooo:rsid="007801b2" officeooo:paragraph-rsid="007801b2" style:font-size-asian="10.5pt" style:font-weight-asian="normal" style:font-size-complex="12pt" style:font-weight-complex="normal"/>
    </style:style>
    <style:style style:name="P63" style:family="paragraph" style:parent-style-name="Table_20_Contents">
      <style:text-properties style:font-name="UT Sans" fo:font-size="12pt" fo:font-weight="bold" officeooo:rsid="007801b2" officeooo:paragraph-rsid="007801b2" style:font-size-asian="10.5pt" style:font-weight-asian="bold" style:font-size-complex="12pt" style:font-weight-complex="bold"/>
    </style:style>
    <style:style style:name="P64" style:family="paragraph" style:parent-style-name="Table_20_Contents">
      <style:text-properties style:font-name="UT Sans" fo:font-size="12pt" fo:font-weight="bold" officeooo:rsid="007c747c" officeooo:paragraph-rsid="007c747c" style:font-size-asian="10.5pt" style:font-weight-asian="bold" style:font-size-complex="12pt" style:font-weight-complex="bold"/>
    </style:style>
    <style:style style:name="P65" style:family="paragraph" style:parent-style-name="Table_20_Contents">
      <style:text-properties style:font-name="UT Sans" fo:font-size="12pt" style:font-size-asian="10.5pt" style:font-size-complex="12pt"/>
    </style:style>
    <style:style style:name="P66" style:family="paragraph" style:parent-style-name="Table_20_Contents">
      <style:text-properties style:font-name="UT Sans" fo:font-size="12pt" officeooo:rsid="007c747c" officeooo:paragraph-rsid="007c747c" style:font-size-asian="10.5pt" style:font-size-complex="12pt"/>
    </style:style>
    <style:style style:name="P67" style:family="paragraph" style:parent-style-name="Table_20_Contents">
      <style:text-properties style:font-name="UT Sans" fo:font-size="12pt" officeooo:rsid="007801b2" officeooo:paragraph-rsid="007801b2" style:font-size-asian="10.5pt" style:font-size-complex="12pt"/>
    </style:style>
    <style:style style:name="P68" style:family="paragraph" style:parent-style-name="Table_20_Contents">
      <style:text-properties style:font-name="UT Sans" fo:font-size="12pt" officeooo:rsid="007f1882" officeooo:paragraph-rsid="007f1882" style:font-size-asian="10.5pt" style:font-size-complex="12pt"/>
    </style:style>
    <style:style style:name="P69" style:family="paragraph" style:parent-style-name="Table_20_Contents">
      <style:text-properties style:font-name="UT Sans" fo:font-size="12pt" officeooo:rsid="007c747c" officeooo:paragraph-rsid="007f2ef6" style:font-size-asian="10.5pt" style:font-size-complex="12pt"/>
    </style:style>
    <style:style style:name="P70" style:family="paragraph" style:parent-style-name="Table_20_Contents">
      <style:text-properties style:font-name="UT Sans" fo:font-size="12pt" officeooo:paragraph-rsid="00801474" style:font-size-asian="10.5pt" style:font-size-complex="12pt"/>
    </style:style>
    <style:style style:name="P71" style:family="paragraph" style:parent-style-name="Table_20_Contents">
      <style:text-properties style:font-name="UT Sans" fo:font-size="12pt" officeooo:rsid="00801474" officeooo:paragraph-rsid="00801474" style:font-size-asian="10.5pt" style:font-size-complex="12pt"/>
    </style:style>
    <style:style style:name="P72" style:family="paragraph" style:parent-style-name="Table_20_Contents">
      <style:text-properties style:font-name="UT Sans" fo:font-size="12pt" officeooo:paragraph-rsid="00823f9d" style:font-size-asian="10.5pt" style:font-size-complex="12pt"/>
    </style:style>
    <style:style style:name="P73" style:family="paragraph" style:parent-style-name="Table_20_Contents">
      <style:text-properties style:font-name="UT Sans" fo:font-size="12pt" officeooo:rsid="00823f9d" officeooo:paragraph-rsid="00823f9d" style:font-size-asian="10.5pt" style:font-size-complex="12pt"/>
    </style:style>
    <style:style style:name="P74" style:family="paragraph" style:parent-style-name="Table_20_Contents">
      <style:text-properties style:font-name="UT Sans" fo:font-size="12pt" officeooo:rsid="00843b9f" officeooo:paragraph-rsid="00843b9f" style:font-size-asian="10.5pt" style:font-size-complex="12pt"/>
    </style:style>
    <style:style style:name="P75" style:family="paragraph" style:parent-style-name="Table_20_Contents">
      <style:text-properties style:font-name="UT Sans" fo:font-size="12pt" officeooo:paragraph-rsid="00862c20" style:font-size-asian="10.5pt" style:font-size-complex="12pt"/>
    </style:style>
    <style:style style:name="P76" style:family="paragraph" style:parent-style-name="Table_20_Contents">
      <style:text-properties style:font-name="UT Sans" fo:font-size="12pt" officeooo:rsid="00862c20" officeooo:paragraph-rsid="00862c20" style:font-size-asian="10.5pt" style:font-size-complex="12pt"/>
    </style:style>
    <style:style style:name="P77" style:family="paragraph" style:parent-style-name="Standard">
      <style:text-properties officeooo:paragraph-rsid="005c4236"/>
    </style:style>
    <style:style style:name="P78" style:family="paragraph" style:parent-style-name="Standard">
      <style:text-properties style:font-name="UT Sans" fo:font-size="13pt" fo:font-weight="bold" officeooo:rsid="0012b4bc" officeooo:paragraph-rsid="005c4236" style:font-size-asian="11.3500003814697pt" style:font-weight-asian="bold" style:font-size-complex="13pt" style:font-weight-complex="bold"/>
    </style:style>
    <style:style style:name="P79" style:family="paragraph" style:parent-style-name="Table_20_Contents">
      <style:text-properties style:font-name="UT Sans" fo:font-size="13pt" fo:font-weight="bold" officeooo:rsid="0061142c" officeooo:paragraph-rsid="006abfa3" style:font-size-asian="11.3500003814697pt" style:font-weight-asian="bold" style:font-size-complex="13pt" style:font-weight-complex="bold"/>
    </style:style>
    <style:style style:name="P80" style:family="paragraph" style:parent-style-name="Table_20_Contents">
      <style:text-properties style:font-name="UT Sans" fo:font-size="13pt" officeooo:rsid="0061142c" officeooo:paragraph-rsid="006abfa3" style:font-size-asian="11.3500003814697pt" style:font-size-complex="13pt"/>
    </style:style>
    <style:style style:name="P81" style:family="paragraph" style:parent-style-name="Table_20_Contents">
      <style:text-properties style:font-name="UT Sans" fo:font-size="13pt" officeooo:rsid="0064757b" officeooo:paragraph-rsid="006abfa3" style:font-size-asian="11.3500003814697pt" style:font-size-complex="13pt"/>
    </style:style>
    <style:style style:name="P82" style:family="paragraph" style:parent-style-name="Table_20_Contents">
      <style:text-properties style:font-name="UT Sans" fo:font-size="13pt" officeooo:rsid="0064d5f2" officeooo:paragraph-rsid="006abfa3" style:font-size-asian="11.3500003814697pt" style:font-size-complex="13pt"/>
    </style:style>
    <style:style style:name="P83" style:family="paragraph" style:parent-style-name="Table_20_Contents">
      <style:text-properties style:font-name="UT Sans" fo:font-size="13pt" officeooo:rsid="00651505" officeooo:paragraph-rsid="006abfa3" style:font-size-asian="11.3500003814697pt" style:font-size-complex="13pt"/>
    </style:style>
    <style:style style:name="P84" style:family="paragraph" style:parent-style-name="Table_20_Contents">
      <style:text-properties style:font-name="UT Sans" fo:font-size="13pt" officeooo:rsid="00d2e0b7" officeooo:paragraph-rsid="00d2e0b7" style:font-size-asian="11.3500003814697pt" style:font-size-complex="13pt"/>
    </style:style>
    <style:style style:name="P85" style:family="paragraph" style:parent-style-name="Table_20_Contents">
      <style:text-properties style:font-name="UT Sans" fo:font-size="13pt" officeooo:rsid="006abfa3" officeooo:paragraph-rsid="006abfa3" style:font-size-asian="11.3500003814697pt" style:font-size-complex="13pt"/>
    </style:style>
    <style:style style:name="P86" style:family="paragraph" style:parent-style-name="Table_20_Contents">
      <style:text-properties style:font-name="UT Sans" fo:font-size="13pt" officeooo:rsid="0062528d" officeooo:paragraph-rsid="006abfa3" style:font-size-asian="11.3500003814697pt" style:font-size-complex="13pt"/>
    </style:style>
    <style:style style:name="P87" style:family="paragraph" style:parent-style-name="Table_20_Contents">
      <style:text-properties style:font-name="UT Sans" fo:font-size="13pt" officeooo:rsid="0066f110" officeooo:paragraph-rsid="006abfa3" style:font-size-asian="11.3500003814697pt" style:font-size-complex="13pt"/>
    </style:style>
    <style:style style:name="P88" style:family="paragraph" style:parent-style-name="Standard">
      <style:text-properties style:font-name="UT Sans" fo:font-size="12pt" fo:font-weight="normal" officeooo:rsid="0020bed9" officeooo:paragraph-rsid="006abfa3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UT Sans" fo:font-size="12pt" fo:font-weight="normal" officeooo:rsid="002966f8" officeooo:paragraph-rsid="0032f5ae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UT Sans" fo:font-size="12pt" fo:font-style="italic" fo:font-weight="normal" officeooo:rsid="0020bed9" officeooo:paragraph-rsid="0032f5ae" style:font-size-asian="10.5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text-properties style:font-name="UT Sans" fo:font-size="12pt" fo:font-weight="normal" officeooo:rsid="0020bed9" officeooo:paragraph-rsid="0032f5ae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font-name="UT Sans" fo:font-size="12pt" fo:font-weight="normal" officeooo:rsid="0032f5ae" officeooo:paragraph-rsid="0032f5ae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font-name="UT Sans" fo:font-size="12pt" fo:font-weight="normal" officeooo:rsid="0022c693" officeooo:paragraph-rsid="0032f5ae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font-name="UT Sans" fo:font-size="12pt" fo:font-weight="normal" officeooo:rsid="0027f2ed" officeooo:paragraph-rsid="0032f5ae" style:font-size-asian="10.5pt" style:font-weight-asian="normal" style:font-size-complex="12pt" style:font-weight-complex="normal"/>
    </style:style>
    <style:style style:name="P95" style:family="paragraph" style:parent-style-name="Text_20_body">
      <style:text-properties style:font-name="UT Sans" fo:font-weight="bold" officeooo:paragraph-rsid="00d412f9" style:font-weight-asian="bold" style:font-weight-complex="bold"/>
    </style:style>
    <style:style style:name="P96" style:family="paragraph" style:parent-style-name="Text_20_body">
      <style:text-properties style:font-name="UT Sans" fo:font-weight="bold" officeooo:rsid="00dfb9e3" officeooo:paragraph-rsid="00dfb9e3" style:font-weight-asian="bold" style:font-weight-complex="bold"/>
    </style:style>
    <style:style style:name="P97" style:family="paragraph" style:parent-style-name="Text_20_body">
      <style:text-properties style:font-name="UT Sans" fo:font-style="italic" fo:font-weight="normal" officeooo:rsid="00dfb9e3" officeooo:paragraph-rsid="00dfb9e3" style:font-style-asian="italic" style:font-weight-asian="normal" style:font-style-complex="italic" style:font-weight-complex="normal"/>
    </style:style>
    <style:style style:name="P98" style:family="paragraph" style:parent-style-name="Text_20_body">
      <style:text-properties style:font-name="UT Sans" fo:font-weight="bold" officeooo:rsid="00dfb9e3" officeooo:paragraph-rsid="00e218f5" style:font-weight-asian="bold" style:font-weight-complex="bold"/>
    </style:style>
    <style:style style:name="P99" style:family="paragraph" style:parent-style-name="Text_20_body">
      <style:text-properties style:font-name="UT Sans" fo:font-style="italic" fo:font-weight="normal" officeooo:rsid="00dfb9e3" officeooo:paragraph-rsid="00e218f5" style:font-style-asian="italic" style:font-weight-asian="normal" style:font-style-complex="italic" style:font-weight-complex="normal"/>
    </style:style>
    <style:style style:name="P100" style:family="paragraph" style:parent-style-name="Text_20_body">
      <style:text-properties style:font-name="UT Sans" officeooo:rsid="002d885b" officeooo:paragraph-rsid="0032f5ae"/>
    </style:style>
    <style:style style:name="P101" style:family="paragraph" style:parent-style-name="Text_20_body">
      <style:text-properties style:font-name="UT Sans" fo:font-style="italic" officeooo:paragraph-rsid="0032f5ae" style:font-style-asian="italic" style:font-style-complex="italic"/>
    </style:style>
    <style:style style:name="P102" style:family="paragraph" style:parent-style-name="Text_20_body">
      <style:text-properties style:font-name="UT Sans" fo:font-weight="bold" officeooo:rsid="002f2090" officeooo:paragraph-rsid="0032f5ae" style:font-weight-asian="bold" style:font-weight-complex="bold"/>
    </style:style>
    <style:style style:name="P103" style:family="paragraph" style:parent-style-name="Text_20_body">
      <style:text-properties style:font-name="UT Sans" fo:font-weight="bold" officeooo:rsid="00311f65" officeooo:paragraph-rsid="00d56e70" style:font-weight-asian="bold" style:font-weight-complex="bold"/>
    </style:style>
    <style:style style:name="P104" style:family="paragraph" style:parent-style-name="Text_20_body">
      <style:text-properties style:font-name="UT Sans" fo:font-weight="bold" officeooo:rsid="00311f65" officeooo:paragraph-rsid="0032f5ae" style:font-weight-asian="bold" style:font-weight-complex="bold"/>
    </style:style>
    <style:style style:name="P105" style:family="paragraph" style:parent-style-name="Text_20_body">
      <style:text-properties style:font-name="UT Sans" officeooo:rsid="002f2090" officeooo:paragraph-rsid="0032f5ae"/>
    </style:style>
    <style:style style:name="P106" style:family="paragraph" style:parent-style-name="Text_20_body">
      <style:text-properties style:font-name="UT Sans" officeooo:rsid="006f8962" officeooo:paragraph-rsid="007801b2"/>
    </style:style>
    <style:style style:name="P107" style:family="paragraph" style:parent-style-name="Text_20_body">
      <style:text-properties style:font-name="UT Sans" fo:font-weight="normal" officeooo:rsid="007801b2" officeooo:paragraph-rsid="007801b2" style:font-weight-asian="normal" style:font-weight-complex="normal"/>
    </style:style>
    <style:style style:name="P108" style:family="paragraph" style:parent-style-name="Table_20_Contents">
      <style:text-properties style:font-name="UT Sans" fo:font-size="12pt" fo:font-weight="bold" officeooo:rsid="007801b2" officeooo:paragraph-rsid="008923e0" style:font-size-asian="10.5pt" style:font-weight-asian="bold" style:font-size-complex="12pt" style:font-weight-complex="bold"/>
    </style:style>
    <style:style style:name="P109" style:family="paragraph" style:parent-style-name="Table_20_Contents">
      <style:text-properties style:font-name="UT Sans" fo:font-size="12pt" fo:font-weight="bold" officeooo:rsid="007c747c" officeooo:paragraph-rsid="008923e0" style:font-size-asian="10.5pt" style:font-weight-asian="bold" style:font-size-complex="12pt" style:font-weight-complex="bold"/>
    </style:style>
    <style:style style:name="P110" style:family="paragraph" style:parent-style-name="Table_20_Contents">
      <style:text-properties style:font-name="UT Sans" fo:font-size="12pt" fo:font-weight="bold" officeooo:rsid="008923e0" officeooo:paragraph-rsid="008923e0" style:font-size-asian="10.5pt" style:font-weight-asian="bold" style:font-size-complex="12pt" style:font-weight-complex="bold"/>
    </style:style>
    <style:style style:name="P111" style:family="paragraph" style:parent-style-name="Table_20_Contents">
      <style:text-properties style:font-name="UT Sans" fo:font-size="12pt" officeooo:paragraph-rsid="008923e0" style:font-size-asian="10.5pt" style:font-size-complex="12pt"/>
    </style:style>
    <style:style style:name="P112" style:family="paragraph" style:parent-style-name="Table_20_Contents">
      <style:text-properties style:font-name="UT Sans" fo:font-size="12pt" officeooo:rsid="007c747c" officeooo:paragraph-rsid="008923e0" style:font-size-asian="10.5pt" style:font-size-complex="12pt"/>
    </style:style>
    <style:style style:name="P113" style:family="paragraph" style:parent-style-name="Table_20_Contents">
      <style:text-properties style:font-name="UT Sans" fo:font-size="12pt" officeooo:rsid="007801b2" officeooo:paragraph-rsid="008923e0" style:font-size-asian="10.5pt" style:font-size-complex="12pt"/>
    </style:style>
    <style:style style:name="P114" style:family="paragraph" style:parent-style-name="Table_20_Contents">
      <style:text-properties style:font-name="UT Sans" fo:font-size="12pt" officeooo:rsid="008c2a6d" officeooo:paragraph-rsid="008c2a6d" style:font-size-asian="10.5pt" style:font-size-complex="12pt"/>
    </style:style>
    <style:style style:name="P115" style:family="paragraph" style:parent-style-name="Table_20_Contents">
      <style:text-properties style:font-name="UT Sans" fo:font-size="12pt" officeooo:rsid="007c747c" officeooo:paragraph-rsid="008c2a6d" style:font-size-asian="10.5pt" style:font-size-complex="12pt"/>
    </style:style>
    <style:style style:name="P116" style:family="paragraph" style:parent-style-name="Table_20_Contents">
      <style:text-properties style:font-name="UT Sans" officeooo:paragraph-rsid="008923e0"/>
    </style:style>
    <style:style style:name="P117" style:family="paragraph" style:parent-style-name="Table_20_Contents">
      <style:text-properties style:font-name="UT Sans" fo:font-size="12pt" officeooo:paragraph-rsid="008c5e04" style:font-size-asian="10.5pt" style:font-size-complex="12pt"/>
    </style:style>
    <style:style style:name="P118" style:family="paragraph" style:parent-style-name="Table_20_Contents">
      <style:text-properties style:font-name="UT Sans" fo:font-size="12pt" officeooo:rsid="008ea8f1" officeooo:paragraph-rsid="008ea8f1" style:font-size-asian="10.5pt" style:font-size-complex="12pt"/>
    </style:style>
    <style:style style:name="P119" style:family="paragraph" style:parent-style-name="Table_20_Contents">
      <style:text-properties style:font-name="UT Sans" fo:font-size="12pt" officeooo:rsid="008f3206" officeooo:paragraph-rsid="008f3206" style:font-size-asian="10.5pt" style:font-size-complex="12pt"/>
    </style:style>
    <style:style style:name="P120" style:family="paragraph" style:parent-style-name="Table_20_Contents">
      <style:text-properties style:font-name="UT Sans" fo:font-size="12pt" officeooo:rsid="00905d2b" officeooo:paragraph-rsid="00905d2b" style:font-size-asian="10.5pt" style:font-size-complex="12pt"/>
    </style:style>
    <style:style style:name="P121" style:family="paragraph" style:parent-style-name="Table_20_Contents">
      <style:text-properties style:font-name="UT Sans" fo:font-size="12pt" officeooo:rsid="0091d969" officeooo:paragraph-rsid="0091d969" style:font-size-asian="10.5pt" style:font-size-complex="12pt"/>
    </style:style>
    <style:style style:name="P122" style:family="paragraph" style:parent-style-name="Standard">
      <style:text-properties style:font-name="UT Sans" fo:font-weight="normal" officeooo:rsid="007801b2" officeooo:paragraph-rsid="008923e0" style:font-weight-asian="normal" style:font-weight-complex="normal"/>
    </style:style>
    <style:style style:name="P123" style:family="paragraph" style:parent-style-name="Standard">
      <style:text-properties officeooo:paragraph-rsid="005dbde2"/>
    </style:style>
    <style:style style:name="P124" style:family="paragraph" style:parent-style-name="Standard">
      <style:text-properties style:font-name="UT Sans" fo:font-size="13pt" fo:font-weight="bold" officeooo:rsid="0012b4bc" officeooo:paragraph-rsid="005dbde2" style:font-size-asian="11.3500003814697pt" style:font-weight-asian="bold" style:font-size-complex="13pt" style:font-weight-complex="bold"/>
    </style:style>
    <style:style style:name="P125" style:family="paragraph" style:parent-style-name="Table_20_Contents">
      <style:text-properties style:font-name="UT Sans" fo:font-size="13pt" fo:font-weight="bold" officeooo:rsid="0061142c" officeooo:paragraph-rsid="006c67e9" style:font-size-asian="11.3500003814697pt" style:font-weight-asian="bold" style:font-size-complex="13pt" style:font-weight-complex="bold"/>
    </style:style>
    <style:style style:name="P126" style:family="paragraph" style:parent-style-name="Table_20_Contents">
      <style:text-properties style:font-name="UT Sans" fo:font-size="13pt" officeooo:rsid="0061142c" officeooo:paragraph-rsid="006c67e9" style:font-size-asian="11.3500003814697pt" style:font-size-complex="13pt"/>
    </style:style>
    <style:style style:name="P127" style:family="paragraph" style:parent-style-name="Table_20_Contents">
      <style:text-properties style:font-name="UT Sans" fo:font-size="13pt" officeooo:rsid="0064757b" officeooo:paragraph-rsid="006c67e9" style:font-size-asian="11.3500003814697pt" style:font-size-complex="13pt"/>
    </style:style>
    <style:style style:name="P128" style:family="paragraph" style:parent-style-name="Table_20_Contents">
      <style:text-properties style:font-name="UT Sans" fo:font-size="13pt" officeooo:rsid="0064d5f2" officeooo:paragraph-rsid="006c67e9" style:font-size-asian="11.3500003814697pt" style:font-size-complex="13pt"/>
    </style:style>
    <style:style style:name="P129" style:family="paragraph" style:parent-style-name="Table_20_Contents">
      <style:text-properties style:font-name="UT Sans" fo:font-size="13pt" officeooo:rsid="00651505" officeooo:paragraph-rsid="006c67e9" style:font-size-asian="11.3500003814697pt" style:font-size-complex="13pt"/>
    </style:style>
    <style:style style:name="P130" style:family="paragraph" style:parent-style-name="Table_20_Contents">
      <style:text-properties style:font-name="UT Sans" fo:font-size="13pt" officeooo:rsid="00d6a650" officeooo:paragraph-rsid="00d6a650" style:font-size-asian="11.3500003814697pt" style:font-size-complex="13pt"/>
    </style:style>
    <style:style style:name="P131" style:family="paragraph" style:parent-style-name="Table_20_Contents">
      <style:text-properties style:font-name="UT Sans" fo:font-size="13pt" officeooo:rsid="006c67e9" officeooo:paragraph-rsid="006c67e9" style:font-size-asian="11.3500003814697pt" style:font-size-complex="13pt"/>
    </style:style>
    <style:style style:name="P132" style:family="paragraph" style:parent-style-name="Table_20_Contents">
      <style:text-properties style:font-name="UT Sans" fo:font-size="13pt" officeooo:rsid="0062528d" officeooo:paragraph-rsid="006c67e9" style:font-size-asian="11.3500003814697pt" style:font-size-complex="13pt"/>
    </style:style>
    <style:style style:name="P133" style:family="paragraph" style:parent-style-name="Table_20_Contents">
      <style:text-properties style:font-name="UT Sans" fo:font-size="13pt" officeooo:rsid="0066f110" officeooo:paragraph-rsid="006c67e9" style:font-size-asian="11.3500003814697pt" style:font-size-complex="13pt"/>
    </style:style>
    <style:style style:name="P134" style:family="paragraph" style:parent-style-name="Standard">
      <style:text-properties style:font-name="UT Sans" fo:font-size="12pt" fo:font-style="normal" fo:font-weight="normal" officeooo:rsid="001db855" officeooo:paragraph-rsid="006c67e9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0487442" officeooo:paragraph-rsid="0096112a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style:font-name="UT Sans" fo:font-size="12pt" fo:font-style="normal" fo:font-weight="normal" officeooo:rsid="00487442" officeooo:paragraph-rsid="00487442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style:font-name="UT Sans" fo:font-size="12pt" fo:font-style="normal" fo:font-weight="normal" officeooo:rsid="00487442" officeooo:paragraph-rsid="00973a31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style:font-name="UT Sans" fo:font-size="12pt" fo:font-style="normal" fo:font-weight="bold" officeooo:rsid="00973a31" officeooo:paragraph-rsid="00d7423b" style:font-size-asian="10.5pt" style:font-style-asian="normal" style:font-weight-asian="bold" style:font-size-complex="12pt" style:font-style-complex="normal" style:font-weight-complex="bold"/>
    </style:style>
    <style:style style:name="P139" style:family="paragraph" style:parent-style-name="Text_20_body">
      <style:text-properties officeooo:paragraph-rsid="00973a31"/>
    </style:style>
    <style:style style:name="P140" style:family="paragraph" style:parent-style-name="Standard">
      <style:text-properties style:font-name="UT Sans" fo:font-size="12pt" fo:font-style="normal" fo:font-weight="bold" officeooo:rsid="00487442" officeooo:paragraph-rsid="00d7423b" style:font-size-asian="10.5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text-properties style:font-name="UT Sans" fo:font-size="12pt" fo:font-style="normal" fo:font-weight="bold" officeooo:rsid="00487442" officeooo:paragraph-rsid="00487442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Text_20_body">
      <style:text-properties fo:font-size="12pt" fo:font-style="normal" fo:font-weight="bold" officeooo:rsid="00487442" officeooo:paragraph-rsid="00487442" style:font-size-asian="10.5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text-properties style:font-name="UT Sans" fo:font-size="12pt" fo:font-style="normal" fo:font-weight="bold" officeooo:rsid="004e90e9" officeooo:paragraph-rsid="004e90e9" style:font-size-asian="10.5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>
      <style:text-properties style:font-name="UT Sans" fo:font-size="12pt" fo:font-style="normal" fo:font-weight="normal" officeooo:rsid="009bc0cb" officeooo:paragraph-rsid="004e90e9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style:font-name="UT Sans" fo:font-size="12pt" fo:font-style="italic" fo:font-weight="normal" officeooo:rsid="009bc0cb" officeooo:paragraph-rsid="00d892b0" style:font-size-asian="10.5pt" style:font-style-asian="italic" style:font-weight-asian="normal" style:font-size-complex="12pt" style:font-style-complex="italic" style:font-weight-complex="normal"/>
    </style:style>
    <style:style style:name="P146" style:family="paragraph" style:parent-style-name="Text_20_body">
      <style:text-properties fo:font-size="12pt" fo:font-style="normal" fo:font-weight="normal" officeooo:rsid="009bc0cb" officeooo:paragraph-rsid="004e90e9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Text_20_body">
      <style:text-properties style:font-name="UT Sans" fo:font-size="12pt" fo:font-style="normal" fo:font-weight="bold" officeooo:rsid="009bc331" officeooo:paragraph-rsid="00d7423b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Text_20_body">
      <style:text-properties fo:font-size="12pt" fo:font-weight="normal" officeooo:rsid="009bc0cb" officeooo:paragraph-rsid="00db7a63" style:font-size-asian="10.5pt" style:font-weight-asian="normal" style:font-size-complex="12pt" style:font-weight-complex="normal"/>
    </style:style>
    <style:style style:name="P149" style:family="paragraph" style:parent-style-name="Text_20_body">
      <style:text-properties fo:font-size="12pt" fo:font-weight="normal" officeooo:rsid="009bc0cb" officeooo:paragraph-rsid="00db7aa3" style:font-size-asian="10.5pt" style:font-weight-asian="normal" style:font-size-complex="12pt" style:font-weight-complex="normal"/>
    </style:style>
    <style:style style:name="P150" style:family="paragraph" style:parent-style-name="Text_20_body">
      <style:text-properties style:font-name="UT Sans" fo:font-size="12pt" fo:font-style="normal" fo:font-weight="normal" officeooo:rsid="009f6d8e" officeooo:paragraph-rsid="009f6d8e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style:font-name="UT Sans" fo:font-size="12pt" fo:font-style="italic" fo:font-weight="bold" officeooo:rsid="009f6d8e" officeooo:paragraph-rsid="009f6d8e" style:font-size-asian="12pt" style:font-style-asian="italic" style:font-weight-asian="bold" style:font-size-complex="12pt" style:font-style-complex="italic" style:font-weight-complex="bold"/>
    </style:style>
    <style:style style:name="P152" style:family="paragraph" style:parent-style-name="Text_20_body">
      <style:text-properties style:font-name="UT Sans" fo:font-size="12pt" fo:font-style="normal" fo:font-weight="normal" officeooo:rsid="00ae7aef" officeooo:paragraph-rsid="00ae7aef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Text_20_body">
      <style:text-properties officeooo:paragraph-rsid="00e7ca4e"/>
    </style:style>
    <style:style style:name="P154" style:family="paragraph" style:parent-style-name="Text_20_body">
      <style:text-properties style:font-name="UT Sans" officeooo:paragraph-rsid="00e7ca4e"/>
    </style:style>
    <style:style style:name="P155" style:family="paragraph" style:parent-style-name="Standard">
      <style:text-properties style:font-name="UT Sans" fo:font-size="12pt" style:text-underline-style="none" fo:font-weight="bold" officeooo:rsid="009f6d8e" officeooo:paragraph-rsid="00a0381e" style:font-size-asian="12pt" style:font-weight-asian="bold" style:font-size-complex="12pt" style:font-weight-complex="bold"/>
    </style:style>
    <style:style style:name="P156" style:family="paragraph" style:parent-style-name="Standard">
      <style:text-properties fo:font-size="14pt" style:text-underline-style="solid" style:text-underline-width="auto" style:text-underline-color="font-color" fo:font-weight="bold" officeooo:rsid="0012b4bc" officeooo:paragraph-rsid="00b00cb1" style:font-size-asian="14pt" style:font-weight-asian="bold" style:font-size-complex="14pt" style:font-weight-complex="bold"/>
    </style:style>
    <style:style style:name="P157" style:family="paragraph" style:parent-style-name="Standard">
      <style:text-properties style:font-name="UT Sans" fo:font-size="12pt" style:text-underline-style="none" fo:font-weight="normal" officeooo:rsid="0012b4bc" officeooo:paragraph-rsid="00b00cb1" style:font-size-asian="12pt" style:font-weight-asian="normal" style:font-size-complex="12pt" style:font-weight-complex="normal"/>
    </style:style>
    <style:style style:name="P158" style:family="paragraph" style:parent-style-name="Text_20_body">
      <style:text-properties fo:font-weight="bold" style:font-weight-asian="bold" style:font-weight-complex="bold"/>
    </style:style>
    <style:style style:name="P159" style:family="paragraph" style:parent-style-name="Text_20_body" style:list-style-name="L6">
      <style:text-properties style:font-name="UT Sans" fo:font-size="12pt" style:text-underline-style="none" fo:font-weight="normal" officeooo:rsid="0012b4bc" style:font-size-asian="12pt" style:font-weight-asian="normal" style:font-size-complex="12pt" style:font-weight-complex="normal"/>
    </style:style>
    <style:style style:name="P160" style:family="paragraph" style:parent-style-name="Text_20_body" style:list-style-name="L6">
      <style:text-properties fo:font-size="14pt" style:text-underline-style="solid" style:text-underline-width="auto" style:text-underline-color="font-color" fo:font-weight="bold" officeooo:rsid="0012b4bc" officeooo:paragraph-rsid="00f45031" style:font-size-asian="14pt" style:font-weight-asian="bold" style:font-size-complex="14pt" style:font-weight-complex="bold"/>
    </style:style>
    <style:style style:name="P161" style:family="paragraph" style:parent-style-name="Text_20_body">
      <style:text-properties style:font-name="UT Sans" fo:font-size="12pt" style:text-underline-style="none" fo:font-weight="normal" officeooo:rsid="0012b4bc" officeooo:paragraph-rsid="00fa2d78" style:font-size-asian="12pt" style:font-weight-asian="normal" style:font-size-complex="12pt" style:font-weight-complex="normal"/>
    </style:style>
    <style:style style:name="P162" style:family="paragraph" style:parent-style-name="Standard">
      <style:text-properties style:font-name="UT Sans" fo:font-size="12pt" style:text-underline-style="none" fo:font-weight="bold" officeooo:rsid="0012b4bc" officeooo:paragraph-rsid="00a28335" style:font-size-asian="12pt" style:font-weight-asian="bold" style:font-size-complex="12pt" style:font-weight-complex="bold"/>
    </style:style>
    <style:style style:name="P163" style:family="paragraph" style:parent-style-name="Standard">
      <style:text-properties style:font-name="UT Sans" fo:font-size="12pt" fo:font-style="italic" style:text-underline-style="none" fo:font-weight="bold" officeooo:rsid="00a43527" officeooo:paragraph-rsid="00a43527" style:font-size-asian="12pt" style:font-style-asian="italic" style:font-weight-asian="bold" style:font-size-complex="12pt" style:font-style-complex="italic" style:font-weight-complex="bold"/>
    </style:style>
    <style:style style:name="P164" style:family="paragraph" style:parent-style-name="Standard">
      <style:text-properties style:font-name="UT Sans" officeooo:paragraph-rsid="00a28335"/>
    </style:style>
    <style:style style:name="P165" style:family="paragraph" style:parent-style-name="Standard">
      <style:text-properties style:font-name="UT Sans" fo:font-weight="bold" officeooo:paragraph-rsid="00a28335" style:font-weight-asian="bold" style:font-weight-complex="bold"/>
    </style:style>
    <style:style style:name="P166" style:family="paragraph" style:parent-style-name="Standard">
      <style:text-properties style:font-name="UT Sans" officeooo:rsid="00a48903" officeooo:paragraph-rsid="00a48903"/>
    </style:style>
    <style:style style:name="P167" style:family="paragraph" style:parent-style-name="Standard">
      <style:text-properties style:font-name="UT Sans" fo:font-style="italic" fo:font-weight="bold" officeooo:paragraph-rsid="00a28335" style:font-style-asian="italic" style:font-weight-asian="bold" style:font-style-complex="italic" style:font-weight-complex="bold"/>
    </style:style>
    <style:style style:name="P168" style:family="paragraph" style:parent-style-name="Text_20_body">
      <style:text-properties style:font-name="UT Sans" fo:font-style="italic" officeooo:paragraph-rsid="00a67d71" style:font-style-asian="italic" style:font-style-complex="italic"/>
    </style:style>
    <style:style style:name="P169" style:family="paragraph" style:parent-style-name="Text_20_body">
      <style:text-properties style:font-name="UT Sans" fo:font-weight="bold" officeooo:rsid="002f2090" officeooo:paragraph-rsid="00a67d71" style:font-weight-asian="bold" style:font-weight-complex="bold"/>
    </style:style>
    <style:style style:name="P170" style:family="paragraph" style:parent-style-name="Text_20_body">
      <style:text-properties style:font-name="UT Sans" fo:font-weight="bold" officeooo:rsid="00311f65" officeooo:paragraph-rsid="00a67d71" style:font-weight-asian="bold" style:font-weight-complex="bold"/>
    </style:style>
    <style:style style:name="P171" style:family="paragraph" style:parent-style-name="Text_20_body">
      <style:text-properties style:font-name="UT Sans" officeooo:rsid="002f2090" officeooo:paragraph-rsid="00a67d71"/>
    </style:style>
    <style:style style:name="P172" style:family="paragraph" style:parent-style-name="Text_20_body">
      <style:text-properties style:font-name="UT Sans" officeooo:rsid="006f8962" officeooo:paragraph-rsid="00a67d71"/>
    </style:style>
    <style:style style:name="P173" style:family="paragraph" style:parent-style-name="Standard">
      <style:text-properties style:font-name="UT Sans" fo:font-weight="normal" officeooo:rsid="00a82358" officeooo:paragraph-rsid="00a82358" style:font-weight-asian="normal" style:font-weight-complex="normal"/>
    </style:style>
    <style:style style:name="P174" style:family="paragraph" style:parent-style-name="Table_20_Contents">
      <style:text-properties style:font-name="UT Sans" fo:font-size="12pt" fo:font-weight="bold" officeooo:rsid="007801b2" officeooo:paragraph-rsid="00a82358" style:font-size-asian="10.5pt" style:font-weight-asian="bold" style:font-size-complex="12pt" style:font-weight-complex="bold"/>
    </style:style>
    <style:style style:name="P175" style:family="paragraph" style:parent-style-name="Table_20_Contents">
      <style:text-properties style:font-name="UT Sans" fo:font-size="12pt" fo:font-weight="bold" officeooo:rsid="007c747c" officeooo:paragraph-rsid="00a82358" style:font-size-asian="10.5pt" style:font-weight-asian="bold" style:font-size-complex="12pt" style:font-weight-complex="bold"/>
    </style:style>
    <style:style style:name="P176" style:family="paragraph" style:parent-style-name="Table_20_Contents">
      <style:text-properties style:font-name="UT Sans" fo:font-size="12pt" fo:font-weight="bold" officeooo:rsid="00fc54c8" officeooo:paragraph-rsid="00fc54c8" style:font-size-asian="10.5pt" style:font-weight-asian="bold" style:font-size-complex="12pt" style:font-weight-complex="bold"/>
    </style:style>
    <style:style style:name="P177" style:family="paragraph" style:parent-style-name="Table_20_Contents">
      <style:text-properties style:font-name="UT Sans" fo:font-size="12pt" officeooo:paragraph-rsid="00a82358" style:font-size-asian="10.5pt" style:font-size-complex="12pt"/>
    </style:style>
    <style:style style:name="P178" style:family="paragraph" style:parent-style-name="Table_20_Contents">
      <style:text-properties style:font-name="UT Sans" fo:font-size="12pt" officeooo:rsid="007c747c" officeooo:paragraph-rsid="00a82358" style:font-size-asian="10.5pt" style:font-size-complex="12pt"/>
    </style:style>
    <style:style style:name="P179" style:family="paragraph" style:parent-style-name="Table_20_Contents">
      <style:text-properties style:font-name="UT Sans" fo:font-size="12pt" officeooo:rsid="007801b2" officeooo:paragraph-rsid="00a82358" style:font-size-asian="10.5pt" style:font-size-complex="12pt"/>
    </style:style>
    <style:style style:name="P180" style:family="paragraph" style:parent-style-name="Table_20_Contents">
      <style:text-properties style:font-name="UT Sans" fo:font-size="12pt" officeooo:rsid="00a98afc" officeooo:paragraph-rsid="00a98afc" style:font-size-asian="10.5pt" style:font-size-complex="12pt"/>
    </style:style>
    <style:style style:name="P181" style:family="paragraph" style:parent-style-name="Table_20_Contents">
      <style:text-properties style:font-name="UT Sans" fo:font-size="12pt" officeooo:rsid="00aaadde" officeooo:paragraph-rsid="00aaadde" style:font-size-asian="10.5pt" style:font-size-complex="12pt"/>
    </style:style>
    <style:style style:name="P182" style:family="paragraph" style:parent-style-name="Table_20_Contents">
      <style:text-properties style:font-name="UT Sans" fo:font-size="12pt" officeooo:rsid="00a82358" officeooo:paragraph-rsid="00a82358" style:font-size-asian="10.5pt" style:font-size-complex="12pt"/>
    </style:style>
    <style:style style:name="P183" style:family="paragraph" style:parent-style-name="Table_20_Contents">
      <style:text-properties style:font-name="UT Sans" fo:font-size="12pt" officeooo:rsid="00aca931" officeooo:paragraph-rsid="00aca931" style:font-size-asian="10.5pt" style:font-size-complex="12pt"/>
    </style:style>
    <style:style style:name="P184" style:family="paragraph" style:parent-style-name="Table_20_Contents">
      <style:text-properties style:font-name="UT Sans" officeooo:rsid="00aca931" officeooo:paragraph-rsid="00aca931"/>
    </style:style>
    <style:style style:name="P185" style:family="paragraph" style:parent-style-name="Standard">
      <style:text-properties style:font-name="UT Sans" fo:font-weight="normal" officeooo:paragraph-rsid="00a82358" style:font-weight-asian="normal" style:font-weight-complex="normal"/>
    </style:style>
    <style:style style:name="P186" style:family="paragraph" style:parent-style-name="Standard">
      <style:text-properties style:font-name="UT Sans" fo:font-size="14pt" style:text-underline-style="solid" style:text-underline-width="auto" style:text-underline-color="font-color" fo:font-weight="bold" officeooo:rsid="0012b4bc" officeooo:paragraph-rsid="007be793" style:font-size-asian="14pt" style:font-weight-asian="bold" style:font-size-complex="14pt" style:font-weight-complex="bold"/>
    </style:style>
    <style:style style:name="P187" style:family="paragraph" style:parent-style-name="Standard" style:list-style-name="L7">
      <style:text-properties style:font-name="UT Sans" fo:font-size="12pt" style:text-underline-style="none" fo:font-weight="normal" officeooo:rsid="007be793" officeooo:paragraph-rsid="007be793" style:font-size-asian="10.5pt" style:font-weight-asian="normal" style:font-size-complex="12pt" style:font-weight-complex="normal"/>
    </style:style>
    <style:style style:name="P188" style:family="paragraph" style:parent-style-name="Standard">
      <style:text-properties style:font-name="UT Sans" fo:font-size="12pt" style:text-underline-style="none" fo:font-weight="normal" officeooo:rsid="007be793" officeooo:paragraph-rsid="007be793" style:font-size-asian="10.5pt" style:font-weight-asian="normal" style:font-size-complex="12pt" style:font-weight-complex="normal"/>
    </style:style>
    <style:style style:name="T1" style:family="text">
      <style:text-properties officeooo:rsid="001c42ad"/>
    </style:style>
    <style:style style:name="T2" style:family="text">
      <style:text-properties officeooo:rsid="00544f8e"/>
    </style:style>
    <style:style style:name="T3" style:family="text">
      <style:text-properties officeooo:rsid="00711662"/>
    </style:style>
    <style:style style:name="T4" style:family="text">
      <style:text-properties officeooo:rsid="00b8f462"/>
    </style:style>
    <style:style style:name="T5" style:family="text">
      <style:text-properties style:font-name="UT Sans" fo:font-size="12pt" fo:font-style="normal" fo:font-weight="normal" officeooo:rsid="00716e2c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UT Sans" fo:font-size="12pt" fo:font-style="normal" fo:font-weight="bold" officeooo:rsid="00716e2c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UT Sans" fo:font-size="12pt" fo:font-style="normal" fo:font-weight="normal" officeooo:rsid="0073b4b4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UT Sans" fo:font-size="12pt" fo:font-style="normal" fo:font-weight="normal" officeooo:rsid="00b9b4d6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T Sans"/>
    </style:style>
    <style:style style:name="T10" style:family="text">
      <style:text-properties style:font-name="UT Sans" officeooo:rsid="00b9a3dc"/>
    </style:style>
    <style:style style:name="T11" style:family="text">
      <style:text-properties officeooo:rsid="0075600f"/>
    </style:style>
    <style:style style:name="T12" style:family="text">
      <style:text-properties officeooo:rsid="00bba65b"/>
    </style:style>
    <style:style style:name="T13" style:family="text">
      <style:text-properties officeooo:rsid="00bec9d6"/>
    </style:style>
    <style:style style:name="T14" style:family="text">
      <style:text-properties officeooo:rsid="0015619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UT Sans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UT Sans" fo:font-style="italic" style:font-style-asian="italic" style:font-style-complex="italic"/>
    </style:style>
    <style:style style:name="T18" style:family="text">
      <style:text-properties fo:font-style="italic" officeooo:rsid="00feb37e" style:font-style-asian="italic" style:font-style-complex="italic"/>
    </style:style>
    <style:style style:name="T19" style:family="text">
      <style:text-properties style:font-name="UT Sans" fo:font-style="italic" officeooo:rsid="00feb37e" style:font-style-asian="italic" style:font-style-complex="italic"/>
    </style:style>
    <style:style style:name="T20" style:family="text">
      <style:text-properties style:font-name="UT Sans" fo:font-style="italic" fo:font-weight="bold" officeooo:rsid="00feb37e" style:font-style-asian="italic" style:font-weight-asian="bold" style:font-style-complex="italic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ca2f00" style:font-weight-asian="normal" style:font-weight-complex="normal"/>
    </style:style>
    <style:style style:name="T23" style:family="text">
      <style:text-properties fo:font-style="normal" officeooo:rsid="00c4419e" style:font-style-asian="normal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officeooo:rsid="00c548a4" style:font-style-asian="normal" style:font-style-complex="normal"/>
    </style:style>
    <style:style style:name="T27" style:family="text">
      <style:text-properties officeooo:rsid="0077b2b1"/>
    </style:style>
    <style:style style:name="T28" style:family="text">
      <style:text-properties style:font-size-asian="12pt"/>
    </style:style>
    <style:style style:name="T29" style:family="text">
      <style:text-properties fo:font-weight="bold" officeooo:rsid="00876345" style:font-size-asian="12pt" style:font-weight-asian="bold" style:font-weight-complex="bold"/>
    </style:style>
    <style:style style:name="T30" style:family="text">
      <style:text-properties fo:font-weight="bold" style:font-size-asian="12pt" style:font-weight-asian="bold" style:font-weight-complex="bold"/>
    </style:style>
    <style:style style:name="T31" style:family="text">
      <style:text-properties style:text-position="super 58%" style:font-size-asian="12pt"/>
    </style:style>
    <style:style style:name="T32" style:family="text">
      <style:text-properties style:text-position="0% 100%" style:font-size-asian="12pt"/>
    </style:style>
    <style:style style:name="T33" style:family="text">
      <style:text-properties fo:font-style="italic" officeooo:rsid="001c42ad" style:font-style-asian="italic" style:font-style-complex="italic"/>
    </style:style>
    <style:style style:name="T34" style:family="text">
      <style:text-properties fo:font-style="italic" officeooo:rsid="0032f5ae" style:font-style-asian="italic" style:font-style-complex="italic"/>
    </style:style>
    <style:style style:name="T35" style:family="text">
      <style:text-properties style:font-name="UT Sans" fo:font-size="12pt" fo:font-weight="normal" officeooo:rsid="0012b4bc" style:font-size-asian="12pt" style:font-weight-asian="normal" style:font-size-complex="12pt" style:font-weight-complex="normal"/>
    </style:style>
    <style:style style:name="T36" style:family="text">
      <style:text-properties style:font-name="UT Sans" fo:font-size="12pt" fo:font-weight="bold" officeooo:rsid="0012b4bc" style:font-size-asian="12pt" style:font-weight-asian="bold" style:font-size-complex="12pt" style:font-weight-complex="bold"/>
    </style:style>
    <style:style style:name="T37" style:family="text">
      <style:text-properties style:font-name="UT Sans" fo:font-size="12pt" fo:font-weight="normal" officeooo:rsid="00c0ecd7" style:font-size-asian="12pt" style:font-weight-asian="normal" style:font-size-complex="12pt" style:font-weight-complex="normal"/>
    </style:style>
    <style:style style:name="T38" style:family="text">
      <style:text-properties officeooo:rsid="00667929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aa9b8"/>
    </style:style>
    <style:style style:name="T41" style:family="text">
      <style:text-properties officeooo:rsid="0055a3db"/>
    </style:style>
    <style:style style:name="T42" style:family="text">
      <style:text-properties officeooo:rsid="00390610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italic" officeooo:rsid="002295de" style:font-style-asian="italic" style:font-style-complex="italic"/>
    </style:style>
    <style:style style:name="T45" style:family="text">
      <style:text-properties fo:font-style="italic" officeooo:rsid="0022c693" style:font-style-asian="italic" style:font-style-complex="italic"/>
    </style:style>
    <style:style style:name="T46" style:family="text">
      <style:text-properties officeooo:rsid="003dcbf6"/>
    </style:style>
    <style:style style:name="T47" style:family="text">
      <style:text-properties officeooo:rsid="00ca8445"/>
    </style:style>
    <style:style style:name="T48" style:family="text">
      <style:text-properties officeooo:rsid="00e2c979"/>
    </style:style>
    <style:style style:name="T49" style:family="text">
      <style:text-properties fo:font-weight="normal" officeooo:rsid="00e2c979" style:font-weight-asian="normal" style:font-weight-complex="normal"/>
    </style:style>
    <style:style style:name="T50" style:family="text">
      <style:text-properties officeooo:rsid="00e3b806"/>
    </style:style>
    <style:style style:name="T51" style:family="text">
      <style:text-properties officeooo:rsid="0027f2ed"/>
    </style:style>
    <style:style style:name="T52" style:family="text">
      <style:text-properties fo:font-weight="normal" officeooo:rsid="0027f2ed" style:font-weight-asian="normal" style:font-weight-complex="normal"/>
    </style:style>
    <style:style style:name="T53" style:family="text">
      <style:text-properties fo:font-weight="normal" officeooo:rsid="00e3b806" style:font-weight-asian="normal" style:font-weight-complex="normal"/>
    </style:style>
    <style:style style:name="T54" style:family="text">
      <style:text-properties officeooo:rsid="00e4a480"/>
    </style:style>
    <style:style style:name="T55" style:family="text">
      <style:text-properties fo:font-weight="normal" officeooo:rsid="002cf221" style:font-weight-asian="normal" style:font-weight-complex="normal"/>
    </style:style>
    <style:style style:name="T56" style:family="text">
      <style:text-properties officeooo:rsid="002cf221"/>
    </style:style>
    <style:style style:name="T57" style:family="text">
      <style:text-properties officeooo:rsid="0025f9d8"/>
    </style:style>
    <style:style style:name="T58" style:family="text">
      <style:text-properties fo:font-size="12pt" fo:font-weight="bold" officeooo:rsid="0022c693" style:font-size-asian="10.5pt" style:font-weight-asian="bold" style:font-size-complex="12pt" style:font-weight-complex="bold"/>
    </style:style>
    <style:style style:name="T59" style:family="text">
      <style:text-properties fo:font-size="12pt" fo:font-weight="normal" officeooo:rsid="0022c693" style:font-size-asian="10.5pt" style:font-weight-asian="normal" style:font-size-complex="12pt" style:font-weight-complex="normal"/>
    </style:style>
    <style:style style:name="T60" style:family="text">
      <style:text-properties officeooo:rsid="003aeced"/>
    </style:style>
    <style:style style:name="T61" style:family="text">
      <style:text-properties officeooo:rsid="002454b0"/>
    </style:style>
    <style:style style:name="T62" style:family="text">
      <style:text-properties officeooo:rsid="00cc5528"/>
    </style:style>
    <style:style style:name="T63" style:family="text">
      <style:text-properties officeooo:rsid="002f2090"/>
    </style:style>
    <style:style style:name="T64" style:family="text">
      <style:text-properties officeooo:rsid="00311f65"/>
    </style:style>
    <style:style style:name="T65" style:family="text">
      <style:text-properties officeooo:rsid="00cd9593"/>
    </style:style>
    <style:style style:name="T66" style:family="text">
      <style:text-properties officeooo:rsid="0032ef8b"/>
    </style:style>
    <style:style style:name="T67" style:family="text">
      <style:text-properties officeooo:rsid="003b6056"/>
    </style:style>
    <style:style style:name="T68" style:family="text">
      <style:text-properties fo:font-weight="bold" officeooo:rsid="00711662" style:font-weight-asian="bold" style:font-weight-complex="bold"/>
    </style:style>
    <style:style style:name="T69" style:family="text">
      <style:text-properties fo:font-weight="normal" officeooo:rsid="00711662" style:font-weight-asian="normal" style:font-weight-complex="normal"/>
    </style:style>
    <style:style style:name="T70" style:family="text">
      <style:text-properties officeooo:rsid="00876345"/>
    </style:style>
    <style:style style:name="T71" style:family="text">
      <style:text-properties officeooo:rsid="007f2ef6"/>
    </style:style>
    <style:style style:name="T72" style:family="text">
      <style:text-properties officeooo:rsid="007de64c"/>
    </style:style>
    <style:style style:name="T73" style:family="text">
      <style:text-properties officeooo:rsid="0080abac"/>
    </style:style>
    <style:style style:name="T74" style:family="text">
      <style:text-properties officeooo:rsid="00843b9f"/>
    </style:style>
    <style:style style:name="T75" style:family="text">
      <style:text-properties officeooo:rsid="00862c20"/>
    </style:style>
    <style:style style:name="T76" style:family="text">
      <style:text-properties style:font-name="UT Sans" fo:font-size="12pt" fo:font-weight="bold" officeooo:rsid="005c4236" style:font-size-asian="12pt" style:font-weight-asian="bold" style:font-size-complex="12pt" style:font-weight-complex="bold"/>
    </style:style>
    <style:style style:name="T77" style:family="text">
      <style:text-properties style:font-name="UT Sans" fo:font-size="12pt" fo:font-weight="normal" officeooo:rsid="005c4236" style:font-size-asian="12pt" style:font-weight-asian="normal" style:font-size-complex="12pt" style:font-weight-complex="normal"/>
    </style:style>
    <style:style style:name="T78" style:family="text">
      <style:text-properties style:font-name="UT Sans" fo:font-size="12pt" fo:font-weight="normal" officeooo:rsid="00d27045" style:font-size-asian="12pt" style:font-weight-asian="normal" style:font-size-complex="12pt" style:font-weight-complex="normal"/>
    </style:style>
    <style:style style:name="T79" style:family="text">
      <style:text-properties fo:font-size="12pt" fo:font-weight="normal" style:font-size-asian="12pt" style:font-weight-asian="normal" style:font-size-complex="12pt" style:font-weight-complex="normal"/>
    </style:style>
    <style:style style:name="T80" style:family="text">
      <style:text-properties officeooo:rsid="0032f5ae"/>
    </style:style>
    <style:style style:name="T81" style:family="text">
      <style:text-properties fo:font-weight="bold" officeooo:rsid="0032f5ae" style:font-weight-asian="bold" style:font-weight-complex="bold"/>
    </style:style>
    <style:style style:name="T82" style:family="text">
      <style:text-properties officeooo:rsid="003c10ba"/>
    </style:style>
    <style:style style:name="T83" style:family="text">
      <style:text-properties officeooo:rsid="003d888f"/>
    </style:style>
    <style:style style:name="T84" style:family="text">
      <style:text-properties officeooo:rsid="003634a4"/>
    </style:style>
    <style:style style:name="T85" style:family="text">
      <style:text-properties officeooo:rsid="004206c8"/>
    </style:style>
    <style:style style:name="T86" style:family="text">
      <style:text-properties officeooo:rsid="00d412f9"/>
    </style:style>
    <style:style style:name="T87" style:family="text">
      <style:text-properties officeooo:rsid="006e1e4a"/>
    </style:style>
    <style:style style:name="T88" style:family="text">
      <style:text-properties officeooo:rsid="00e218f5"/>
    </style:style>
    <style:style style:name="T89" style:family="text">
      <style:text-properties fo:font-weight="normal" officeooo:rsid="00e218f5" style:font-weight-asian="normal" style:font-weight-complex="normal"/>
    </style:style>
    <style:style style:name="T90" style:family="text">
      <style:text-properties officeooo:rsid="004333bc"/>
    </style:style>
    <style:style style:name="T91" style:family="text">
      <style:text-properties officeooo:rsid="0043eb25"/>
    </style:style>
    <style:style style:name="T92" style:family="text">
      <style:text-properties officeooo:rsid="004496db"/>
    </style:style>
    <style:style style:name="T93" style:family="text">
      <style:text-properties officeooo:rsid="00a78409"/>
    </style:style>
    <style:style style:name="T94" style:family="text">
      <style:text-properties fo:font-weight="bold" officeooo:rsid="004496db" style:font-weight-asian="bold" style:font-weight-complex="bold"/>
    </style:style>
    <style:style style:name="T95" style:family="text">
      <style:text-properties fo:font-weight="bold" officeooo:rsid="007801b2" style:font-weight-asian="bold" style:font-weight-complex="bold"/>
    </style:style>
    <style:style style:name="T96" style:family="text">
      <style:text-properties officeooo:rsid="00899313"/>
    </style:style>
    <style:style style:name="T97" style:family="text">
      <style:text-properties officeooo:rsid="008a8723"/>
    </style:style>
    <style:style style:name="T98" style:family="text">
      <style:text-properties officeooo:rsid="008a9e26"/>
    </style:style>
    <style:style style:name="T99" style:family="text">
      <style:text-properties officeooo:rsid="008c2a6d"/>
    </style:style>
    <style:style style:name="T100" style:family="text">
      <style:text-properties officeooo:rsid="008c5e04"/>
    </style:style>
    <style:style style:name="T101" style:family="text">
      <style:text-properties officeooo:rsid="008d73ad"/>
    </style:style>
    <style:style style:name="T102" style:family="text">
      <style:text-properties officeooo:rsid="0090f121"/>
    </style:style>
    <style:style style:name="T103" style:family="text">
      <style:text-properties officeooo:rsid="008f3206"/>
    </style:style>
    <style:style style:name="T104" style:family="text">
      <style:text-properties officeooo:rsid="00905d2b"/>
    </style:style>
    <style:style style:name="T105" style:family="text">
      <style:text-properties officeooo:rsid="0091d969"/>
    </style:style>
    <style:style style:name="T106" style:family="text">
      <style:text-properties fo:font-style="italic" officeooo:rsid="0046de01" style:font-style-asian="italic" style:font-style-complex="italic"/>
    </style:style>
    <style:style style:name="T107" style:family="text">
      <style:text-properties style:font-name="UT Sans" fo:font-size="12pt" fo:font-weight="bold" officeooo:rsid="005dbde2" style:font-size-asian="12pt" style:font-weight-asian="bold" style:font-size-complex="12pt" style:font-weight-complex="bold"/>
    </style:style>
    <style:style style:name="T108" style:family="text">
      <style:text-properties style:font-name="UT Sans" fo:font-size="12pt" fo:font-weight="normal" officeooo:rsid="005dbde2" style:font-size-asian="12pt" style:font-weight-asian="normal" style:font-size-complex="12pt" style:font-weight-complex="normal"/>
    </style:style>
    <style:style style:name="T109" style:family="text">
      <style:text-properties style:font-name="UT Sans" fo:font-size="12pt" fo:font-weight="normal" officeooo:rsid="00d6a650" style:font-size-asian="12pt" style:font-weight-asian="normal" style:font-size-complex="12pt" style:font-weight-complex="normal"/>
    </style:style>
    <style:style style:name="T110" style:family="text">
      <style:text-properties style:font-name="UT Sans" fo:font-style="italic" officeooo:rsid="0096112a" style:font-style-asian="italic" style:font-style-complex="italic"/>
    </style:style>
    <style:style style:name="T111" style:family="text">
      <style:text-properties style:font-name="UT Sans" officeooo:rsid="0048bb87"/>
    </style:style>
    <style:style style:name="T112" style:family="text">
      <style:text-properties style:font-name="UT Sans" officeooo:rsid="004c7993"/>
    </style:style>
    <style:style style:name="T113" style:family="text">
      <style:text-properties style:font-name="UT Sans" fo:font-weight="bold" officeooo:rsid="0048bb87" style:font-weight-asian="bold" style:font-weight-complex="bold"/>
    </style:style>
    <style:style style:name="T114" style:family="text">
      <style:text-properties style:font-name="UT Sans" officeooo:rsid="0096112a"/>
    </style:style>
    <style:style style:name="T115" style:family="text">
      <style:text-properties fo:font-size="13pt" officeooo:rsid="00d7423b" style:font-size-asian="11.3500003814697pt" style:font-size-complex="13pt"/>
    </style:style>
    <style:style style:name="T116" style:family="text">
      <style:text-properties style:font-name="UT Sans" fo:font-size="12pt" fo:font-style="normal" fo:font-weight="normal" officeooo:rsid="00487442" style:font-size-asian="10.5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font-name="UT Sans" fo:font-weight="normal" style:font-weight-asian="normal" style:font-weight-complex="normal"/>
    </style:style>
    <style:style style:name="T118" style:family="text">
      <style:text-properties officeooo:rsid="00992e46"/>
    </style:style>
    <style:style style:name="T119" style:family="text">
      <style:text-properties fo:font-weight="normal" officeooo:rsid="00504c7a" style:font-weight-asian="normal" style:font-weight-complex="normal"/>
    </style:style>
    <style:style style:name="T120" style:family="text">
      <style:text-properties fo:font-weight="normal" officeooo:rsid="009bc0cb" style:font-weight-asian="normal" style:font-weight-complex="normal"/>
    </style:style>
    <style:style style:name="T121" style:family="text">
      <style:text-properties style:font-name="UT Sans" fo:font-weight="normal" officeooo:rsid="00d8daff" style:font-weight-asian="normal" style:font-weight-complex="normal"/>
    </style:style>
    <style:style style:name="T122" style:family="text">
      <style:text-properties style:font-name="UT Sans" officeooo:rsid="00d8daff"/>
    </style:style>
    <style:style style:name="T123" style:family="text">
      <style:text-properties style:font-name="UT Sans" fo:font-style="normal" style:font-style-asian="normal" style:font-style-complex="normal"/>
    </style:style>
    <style:style style:name="T124" style:family="text">
      <style:text-properties style:font-name="UT Sans" fo:font-style="normal" fo:font-weight="bold" officeooo:rsid="00e64743" style:font-style-asian="normal" style:font-weight-asian="bold" style:font-style-complex="normal" style:font-weight-complex="bold"/>
    </style:style>
    <style:style style:name="T125" style:family="text">
      <style:text-properties style:font-name="UT Sans" fo:font-style="normal" officeooo:rsid="00d9878c" style:font-style-asian="normal" style:font-style-complex="normal"/>
    </style:style>
    <style:style style:name="T126" style:family="text">
      <style:text-properties fo:color="#000000" loext:opacity="100%" style:font-name="UT Sans" fo:font-style="italic" officeooo:rsid="00d9878c" fo:background-color="transparent" loext:char-shading-value="0" style:font-style-asian="italic" style:font-style-complex="italic"/>
    </style:style>
    <style:style style:name="T127" style:family="text">
      <style:text-properties style:font-name="UT Sans" fo:font-style="normal" fo:font-weight="bold" officeooo:rsid="00e64ee0" style:font-style-asian="normal" style:font-weight-asian="bold" style:font-style-complex="normal" style:font-weight-complex="bold"/>
    </style:style>
    <style:style style:name="T128" style:family="text">
      <style:text-properties style:font-name="UT Sans"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style:font-name="UT Sans" fo:font-style="italic" officeooo:rsid="0020bed9" style:font-style-asian="italic" style:font-style-complex="italic"/>
    </style:style>
    <style:style style:name="T130" style:family="text">
      <style:text-properties style:font-name="UT Sans" fo:font-style="italic" officeooo:rsid="0051395a" style:font-style-asian="italic" style:font-style-complex="italic"/>
    </style:style>
    <style:style style:name="T131" style:family="text">
      <style:text-properties style:text-underline-style="none"/>
    </style:style>
    <style:style style:name="T132" style:family="text">
      <style:text-properties fo:font-weight="bold" officeooo:rsid="00e72e51" style:font-weight-asian="bold" style:font-weight-complex="bold"/>
    </style:style>
    <style:style style:name="T133" style:family="text">
      <style:text-properties officeooo:rsid="00e72e51"/>
    </style:style>
    <style:style style:name="T134" style:family="text">
      <style:text-properties officeooo:rsid="00e7b77d"/>
    </style:style>
    <style:style style:name="T135" style:family="text">
      <style:text-properties style:font-name="UT Sans" fo:font-size="12pt" fo:font-style="normal" fo:font-weight="normal" officeooo:rsid="00a02e84" style:font-size-asian="10.5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font-name="UT Sans" fo:font-size="12pt" fo:font-style="normal" fo:font-weight="bold" officeooo:rsid="00a02e84" style:font-size-asian="10.5pt" style:font-style-asian="normal" style:font-weight-asian="bold" style:font-size-complex="12pt" style:font-style-complex="normal" style:font-weight-complex="bold"/>
    </style:style>
    <style:style style:name="T137" style:family="text">
      <style:text-properties style:font-name="UT Sans" fo:font-weight="bold" officeooo:rsid="00e91fbb" style:font-weight-asian="bold" style:font-weight-complex="bold"/>
    </style:style>
    <style:style style:name="T138" style:family="text">
      <style:text-properties style:font-name="UT Sans" fo:font-weight="bold" style:font-weight-asian="bold" style:font-weight-complex="bold"/>
    </style:style>
    <style:style style:name="T139" style:family="text">
      <style:text-properties fo:font-style="italic" officeooo:rsid="00a0381e" style:font-style-asian="italic" style:font-style-complex="italic"/>
    </style:style>
    <style:style style:name="T140" style:family="text">
      <style:text-properties style:font-name="UT Sans" fo:font-size="12pt" style:text-underline-style="none" fo:font-weight="normal" style:font-size-asian="12pt" style:font-weight-asian="normal" style:font-size-complex="12pt" style:font-weight-complex="normal"/>
    </style:style>
    <style:style style:name="T141" style:family="text">
      <style:text-properties style:font-name="UT Sans" fo:font-size="12pt" style:text-underline-style="none" fo:font-weight="normal" officeooo:rsid="00e94513" style:font-size-asian="12pt" style:font-weight-asian="normal" style:font-size-complex="12pt" style:font-weight-complex="normal"/>
    </style:style>
    <style:style style:name="T142" style:family="text">
      <style:text-properties style:font-name="UT Sans" fo:font-size="12pt" style:text-underline-style="none" fo:font-weight="normal" officeooo:rsid="00b00cb1" style:font-size-asian="12pt" style:font-weight-asian="normal" style:font-size-complex="12pt" style:font-weight-complex="normal"/>
    </style:style>
    <style:style style:name="T143" style:family="text">
      <style:text-properties style:font-name="UT Sans" fo:font-size="12pt" style:text-underline-style="none" fo:font-weight="normal" officeooo:rsid="00e9cc86" style:font-size-asian="12pt" style:font-weight-asian="normal" style:font-size-complex="12pt" style:font-weight-complex="normal"/>
    </style:style>
    <style:style style:name="T144" style:family="text">
      <style:text-properties style:font-name="UT Sans" fo:font-size="12pt" style:text-underline-style="none" fo:font-weight="normal" officeooo:rsid="00f72102" style:font-size-asian="12pt" style:font-weight-asian="normal" style:font-size-complex="12pt" style:font-weight-complex="normal"/>
    </style:style>
    <style:style style:name="T145" style:family="text">
      <style:text-properties style:font-name="UT Sans" fo:font-size="12pt" style:text-underline-style="none" fo:font-weight="normal" officeooo:rsid="00eb037f" style:font-size-asian="12pt" style:font-weight-asian="normal" style:font-size-complex="12pt" style:font-weight-complex="normal"/>
    </style:style>
    <style:style style:name="T146" style:family="text">
      <style:text-properties officeooo:rsid="00b00cb1"/>
    </style:style>
    <style:style style:name="T147" style:family="text">
      <style:text-properties style:font-name="UT Sans" fo:font-size="12pt" style:text-underline-style="none" fo:font-weight="normal" officeooo:rsid="00f45031" style:font-size-asian="12pt" style:font-weight-asian="normal" style:font-size-complex="12pt" style:font-weight-complex="normal"/>
    </style:style>
    <style:style style:name="T148" style:family="text">
      <style:text-properties style:font-name="UT Sans" fo:font-size="12pt" style:text-underline-style="none" fo:font-weight="normal" officeooo:rsid="00f5e501" style:font-size-asian="12pt" style:font-weight-asian="normal" style:font-size-complex="12pt" style:font-weight-complex="normal"/>
    </style:style>
    <style:style style:name="T149" style:family="text">
      <style:text-properties style:font-name="UT Sans" fo:font-size="12pt" style:text-underline-style="none" officeooo:rsid="00f5e501" style:font-size-asian="12pt" style:font-size-complex="12pt"/>
    </style:style>
    <style:style style:name="T150" style:family="text">
      <style:text-properties style:font-name="UT Sans" fo:font-size="12pt" style:text-underline-style="none" fo:font-weight="normal" officeooo:rsid="00f8bb40" style:font-size-asian="12pt" style:font-weight-asian="normal" style:font-size-complex="12pt" style:font-weight-complex="normal"/>
    </style:style>
    <style:style style:name="T151" style:family="text">
      <style:text-properties style:font-name="UT Sans" fo:font-size="12pt" style:text-underline-style="none" fo:font-weight="normal" officeooo:rsid="00f92b8e" style:font-size-asian="12pt" style:font-weight-asian="normal" style:font-size-complex="12pt" style:font-weight-complex="normal"/>
    </style:style>
    <style:style style:name="T152" style:family="text">
      <style:text-properties style:font-name="UT Sans" fo:font-size="12pt" style:text-underline-style="none" fo:font-weight="normal" officeooo:rsid="00b39220" style:font-size-asian="12pt" style:font-weight-asian="normal" style:font-size-complex="12pt" style:font-weight-complex="normal"/>
    </style:style>
    <style:style style:name="T153" style:family="text">
      <style:text-properties fo:font-size="12pt" style:text-underline-style="none" fo:font-weight="normal" officeooo:rsid="0012b4bc" style:font-size-asian="12pt" style:font-weight-asian="normal" style:font-size-complex="12pt" style:font-weight-complex="normal"/>
    </style:style>
    <style:style style:name="T154" style:family="text">
      <style:text-properties officeooo:rsid="00fa71d0"/>
    </style:style>
    <style:style style:name="T155" style:family="text">
      <style:text-properties officeooo:rsid="00fb9cd7"/>
    </style:style>
    <style:style style:name="T156" style:family="text">
      <style:text-properties officeooo:rsid="00a67d71"/>
    </style:style>
    <style:style style:name="T157" style:family="text">
      <style:text-properties officeooo:rsid="00a6bd76"/>
    </style:style>
    <style:style style:name="T158" style:family="text">
      <style:text-properties fo:font-weight="bold" officeooo:rsid="00a6bd76" style:font-weight-asian="bold" style:font-weight-complex="bold"/>
    </style:style>
    <style:style style:name="T159" style:family="text">
      <style:text-properties fo:font-weight="bold" officeooo:rsid="00fd2816" style:font-weight-asian="bold" style:font-weight-complex="bold"/>
    </style:style>
    <style:style style:name="T160" style:family="text">
      <style:text-properties fo:font-weight="bold" officeooo:rsid="00a7b707" style:font-weight-asian="bold" style:font-weight-complex="bold"/>
    </style:style>
    <style:style style:name="T161" style:family="text">
      <style:text-properties officeooo:rsid="00a98324"/>
    </style:style>
    <style:style style:name="T162" style:family="text">
      <style:text-properties officeooo:rsid="00a98afc"/>
    </style:style>
    <style:style style:name="T163" style:family="text">
      <style:text-properties officeooo:rsid="00aca931"/>
    </style:style>
    <style:style style:name="T164" style:family="text">
      <style:text-properties officeooo:rsid="00aaadde"/>
    </style:style>
    <style:style style:name="T165" style:family="text">
      <style:text-properties officeooo:rsid="00fd2da4"/>
    </style:style>
    <style:style style:name="T166" style:family="text">
      <style:text-properties officeooo:rsid="007be793"/>
    </style:style>
    <style:style style:name="T167" style:family="text">
      <style:text-properties officeooo:rsid="00aceb0e"/>
    </style:style>
    <style:style style:name="T168" style:family="text">
      <style:text-properties officeooo:rsid="0053cec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<text:span text:style-name="T1">ț</text:span>ie <text:span text:style-name="T2">bloc de calcul</text:span></text:p>
      <text:p text:style-name="P2"/>
      <text:p text:style-name="P2"/>
      <text:p text:style-name="P3"><text:span text:style-name="T3">0</text:span>. <text:span text:style-name="T3">Reprezentarea în </text:span><text:span text:style-name="T4">virgulă</text:span><text:span text:style-name="T3"> fixă, Q16.16</text:span></text:p>
      <text:p text:style-name="P3"/>
      <text:p text:style-name="P4">Pentru proiectul acesta, avem nevoie să reprezentăm într-un anumit mod coordonatele punctelor, de tip numere reale. În acest scop, putem folosi:</text:p>
      <text:list text:style-name="L1">
        <text:list-item>
          <text:p text:style-name="P5">fixed-point, folosește un număr fix de biți pentru partea întreagă, respectiv partea fracțională a numărului</text:p>
        </text:list-item>
        <text:list-item>
          <text:p text:style-name="P5">floating-point, folosește notația științifică (cu exponent/mantissa) ce deplasează dinamic virgula, permițând o gamă mai largă de valori, în detrimentul performanței</text:p>
        </text:list-item>
      </text:list>
      <text:p text:style-name="P4"/>
      <text:p text:style-name="P4">Deoarece precizia scade cu cât numerele devin mai mari în format floating-point, iar această reprezentare necesită mai multe resurse decât ar fi necesar pentru FPGA-ul folosit, am decis să folosesc reprezentarea fixed-point.</text:p>
      <text:p text:style-name="P6"/>
      <text:p text:style-name="P7"><text:span text:style-name="T5">Pentru un număr </text:span><text:span text:style-name="T6">I</text:span><text:span text:style-name="T5"> de biți pentru partea întreagă </text:span><text:span text:style-name="T7">(</text:span><text:span text:style-name="T8">cu</text:span><text:span text:style-name="T7"> semn) </text:span><text:span text:style-name="T5">și </text:span><text:span text:style-name="T6">F</text:span><text:span text:style-name="T5"> biți pentru cea fracțională, </text:span><text:span text:style-name="T9">un număr fixed-point semnat este reprezentat pe</text:span><text:span text:style-name="T10"> </text:span><text:span text:style-name="Strong_20_Emphasis"><text:span text:style-name="T9">I + F biți</text:span></text:span><text:span text:style-name="T9">, unde:</text:span></text:p>
      <text:list text:style-name="L2">
        <text:list-item>
          <text:p text:style-name="P8">bitul <text:span text:style-name="T11">[</text:span>I<text:span text:style-name="T11">+F-</text:span><text:span text:style-name="T12">1</text:span><text:span text:style-name="T11">] <text:s text:c="3"/>-</text:span> bitul de semn</text:p>
        </text:list-item>
        <text:list-item>
          <text:p text:style-name="P8">biții [I<text:span text:style-name="T11">+F</text:span>-<text:span text:style-name="T12">2</text:span>:F] - partea întreagă </text:p>
        </text:list-item>
        <text:list-item>
          <text:p text:style-name="P9">biții [F-1:0] <text:s text:c="4"/>- partea fracțională </text:p>
        </text:list-item>
      </text:list>
      <text:p text:style-name="P10"/>
      <text:p text:style-name="P6">Pentru <text:span text:style-name="T13">codul proiectului am ales să folosesc</text:span> formatul Q16.16, <text:span text:style-name="T13">unde</text:span>:</text:p>
      <text:list text:style-name="L3">
        <text:list-item>
          <text:p text:style-name="P11">bitul <text:span text:style-name="T14">[31] - bitul de semn</text:span></text:p>
        </text:list-item>
        <text:list-item>
          <text:p text:style-name="P12">bi<text:span text:style-name="T1">ț</text:span>ii [30:16] - partea <text:span text:style-name="T1">î</text:span>ntreag<text:span text:style-name="T1">ă</text:span> a num<text:span text:style-name="T1">ă</text:span>rului</text:p>
        </text:list-item>
        <text:list-item>
          <text:p text:style-name="P12">bi<text:span text:style-name="T1">ț</text:span>ii [15:0] – partea frac<text:span text:style-name="T1">ț</text:span>ionar<text:span text:style-name="T1">ă</text:span> a num<text:span text:style-name="T1">ă</text:span>rului</text:p>
        </text:list-item>
      </text:list>
      <text:p text:style-name="P6"/>
      <text:p text:style-name="P13"><text:span text:style-name="Strong_20_Emphasis"><text:span text:style-name="T15">Observație:</text:span></text:span><text:span text:style-name="T15"> În notația Q, bitul de semn este inclus în </text:span><text:span text:style-name="Source_20_Text"><text:span text:style-name="T16">INT_BITS</text:span></text:span><text:span text:style-name="T15">. Astfel, pentru Q16.16, din cei 16 biți alocați părții întregi, bitul </text:span><text:span text:style-name="Source_20_Text"><text:span text:style-name="T17">[31]</text:span></text:span><text:span text:style-name="T15"> este bitul de semn, iar biții </text:span><text:span text:style-name="Source_20_Text"><text:span text:style-name="T17">[30:16]</text:span></text:span><text:span text:style-name="T15"> reprezintă efectiv partea întreagă — rezultând 15 biți utili pentru magnitudine. De aceea intervalul reprezentabil </text:span><text:span text:style-name="T18">al părții întregi </text:span><text:span text:style-name="T15">este asimetric: </text:span><text:span text:style-name="Source_20_Text"><text:span text:style-name="T17">[−32768, +32767], </text:span></text:span><text:span text:style-name="Source_20_Text"><text:span text:style-name="T19">iar valoarea maximă </text:span></text:span><text:span text:style-name="Source_20_Text"><text:span text:style-name="T20">totală </text:span></text:span><text:span text:style-name="Source_20_Text"><text:span text:style-name="T19">în format Q16.16 este [</text:span></text:span><text:span text:style-name="Source_20_Text"><text:span text:style-name="T17">−32768, +32767.</text:span></text:span><text:span text:style-name="Source_20_Text"><text:span text:style-name="T19">99998474121</text:span></text:span><text:span text:style-name="Source_20_Text"><text:span text:style-name="T17">]</text:span></text:span></text:p>
      <text:p text:style-name="P6"/>
      <text:p text:style-name="P14">La modul general, valorile maxime și minime în format Q sunt parametrizabile astfel:</text:p>
      <text:list text:style-name="L4">
        <text:list-item>
          <text:p text:style-name="P15">localparam [TOTAL-1:0] MAX = {1'b0, {(TOTAL-1){1'b1}}};</text:p>
        </text:list-item>
        <text:list-item>
          <text:p text:style-name="P15">localparam [TOTAL-1:0] MIN = {1'b1, {(TOTAL-1){1'b0}}}; </text:p>
        </text:list-item>
      </text:list>
      <text:p text:style-name="P16"><text:span text:style-name="T21">unde</text:span> TOTAL = INT_BITS + FRAC_BITS <text:s/><text:span text:style-name="T22">(I+F)</text:span></text:p>
      <text:p text:style-name="P6"/>
      <text:p text:style-name="P17"><text:soft-page-break/><text:span text:style-name="T23">În format Q16.16, v</text:span><text:span text:style-name="T24">aloarea maximă reprezentabilă este </text:span><text:span text:style-name="T25">MAX = 7FFF_FFFF</text:span><text:span text:style-name="T24"> (+32767.99998474121 în zecimal), </text:span><text:span text:style-name="T26">iar v</text:span><text:span text:style-name="T24">aloarea minimă este </text:span><text:span text:style-name="T25">MIN = 8000_0000</text:span><text:span text:style-name="T24"> (-32768 în zecimal)</text:span><text:span text:style-name="T27"> </text:span></text:p>
      <text:p text:style-name="P18"><text:span text:style-name="T28">Rezoluția este </text:span><text:span text:style-name="T29">RES = </text:span><text:span text:style-name="T30">0000_0001</text:span><text:span text:style-name="T28">, sau 2</text:span><text:span text:style-name="T31">-16</text:span><text:span text:style-name="T32"> = 0.0000152587890625</text:span></text:p>
      <text:p text:style-name="P19"/>
      <text:p text:style-name="P20">Vom vedea ulterior în simulări ce se întâmplă când modificăm formatul Q, de aceea următoarele au numere de biți parametrizabile.</text:p>
      <text:p text:style-name="P2"/>
      <text:p text:style-name="P21">1. Componente aritmetice</text:p>
      <text:p text:style-name="P22"/>
      <text:p text:style-name="P23">1.1. Modul adunare <text:span text:style-name="T33">add_q.</text:span><text:span text:style-name="T34">v</text:span></text:p>
      <text:p text:style-name="P24"/>
      <text:p text:style-name="P25"><text:span text:style-name="T35">Modulul </text:span><text:span text:style-name="Source_20_Text"><text:span text:style-name="T36">add_q</text:span></text:span><text:span text:style-name="T35"> implementează adunarea a două numere fixed-point în format Q </text:span><text:span text:style-name="T37">parametrizabil</text:span><text:span text:style-name="T35">, cu detecție de overflow și saturare.<text:line-break/>Modulul este sincron pe semnalul de ceas și produce rezultatul într-un registru </text:span><text:span text:style-name="T9">pentru a permite integrarea modulului într-un pipeline aritmetic fără a introduce bucle combinatoriale lungi.</text:span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Semnal</text:p>
          </table:table-cell>
          <table:table-cell table:style-name="Table1.A1" office:value-type="string">
            <text:p text:style-name="P26">Direcție</text:p>
          </table:table-cell>
          <table:table-cell table:style-name="Table1.A1" office:value-type="string">
            <text:p text:style-name="P26">Lățime biți</text:p>
          </table:table-cell>
          <table:table-cell table:style-name="Table1.D1" office:value-type="string">
            <text:p text:style-name="P26">Descriere</text:p>
          </table:table-cell>
        </table:table-row>
        <table:table-row>
          <table:table-cell table:style-name="Table1.A2" office:value-type="string">
            <text:p text:style-name="P27">clk</text:p>
          </table:table-cell>
          <table:table-cell table:style-name="Table1.A2" office:value-type="string">
            <text:p text:style-name="P28">input</text:p>
          </table:table-cell>
          <table:table-cell table:style-name="Table1.A2" office:value-type="string">
            <text:p text:style-name="P29">1</text:p>
          </table:table-cell>
          <table:table-cell table:style-name="Table1.D2" office:value-type="string">
            <text:p text:style-name="P30"><text:span text:style-name="T38">s</text:span>emnal de ceas</text:p>
          </table:table-cell>
        </table:table-row>
        <table:table-row>
          <table:table-cell table:style-name="Table1.A2" office:value-type="string">
            <text:p text:style-name="P27">rst_n</text:p>
          </table:table-cell>
          <table:table-cell table:style-name="Table1.A2" office:value-type="string">
            <text:p text:style-name="P28">input</text:p>
          </table:table-cell>
          <table:table-cell table:style-name="Table1.A2" office:value-type="string">
            <text:p text:style-name="P29">1</text:p>
          </table:table-cell>
          <table:table-cell table:style-name="Table1.D2" office:value-type="string">
            <text:p text:style-name="P30"><text:span text:style-name="T38">r</text:span>eset asincron, activ în 0 </text:p>
          </table:table-cell>
        </table:table-row>
        <table:table-row>
          <table:table-cell table:style-name="Table1.A2" office:value-type="string">
            <text:p text:style-name="P27">a</text:p>
          </table:table-cell>
          <table:table-cell table:style-name="Table1.A2" office:value-type="string">
            <text:p text:style-name="P28">input</text:p>
          </table:table-cell>
          <table:table-cell table:style-name="Table1.A2" office:value-type="string">
            <text:p text:style-name="P31">I+F</text:p>
          </table:table-cell>
          <table:table-cell table:style-name="Table1.D2" office:value-type="string">
            <text:p text:style-name="P30"><text:span text:style-name="T38">o</text:span>perand Q</text:p>
          </table:table-cell>
        </table:table-row>
        <table:table-row>
          <table:table-cell table:style-name="Table1.A2" office:value-type="string">
            <text:p text:style-name="P27">b</text:p>
          </table:table-cell>
          <table:table-cell table:style-name="Table1.A2" office:value-type="string">
            <text:p text:style-name="P28">input</text:p>
          </table:table-cell>
          <table:table-cell table:style-name="Table1.A2" office:value-type="string">
            <text:p text:style-name="P31">I+F</text:p>
          </table:table-cell>
          <table:table-cell table:style-name="Table1.D2" office:value-type="string">
            <text:p text:style-name="P30"><text:span text:style-name="T38">o</text:span>perand Q</text:p>
          </table:table-cell>
        </table:table-row>
        <table:table-row>
          <table:table-cell table:style-name="Table1.A2" office:value-type="string">
            <text:p text:style-name="P32">sum</text:p>
          </table:table-cell>
          <table:table-cell table:style-name="Table1.A2" office:value-type="string">
            <text:p text:style-name="P28">output</text:p>
          </table:table-cell>
          <table:table-cell table:style-name="Table1.A2" office:value-type="string">
            <text:p text:style-name="P31">I+F</text:p>
          </table:table-cell>
          <table:table-cell table:style-name="Table1.D2" office:value-type="string">
            <text:p text:style-name="P30">rezultat Q saturat</text:p>
          </table:table-cell>
        </table:table-row>
        <table:table-row>
          <table:table-cell table:style-name="Table1.A2" office:value-type="string">
            <text:p text:style-name="P32">overflow</text:p>
          </table:table-cell>
          <table:table-cell table:style-name="Table1.A2" office:value-type="string">
            <text:p text:style-name="P28">output</text:p>
          </table:table-cell>
          <table:table-cell table:style-name="Table1.A2" office:value-type="string">
            <text:p text:style-name="P29">1</text:p>
          </table:table-cell>
          <table:table-cell table:style-name="Table1.D2" office:value-type="string">
            <text:p text:style-name="P33">flag overflow</text:p>
          </table:table-cell>
        </table:table-row>
      </table:table>
      <text:p text:style-name="P34"/>
      <text:p text:style-name="P35"/>
      <text:p text:style-name="P36">Suma propriu-zisă este reprezentată de firul <text:span text:style-name="T39">raw_sum: raw_sum = a + b</text:span>, <text:span text:style-name="T40">urmând apoi a fi verificată condiția de overflow.</text:span></text:p>
      <text:p text:style-name="P36"/>
      <text:p text:style-name="P37">Cum detectăm overflow la adunare ?</text:p>
      <text:p text:style-name="P38"/>
      <text:p text:style-name="P38">Pentru numere de tip signed <text:span text:style-name="T41">(</text:span>reprezentate în complement față de 2<text:span text:style-name="T41">)</text:span>, dacă operanzii au <text:span text:style-name="T15">același semn</text:span>, iar semnul rezultatului diferă de semnul oricărui operand, atunci ș<text:span text:style-name="T42">tim că </text:span>suma s-<text:span text:style-name="T42">a</text:span> extin<text:span text:style-name="T42">s</text:span> spre bitul de semn, cauzând starea de overflow.</text:p>
      <text:p text:style-name="P38"/>
      <text:p text:style-name="P39">Exemplu: Fie numerele de tip signed pe 5 biți 01011 (+11) și 00111 (+7)</text:p>
      <text:p text:style-name="P40"><text:soft-page-break/></text:p>
      <text:p text:style-name="P41"><text:span text:style-name="T43">Suma va fi </text:span><text:span text:style-name="T15">10010, însă deoarece noi folosim reprezentarea în complement față de 2, </text:span><text:span text:style-name="T44">la final, </text:span><text:span text:style-name="T15">programul va interpreta rezultatul ca fiind -14. Rezultatul actual (18) ar</text:span><text:span text:style-name="T45">e</text:span><text:span text:style-name="T15"> nevoie de un bit suplimentar de date...</text:span></text:p>
      <text:p text:style-name="P40"/>
      <text:p text:style-name="P42">Logica de <text:span text:style-name="T46">detecție overflow</text:span> este:</text:p>
      <text:p text:style-name="P42"/>
      <text:p text:style-name="P43">add_overflow = (~(a[<text:span text:style-name="T47">TOTAL-1</text:span>] ^ b[<text:span text:style-name="T47">TOTAL-1</text:span>])) &amp; (raw_sum[<text:span text:style-name="T47">TOTAL-1</text:span>] ^ a[<text:span text:style-name="T47">TOTAL-1</text:span>])</text:p>
      <text:p text:style-name="P44">Condiția 1:<text:span text:style-name="T21"> </text:span><text:span text:style-name="T48">~(</text:span>a[MSB] ^ b[MSB]<text:span text:style-name="T48">)</text:span> <text:span text:style-name="T21">– </text:span>a<text:span text:style-name="T21"> și </text:span>b<text:span text:style-name="T21"> au </text:span><text:span text:style-name="T49">același</text:span><text:span text:style-name="T21"> </text:span><text:span text:style-name="T49">semn</text:span></text:p>
      <text:p text:style-name="P45">Dacă au semne diferite, rezultatul e mereu în interval — nu poate da overflow:</text:p>
      <text:p text:style-name="P45">(+) + (-) → rezultat mai mic decât cel mai mare operand</text:p>
      <text:p text:style-name="P45">(-) + (+) → rezultat mai mare decât cel mai mic operand</text:p>
      <text:p text:style-name="P45">Dacă au același semn, poți ieși din interval:</text:p>
      <text:p text:style-name="P45">(+) + (+) → poate depăși MAX</text:p>
      <text:p text:style-name="P45">(-) + (-) → poate coborî sub MIN</text:p>
      <text:p text:style-name="P46">Condiția <text:span text:style-name="T50">2</text:span>:<text:span text:style-name="T21"> </text:span><text:span text:style-name="T51">raw_sum[</text:span><text:span text:style-name="T50">MSB</text:span><text:span text:style-name="T51">] ^ a[</text:span><text:span text:style-name="T50">MSB</text:span><text:span text:style-name="T51">]</text:span> <text:span text:style-name="T52">(sau b, rezultatul va fi la fel) –</text:span><text:span text:style-name="T21"> </text:span><text:span text:style-name="T53">semnul rezultatului diferă de semnul oricărui operand</text:span></text:p>
      <text:p text:style-name="P47">Dacă ambii sunt pozitivi, rezultatul ar trebui să fie pozitiv. Dacă a ieșit negativ, s-a produs wrap-around, <text:span text:style-name="T54">deci</text:span> overflow.</text:p>
      <text:p text:style-name="P43"><text:span text:style-name="T55">La final, dacă cele 2 condiții sunt satisfăcute, </text:span><text:span text:style-name="T56">add_overflow</text:span><text:span text:style-name="T55"> va returna 1.</text:span></text:p>
      <text:p text:style-name="P40">Pentru a rezolva această problemă, <text:span text:style-name="T57">avem la dispoziție</text:span> 2 soluții:</text:p>
      <text:p text:style-name="P40"/>
      <text:list text:style-name="L5">
        <text:list-item>
          <text:p text:style-name="P48"><text:span text:style-name="T58">Wrap-around</text:span><text:span text:style-name="T59">: rezultatul pur și simplu continuă mai departe, începând cu cea mai mică valoare posibilă, deoarece datele se extind spre bitul de semn. Deși nu necesită logică extra, rezultatul </text:span>nu mai reprezintă suma matematică reală din cauza wrap-around-ului în complement față de 2.</text:p>
        </text:list-item>
      </text:list>
      <text:p text:style-name="P49"/>
      <text:p text:style-name="P50">0111 (+7) + 0001 (+1) = 1000 (-8) <text:s/>(sare direct la minim)</text:p>
      <text:p text:style-name="P50">1111 (-1) + 0001 (+1) = 0000 <text:s/>(resetare biți de date)</text:p>
      <text:p text:style-name="P49"/>
      <text:list text:continue-numbering="true" text:style-name="L5">
        <text:list-item>
          <text:p text:style-name="P51"><text:span text:style-name="T39">Saturație</text:span> (soluția pe care am și adoptat-o): Rezultatul este <text:span text:style-name="T60">setat</text:span> la MAX sau MIN după depășire. <text:span text:style-name="T61">Avantajul cel mai mare îl reprezintă rezultatul cel mai apropiat de adevăr, chiar dacă necesită logica de detecție și fixare !</text:span></text:p>
        </text:list-item>
      </text:list>
      <text:p text:style-name="P49"><text:soft-page-break/></text:p>
      <text:p text:style-name="P52">0111 (+7) + 0001 (+1) = 0111 (+7) <text:s/><text:span text:style-name="T61">(</text:span>rămâne la MAX<text:span text:style-name="T61">)</text:span></text:p>
      <text:p text:style-name="P52">1000 (-8) + 1111 (-1) = 1000 (-8) <text:span text:style-name="T61">(</text:span>rămâne la MIN<text:span text:style-name="T61">)</text:span></text:p>
      <text:p text:style-name="P53"><text:span text:style-name="T55"/></text:p>
      <text:p text:style-name="P54">Saturația, și implicit rezultatul final, este satisfăcută de linia:</text:p>
      <text:p text:style-name="P55">sum &lt;= add_overflow ? (a[<text:span text:style-name="T62">TOTAL-1</text:span>] ? MIN : MAX) : raw_sum;</text:p>
      <text:p text:style-name="P56">...<text:span text:style-name="T63">sau:</text:span></text:p>
      <text:p text:style-name="P57">DACĂ (add_overflow <text:span text:style-name="T64">=</text:span> 1)</text:p>
      <text:p text:style-name="P58"><text:tab/>DACĂ (a[<text:span text:style-name="T65">TOTAL-1</text:span>] = 1)</text:p>
      <text:p text:style-name="P58"><text:tab/><text:tab/>sum = MIN</text:p>
      <text:p text:style-name="P58"><text:tab/>ALTFEL</text:p>
      <text:p text:style-name="P57"><text:tab/><text:tab/><text:span text:style-name="T64">sum = MAX</text:span></text:p>
      <text:p text:style-name="P57">ALTFEL</text:p>
      <text:p text:style-name="P57"><text:tab/>sum = raw_sum</text:p>
      <text:p text:style-name="P59"/>
      <text:p text:style-name="P60">Practic, <text:span text:style-name="T60">setăm</text:span><text:span text:style-name="T66"> suma finală la MAX/MIN în funcție de flag-ul overflow și bitul de semn al </text:span><text:span text:style-name="T67">oricărui</text:span><text:span text:style-name="T66"> operator, sau la suma brută în caz contrar.</text:span></text:p>
      <text:p text:style-name="P61"><text:span text:style-name="T3">La final, r</text:span>ezultatul <text:span text:style-name="T3">este actualizat pe frontul crescător al semnalului </text:span><text:span text:style-name="T68">clk</text:span><text:span text:style-name="T69">. După reset, ieșirile </text:span><text:span text:style-name="T68">sum</text:span><text:span text:style-name="T69"> și </text:span><text:span text:style-name="T68">overflow</text:span><text:span text:style-name="T69"> sunt setate la 0.</text:span><text:span text:style-name="T21"> </text:span></text:p>
      <text:p text:style-name="P62">Câteva exemple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63">a</text:p>
          </table:table-cell>
          <table:table-cell table:style-name="Table4.A1" office:value-type="string">
            <text:p text:style-name="P63">b</text:p>
          </table:table-cell>
          <table:table-cell table:style-name="Table4.A1" office:value-type="string">
            <text:p text:style-name="P64">Interpretare</text:p>
          </table:table-cell>
          <table:table-cell table:style-name="Table4.A1" office:value-type="string">
            <text:p text:style-name="P63">sum</text:p>
          </table:table-cell>
          <table:table-cell table:style-name="Table4.E1" office:value-type="string">
            <text:p text:style-name="P63">overflow</text:p>
          </table:table-cell>
        </table:table-row>
        <table:table-row>
          <table:table-cell table:style-name="Table4.A2" office:value-type="string">
            <text:p text:style-name="P65">0001_0000</text:p>
          </table:table-cell>
          <table:table-cell table:style-name="Table4.A2" office:value-type="string">
            <text:p text:style-name="P65">0001_0000</text:p>
          </table:table-cell>
          <table:table-cell table:style-name="Table4.A2" office:value-type="string">
            <text:p text:style-name="P66">1.0 + 1.0 = 2.0</text:p>
          </table:table-cell>
          <table:table-cell table:style-name="Table4.A2" office:value-type="string">
            <text:p text:style-name="P65">0002_0000</text:p>
          </table:table-cell>
          <table:table-cell table:style-name="Table4.E2" office:value-type="string">
            <text:p text:style-name="P67">0</text:p>
          </table:table-cell>
        </table:table-row>
        <table:table-row>
          <table:table-cell table:style-name="Table4.A2" office:value-type="string">
            <text:p text:style-name="P66">0000_8000</text:p>
          </table:table-cell>
          <table:table-cell table:style-name="Table4.A2" office:value-type="string">
            <text:p text:style-name="P66">0000_8000</text:p>
          </table:table-cell>
          <table:table-cell table:style-name="Table4.A2" office:value-type="string">
            <text:p text:style-name="P66">0.5 + 0.5 = 1.0</text:p>
          </table:table-cell>
          <table:table-cell table:style-name="Table4.A2" office:value-type="string">
            <text:p text:style-name="P66">0001_0000</text:p>
          </table:table-cell>
          <table:table-cell table:style-name="Table4.E2" office:value-type="string">
            <text:p text:style-name="P66">0</text:p>
          </table:table-cell>
        </table:table-row>
        <table:table-row>
          <table:table-cell table:style-name="Table4.A2" office:value-type="string">
            <text:p text:style-name="P65">7FFF_FFFF</text:p>
          </table:table-cell>
          <table:table-cell table:style-name="Table4.A2" office:value-type="string">
            <text:p text:style-name="P65">0000_0001</text:p>
          </table:table-cell>
          <table:table-cell table:style-name="Table4.A2" office:value-type="string">
            <text:p text:style-name="P66">MAX + <text:span text:style-name="T70">RES</text:span> = MAX</text:p>
          </table:table-cell>
          <table:table-cell table:style-name="Table4.A2" office:value-type="string">
            <text:p text:style-name="P65">7FFF_FFFF</text:p>
          </table:table-cell>
          <table:table-cell table:style-name="Table4.E2" office:value-type="string">
            <text:p text:style-name="P67">1</text:p>
          </table:table-cell>
        </table:table-row>
        <table:table-row>
          <table:table-cell table:style-name="Table4.A2" office:value-type="string">
            <text:p text:style-name="P65">8000_0000</text:p>
          </table:table-cell>
          <table:table-cell table:style-name="Table4.A2" office:value-type="string">
            <text:p text:style-name="P65">FFFF_FFFF</text:p>
          </table:table-cell>
          <table:table-cell table:style-name="Table4.A2" office:value-type="string">
            <text:p text:style-name="P66">MIN + <text:span text:style-name="T71">(</text:span>-<text:span text:style-name="T70">RES</text:span><text:span text:style-name="T71">)</text:span> = MIN</text:p>
          </table:table-cell>
          <table:table-cell table:style-name="Table4.A2" office:value-type="string">
            <text:p text:style-name="P65">8000_0000</text:p>
          </table:table-cell>
          <table:table-cell table:style-name="Table4.E2" office:value-type="string">
            <text:p text:style-name="P67">1</text:p>
          </table:table-cell>
        </table:table-row>
        <table:table-row>
          <table:table-cell table:style-name="Table4.A2" office:value-type="string">
            <text:p text:style-name="P65">FFFF_0000</text:p>
          </table:table-cell>
          <table:table-cell table:style-name="Table4.A2" office:value-type="string">
            <text:p text:style-name="P65">0001_0000</text:p>
          </table:table-cell>
          <table:table-cell table:style-name="Table4.A2" office:value-type="string">
            <text:p text:style-name="P66">-1.0 + 1.0 <text:span text:style-name="T72">= 0.0</text:span></text:p>
          </table:table-cell>
          <table:table-cell table:style-name="Table4.A2" office:value-type="string">
            <text:p text:style-name="P65">0000_0000</text:p>
          </table:table-cell>
          <table:table-cell table:style-name="Table4.E2" office:value-type="string">
            <text:p text:style-name="P68">0</text:p>
          </table:table-cell>
        </table:table-row>
        <table:table-row>
          <table:table-cell table:style-name="Table4.A2" office:value-type="string">
            <text:p text:style-name="P65">0000_0001</text:p>
          </table:table-cell>
          <table:table-cell table:style-name="Table4.A2" office:value-type="string">
            <text:p text:style-name="P65">FFFF_FFFF</text:p>
          </table:table-cell>
          <table:table-cell table:style-name="Table4.A2" office:value-type="string">
            <text:p text:style-name="P69">2^16 <text:span text:style-name="T71">+ (</text:span>-<text:span text:style-name="T70">RES</text:span><text:span text:style-name="T71">) = 0.0</text:span></text:p>
          </table:table-cell>
          <table:table-cell table:style-name="Table4.A2" office:value-type="string">
            <text:p text:style-name="P70">0000_0000</text:p>
          </table:table-cell>
          <table:table-cell table:style-name="Table4.E2" office:value-type="string">
            <text:p text:style-name="P71">0</text:p>
          </table:table-cell>
        </table:table-row>
        <table:table-row>
          <table:table-cell table:style-name="Table4.A2" office:value-type="string">
            <text:p text:style-name="P65">7FFF_0000</text:p>
          </table:table-cell>
          <table:table-cell table:style-name="Table4.A2" office:value-type="string">
            <text:p text:style-name="P65">0001_0000</text:p>
          </table:table-cell>
          <table:table-cell table:style-name="Table4.A2" office:value-type="string">
            <text:p text:style-name="P66">32767.<text:span text:style-name="T73">0</text:span> + 1.<text:span text:style-name="T73">0 = MAX</text:span></text:p>
          </table:table-cell>
          <table:table-cell table:style-name="Table4.A2" office:value-type="string">
            <text:p text:style-name="P72">7FFF_FFFF</text:p>
          </table:table-cell>
          <table:table-cell table:style-name="Table4.E2" office:value-type="string">
            <text:p text:style-name="P73">1</text:p>
          </table:table-cell>
        </table:table-row>
        <table:table-row>
          <table:table-cell table:style-name="Table4.A2" office:value-type="string">
            <text:p text:style-name="P65">4000_0000</text:p>
          </table:table-cell>
          <table:table-cell table:style-name="Table4.A2" office:value-type="string">
            <text:p text:style-name="P65">4000_0000</text:p>
          </table:table-cell>
          <table:table-cell table:style-name="Table4.A2" office:value-type="string">
            <text:p text:style-name="P66">16384.<text:span text:style-name="T74">0</text:span> + 16384.<text:span text:style-name="T74">0 </text:span><text:span text:style-name="T75">= MAX</text:span></text:p>
          </table:table-cell>
          <table:table-cell table:style-name="Table4.A2" office:value-type="string">
            <text:p text:style-name="P65">7FFF_FFFF</text:p>
          </table:table-cell>
          <table:table-cell table:style-name="Table4.E2" office:value-type="string">
            <text:p text:style-name="P74">1</text:p>
          </table:table-cell>
        </table:table-row>
        <text:soft-page-break/>
        <table:table-row>
          <table:table-cell table:style-name="Table4.A2" office:value-type="string">
            <text:p text:style-name="P65">8000_0000</text:p>
          </table:table-cell>
          <table:table-cell table:style-name="Table4.A2" office:value-type="string">
            <text:p text:style-name="P65">FFFF_FFFF</text:p>
          </table:table-cell>
          <table:table-cell table:style-name="Table4.A2" office:value-type="string">
            <text:p text:style-name="P66">MIN + (-<text:span text:style-name="T70">RES</text:span>) <text:span text:style-name="T75">= MIN</text:span></text:p>
          </table:table-cell>
          <table:table-cell table:style-name="Table4.A2" office:value-type="string">
            <text:p text:style-name="P75">8000_0000</text:p>
          </table:table-cell>
          <table:table-cell table:style-name="Table4.E2" office:value-type="string">
            <text:p text:style-name="P76">1</text:p>
          </table:table-cell>
        </table:table-row>
      </table:table>
      <text:p text:style-name="P62"/>
      <text:p text:style-name="P62"/>
      <text:p text:style-name="P23">1.2. Modul scădere <text:span text:style-name="T34">sub_q.v</text:span></text:p>
      <text:p text:style-name="P24"/>
      <text:p text:style-name="P77"><text:span text:style-name="T35">Modulul </text:span><text:span text:style-name="T76">sub</text:span><text:span text:style-name="Source_20_Text"><text:span text:style-name="T36">_q</text:span></text:span><text:span text:style-name="T35"> implementează </text:span><text:span text:style-name="T77">scăderea</text:span><text:span text:style-name="T35"> a două numere fixed-point în format Q </text:span><text:span text:style-name="T78">parametrizabil</text:span><text:span text:style-name="T35">, cu detecție de overflow și saturare.<text:line-break/>Modulul este sincron pe semnalul de ceas și produce rezultatul într-un registru </text:span><text:span text:style-name="T9">pentru a permite integrarea modulului într-un pipeline aritmetic fără a introduce bucle combinatoriale lungi.</text:span></text:p>
      <text:p text:style-name="P78"><text:span text:style-name="T79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9">Semnal</text:p>
          </table:table-cell>
          <table:table-cell table:style-name="Table2.A1" office:value-type="string">
            <text:p text:style-name="P79">Direcție</text:p>
          </table:table-cell>
          <table:table-cell table:style-name="Table2.A1" office:value-type="string">
            <text:p text:style-name="P79">Lățime biți</text:p>
          </table:table-cell>
          <table:table-cell table:style-name="Table2.D1" office:value-type="string">
            <text:p text:style-name="P79">Descriere</text:p>
          </table:table-cell>
        </table:table-row>
        <table:table-row>
          <table:table-cell table:style-name="Table2.A2" office:value-type="string">
            <text:p text:style-name="P80">clk</text:p>
          </table:table-cell>
          <table:table-cell table:style-name="Table2.A2" office:value-type="string">
            <text:p text:style-name="P81">input</text:p>
          </table:table-cell>
          <table:table-cell table:style-name="Table2.A2" office:value-type="string">
            <text:p text:style-name="P82">1</text:p>
          </table:table-cell>
          <table:table-cell table:style-name="Table2.D2" office:value-type="string">
            <text:p text:style-name="P83"><text:span text:style-name="T38">s</text:span>emnal de ceas</text:p>
          </table:table-cell>
        </table:table-row>
        <table:table-row>
          <table:table-cell table:style-name="Table2.A2" office:value-type="string">
            <text:p text:style-name="P80">rst_n</text:p>
          </table:table-cell>
          <table:table-cell table:style-name="Table2.A2" office:value-type="string">
            <text:p text:style-name="P81">input</text:p>
          </table:table-cell>
          <table:table-cell table:style-name="Table2.A2" office:value-type="string">
            <text:p text:style-name="P82">1</text:p>
          </table:table-cell>
          <table:table-cell table:style-name="Table2.D2" office:value-type="string">
            <text:p text:style-name="P83"><text:span text:style-name="T38">r</text:span>eset asincron, activ în 0 </text:p>
          </table:table-cell>
        </table:table-row>
        <table:table-row>
          <table:table-cell table:style-name="Table2.A2" office:value-type="string">
            <text:p text:style-name="P80">a</text:p>
          </table:table-cell>
          <table:table-cell table:style-name="Table2.A2" office:value-type="string">
            <text:p text:style-name="P81">input</text:p>
          </table:table-cell>
          <table:table-cell table:style-name="Table2.A2" office:value-type="string">
            <text:p text:style-name="P84">I+F</text:p>
          </table:table-cell>
          <table:table-cell table:style-name="Table2.D2" office:value-type="string">
            <text:p text:style-name="P83"><text:span text:style-name="T38">o</text:span>perand Q</text:p>
          </table:table-cell>
        </table:table-row>
        <table:table-row>
          <table:table-cell table:style-name="Table2.A2" office:value-type="string">
            <text:p text:style-name="P80">b</text:p>
          </table:table-cell>
          <table:table-cell table:style-name="Table2.A2" office:value-type="string">
            <text:p text:style-name="P81">input</text:p>
          </table:table-cell>
          <table:table-cell table:style-name="Table2.A2" office:value-type="string">
            <text:p text:style-name="P84">I+F</text:p>
          </table:table-cell>
          <table:table-cell table:style-name="Table2.D2" office:value-type="string">
            <text:p text:style-name="P83"><text:span text:style-name="T38">o</text:span>perand Q</text:p>
          </table:table-cell>
        </table:table-row>
        <table:table-row>
          <table:table-cell table:style-name="Table2.A2" office:value-type="string">
            <text:p text:style-name="P85">dif</text:p>
          </table:table-cell>
          <table:table-cell table:style-name="Table2.A2" office:value-type="string">
            <text:p text:style-name="P81">output</text:p>
          </table:table-cell>
          <table:table-cell table:style-name="Table2.A2" office:value-type="string">
            <text:p text:style-name="P84">I+F</text:p>
          </table:table-cell>
          <table:table-cell table:style-name="Table2.D2" office:value-type="string">
            <text:p text:style-name="P83">rezultat Q saturat</text:p>
          </table:table-cell>
        </table:table-row>
        <table:table-row>
          <table:table-cell table:style-name="Table2.A2" office:value-type="string">
            <text:p text:style-name="P86">overflow</text:p>
          </table:table-cell>
          <table:table-cell table:style-name="Table2.A2" office:value-type="string">
            <text:p text:style-name="P81">output</text:p>
          </table:table-cell>
          <table:table-cell table:style-name="Table2.A2" office:value-type="string">
            <text:p text:style-name="P82">1</text:p>
          </table:table-cell>
          <table:table-cell table:style-name="Table2.D2" office:value-type="string">
            <text:p text:style-name="P87">flag overflow</text:p>
          </table:table-cell>
        </table:table-row>
      </table:table>
      <text:p text:style-name="P88"/>
      <text:p text:style-name="P89"><text:span text:style-name="T80">Diferența</text:span> <text:span text:style-name="T80">brută</text:span> este reprezentată de firul <text:span text:style-name="T39">raw_</text:span><text:span text:style-name="T81">dif</text:span><text:span text:style-name="T39">: raw_</text:span><text:span text:style-name="T81">dif</text:span><text:span text:style-name="T39"> = a - b</text:span>, <text:span text:style-name="T40">urmând apoi a fi verificată condiția de overflow.</text:span></text:p>
      <text:p text:style-name="P89"/>
      <text:p text:style-name="P90">Cum detectăm overflow la <text:span text:style-name="T80">scădere</text:span> ?</text:p>
      <text:p text:style-name="P91"/>
      <text:p text:style-name="P92">Ace<text:span text:style-name="T82">e</text:span>ași logică ca la detecția overflow la adunare, dar de data aceasta trebuie să verificăm că <text:span text:style-name="T83">respectivii</text:span> operatori <text:span text:style-name="T84">au</text:span> semne <text:span text:style-name="T15">diferite</text:span>.</text:p>
      <text:p text:style-name="P93"/>
      <text:p text:style-name="P94">Logica de <text:span text:style-name="T85">overflow la scădere</text:span> este:</text:p>
      <text:p text:style-name="P95"><text:span text:style-name="T85">sub</text:span>_overflow = (a[<text:span text:style-name="T86">TOTAL-1</text:span>] ^ b[<text:span text:style-name="T86">TOTAL-1</text:span>]) &amp; (raw_<text:span text:style-name="T87">dif</text:span>[<text:span text:style-name="T86">TOTAL-1</text:span>] ^ a[<text:span text:style-name="T86">TOTAL-1</text:span>])</text:p>
      <text:p text:style-name="P96">Condiția 1:<text:span text:style-name="T21"> </text:span>a[MSB] ^ b[MSB] <text:span text:style-name="T21">– </text:span>a<text:span text:style-name="T21"> și </text:span>b<text:span text:style-name="T21"> au semne diferite</text:span></text:p>
      <text:p text:style-name="P97">Dacă au același semn, rezultatul e mereu în interval — nu poate da overflow:</text:p>
      <text:p text:style-name="P97">(+) - (+) : rezultat mic</text:p>
      <text:p text:style-name="P97">(-) - (-) : rezultat mic</text:p>
      <text:p text:style-name="P97">Dacă au semne diferite, scăzând un negativ din pozitiv (sau invers) poți ieși din interval:</text:p>
      <text:p text:style-name="P97"><text:soft-page-break/>(+) - (-) = (+) + (+) : poate depăși MAX</text:p>
      <text:p text:style-name="P97">(-) - (+) = (-) + (-) : poate coborî sub MIN</text:p>
      <text:p text:style-name="P98">Condiția <text:span text:style-name="T88">2</text:span>:<text:span text:style-name="T21"> </text:span><text:span text:style-name="T88">raw_dif</text:span>[MSB] ^ <text:span text:style-name="T88">a</text:span>[MSB] <text:span text:style-name="T21">– </text:span><text:span text:style-name="T89">semnul rezultatului diferă de semnul lui </text:span><text:span text:style-name="T88">a</text:span></text:p>
      <text:p text:style-name="P99">Dacă <text:span text:style-name="T39">a</text:span> e pozitiv, rezultatul ar trebui să fie pozitiv (sau cel mult să fi depășit MAX). Dacă a ieșit negativ, s-a produs wrap-around, <text:span text:style-name="T88">deci</text:span> overflow.</text:p>
      <text:p text:style-name="P100">Saturația, și implicit rezultatul final, este satisfăcută de linia:</text:p>
      <text:p text:style-name="P95"><text:span text:style-name="T90">dif</text:span> &lt;= <text:span text:style-name="T90">sub</text:span>_overflow ? (a[<text:span text:style-name="T86">TOTAL-1</text:span>] ? MIN : MAX) : raw_<text:span text:style-name="T91">dif</text:span>;</text:p>
      <text:p text:style-name="P101">...<text:span text:style-name="T63">sau:</text:span></text:p>
      <text:p text:style-name="P102">DACĂ (<text:span text:style-name="T92">sub</text:span>_overflow <text:span text:style-name="T64">=</text:span> 1)</text:p>
      <text:p text:style-name="P103"><text:tab/>DACĂ (a[<text:span text:style-name="T86">TOTAL-1</text:span>] = 1)</text:p>
      <text:p text:style-name="P104"><text:tab/><text:tab/><text:span text:style-name="T93">dif</text:span> = MIN</text:p>
      <text:p text:style-name="P104"><text:tab/>ALTFEL</text:p>
      <text:p text:style-name="P102"><text:tab/><text:tab/><text:span text:style-name="T93">dif</text:span><text:span text:style-name="T64"> = MAX</text:span></text:p>
      <text:p text:style-name="P102">ALTFEL</text:p>
      <text:p text:style-name="P105"><text:span text:style-name="T39"><text:tab/></text:span><text:span text:style-name="T94">dif</text:span><text:span text:style-name="T39"> = raw_</text:span><text:span text:style-name="T94">dif</text:span></text:p>
      <text:p text:style-name="P106"><text:span text:style-name="T3">La final, r</text:span>ezultatul <text:span text:style-name="T3">este actualizat pe frontul crescător al semnalului </text:span><text:span text:style-name="T68">clk</text:span><text:span text:style-name="T69">. După reset, ieșirile </text:span><text:span text:style-name="T95">dif</text:span><text:span text:style-name="T69"> și </text:span><text:span text:style-name="T68">overflow</text:span><text:span text:style-name="T69"> sunt setate la 0.</text:span></text:p>
      <text:p text:style-name="P107">Exemple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08">a</text:p>
          </table:table-cell>
          <table:table-cell table:style-name="Table5.A1" office:value-type="string">
            <text:p text:style-name="P108">b</text:p>
          </table:table-cell>
          <table:table-cell table:style-name="Table5.A1" office:value-type="string">
            <text:p text:style-name="P109">Interpretare</text:p>
          </table:table-cell>
          <table:table-cell table:style-name="Table5.A1" office:value-type="string">
            <text:p text:style-name="P110">dif</text:p>
          </table:table-cell>
          <table:table-cell table:style-name="Table5.E1" office:value-type="string">
            <text:p text:style-name="P108">overflow</text:p>
          </table:table-cell>
        </table:table-row>
        <table:table-row>
          <table:table-cell table:style-name="Table5.A2" office:value-type="string">
            <text:p text:style-name="P111">000<text:span text:style-name="T96">2</text:span>_0000</text:p>
          </table:table-cell>
          <table:table-cell table:style-name="Table5.A2" office:value-type="string">
            <text:p text:style-name="P111">0001_0000</text:p>
          </table:table-cell>
          <table:table-cell table:style-name="Table5.A2" office:value-type="string">
            <text:p text:style-name="P112"><text:span text:style-name="T96">2</text:span>.0 - 1.0 = <text:span text:style-name="T96">1</text:span>.0</text:p>
          </table:table-cell>
          <table:table-cell table:style-name="Table5.A2" office:value-type="string">
            <text:p text:style-name="P111">000<text:span text:style-name="T96">1</text:span>_0000</text:p>
          </table:table-cell>
          <table:table-cell table:style-name="Table5.E2" office:value-type="string">
            <text:p text:style-name="P113">0</text:p>
          </table:table-cell>
        </table:table-row>
        <table:table-row>
          <table:table-cell table:style-name="Table5.A2" office:value-type="string">
            <text:p text:style-name="P112">000<text:span text:style-name="T97">1</text:span>_<text:span text:style-name="T97">0</text:span>000</text:p>
          </table:table-cell>
          <table:table-cell table:style-name="Table5.A2" office:value-type="string">
            <text:p text:style-name="P112">000<text:span text:style-name="T97">1</text:span>_<text:span text:style-name="T97">0</text:span>000</text:p>
          </table:table-cell>
          <table:table-cell table:style-name="Table5.A2" office:value-type="string">
            <text:p text:style-name="P112"><text:span text:style-name="T97">1</text:span>.<text:span text:style-name="T97">0</text:span> - <text:span text:style-name="T97">1</text:span>.<text:span text:style-name="T97">0</text:span> = <text:span text:style-name="T97">0</text:span>.0</text:p>
          </table:table-cell>
          <table:table-cell table:style-name="Table5.A2" office:value-type="string">
            <text:p text:style-name="P112">000<text:span text:style-name="T98">0</text:span>_0000</text:p>
          </table:table-cell>
          <table:table-cell table:style-name="Table5.E2" office:value-type="string">
            <text:p text:style-name="P112">0</text:p>
          </table:table-cell>
        </table:table-row>
        <table:table-row>
          <table:table-cell table:style-name="Table5.A2" office:value-type="string">
            <text:p text:style-name="P114">0000_0001</text:p>
          </table:table-cell>
          <table:table-cell table:style-name="Table5.A2" office:value-type="string">
            <text:p text:style-name="P111">0000_0001</text:p>
          </table:table-cell>
          <table:table-cell table:style-name="Table5.A2" office:value-type="string">
            <text:p text:style-name="P112"><text:span text:style-name="T99">RES</text:span> - <text:span text:style-name="T70">RES</text:span> = <text:span text:style-name="T99">0.0</text:span></text:p>
          </table:table-cell>
          <table:table-cell table:style-name="Table5.A2" office:value-type="string">
            <text:p text:style-name="P115">000<text:span text:style-name="T98">0</text:span>_0000</text:p>
          </table:table-cell>
          <table:table-cell table:style-name="Table5.E2" office:value-type="string">
            <text:p text:style-name="P114">0</text:p>
          </table:table-cell>
        </table:table-row>
        <table:table-row>
          <table:table-cell table:style-name="Table5.A2" office:value-type="string">
            <text:p text:style-name="P111">7FFF_FFFF</text:p>
          </table:table-cell>
          <table:table-cell table:style-name="Table5.A2" office:value-type="string">
            <text:p text:style-name="P116">FFFF_0000</text:p>
          </table:table-cell>
          <table:table-cell table:style-name="Table5.A2" office:value-type="string">
            <text:p text:style-name="P112"><text:span text:style-name="T100">MAX</text:span> - <text:span text:style-name="T71">(</text:span>-<text:span text:style-name="T100">1.0</text:span><text:span text:style-name="T71">)</text:span> = <text:span text:style-name="T100">MAX</text:span></text:p>
          </table:table-cell>
          <table:table-cell table:style-name="Table5.A2" office:value-type="string">
            <text:p text:style-name="P117">7FFF_FFFF</text:p>
          </table:table-cell>
          <table:table-cell table:style-name="Table5.E2" office:value-type="string">
            <text:p text:style-name="P113">1</text:p>
          </table:table-cell>
        </table:table-row>
        <table:table-row>
          <table:table-cell table:style-name="Table5.A2" office:value-type="string">
            <text:p text:style-name="P111">7FFF_0000</text:p>
          </table:table-cell>
          <table:table-cell table:style-name="Table5.A2" office:value-type="string">
            <text:p text:style-name="P111">FFFF_0000</text:p>
          </table:table-cell>
          <table:table-cell table:style-name="Table5.A2" office:value-type="string">
            <text:p text:style-name="P112">32767.<text:span text:style-name="T101">0</text:span> − (-1.<text:span text:style-name="T101">0</text:span>) <text:span text:style-name="T102">= MAX</text:span></text:p>
          </table:table-cell>
          <table:table-cell table:style-name="Table5.A2" office:value-type="string">
            <text:p text:style-name="P111">7FFF_FFFF</text:p>
          </table:table-cell>
          <table:table-cell table:style-name="Table5.E2" office:value-type="string">
            <text:p text:style-name="P118">1</text:p>
          </table:table-cell>
        </table:table-row>
        <table:table-row>
          <table:table-cell table:style-name="Table5.A2" office:value-type="string">
            <text:p text:style-name="P111">8000_0000</text:p>
          </table:table-cell>
          <table:table-cell table:style-name="Table5.A2" office:value-type="string">
            <text:p text:style-name="P111">0001_0000</text:p>
          </table:table-cell>
          <table:table-cell table:style-name="Table5.A2" office:value-type="string">
            <text:p text:style-name="P112">MIN − 1.<text:span text:style-name="T103">0 </text:span><text:span text:style-name="T102">= MIN</text:span></text:p>
          </table:table-cell>
          <table:table-cell table:style-name="Table5.A2" office:value-type="string">
            <text:p text:style-name="P111">8000_0000</text:p>
          </table:table-cell>
          <table:table-cell table:style-name="Table5.E2" office:value-type="string">
            <text:p text:style-name="P119">1</text:p>
          </table:table-cell>
        </table:table-row>
        <table:table-row>
          <table:table-cell table:style-name="Table5.A2" office:value-type="string">
            <text:p text:style-name="P111">8000_0000</text:p>
          </table:table-cell>
          <table:table-cell table:style-name="Table5.A2" office:value-type="string">
            <text:p text:style-name="P111">0000_0001</text:p>
          </table:table-cell>
          <table:table-cell table:style-name="Table5.A2" office:value-type="string">
            <text:p text:style-name="P112">MIN − <text:span text:style-name="T104">RES </text:span><text:span text:style-name="T102">= MIN</text:span></text:p>
          </table:table-cell>
          <table:table-cell table:style-name="Table5.A2" office:value-type="string">
            <text:p text:style-name="P111">8000_0000</text:p>
          </table:table-cell>
          <table:table-cell table:style-name="Table5.E2" office:value-type="string">
            <text:p text:style-name="P120">1</text:p>
          </table:table-cell>
        </table:table-row>
        <table:table-row>
          <table:table-cell table:style-name="Table5.A2" office:value-type="string">
            <text:p text:style-name="P111">FFFF_0000</text:p>
          </table:table-cell>
          <table:table-cell table:style-name="Table5.A2" office:value-type="string">
            <text:p text:style-name="P111">0001_0000</text:p>
          </table:table-cell>
          <table:table-cell table:style-name="Table5.A2" office:value-type="string">
            <text:p text:style-name="P112">-1.<text:span text:style-name="T104">0</text:span> − 1.<text:span text:style-name="T104">0 = -2.0</text:span></text:p>
          </table:table-cell>
          <table:table-cell table:style-name="Table5.A2" office:value-type="string">
            <text:p text:style-name="P111">FFFE_0000</text:p>
          </table:table-cell>
          <table:table-cell table:style-name="Table5.E2" office:value-type="string">
            <text:p text:style-name="P120">0</text:p>
          </table:table-cell>
        </table:table-row>
        <text:soft-page-break/>
        <table:table-row>
          <table:table-cell table:style-name="Table5.A2" office:value-type="string">
            <text:p text:style-name="P111">4000_0000</text:p>
          </table:table-cell>
          <table:table-cell table:style-name="Table5.A2" office:value-type="string">
            <text:p text:style-name="P111">C000_0000</text:p>
          </table:table-cell>
          <table:table-cell table:style-name="Table5.A2" office:value-type="string">
            <text:p text:style-name="P112">16384.<text:span text:style-name="T105">0</text:span> − (-16384.<text:span text:style-name="T105">0</text:span>) <text:span text:style-name="T105">= MAX</text:span></text:p>
          </table:table-cell>
          <table:table-cell table:style-name="Table5.A2" office:value-type="string">
            <text:p text:style-name="P111">7FFF_FFFF</text:p>
          </table:table-cell>
          <table:table-cell table:style-name="Table5.E2" office:value-type="string">
            <text:p text:style-name="P121">1</text:p>
          </table:table-cell>
        </table:table-row>
      </table:table>
      <text:p text:style-name="P122"/>
      <text:p text:style-name="P107"/>
      <text:p text:style-name="P23">1.3. Modul înmulțire <text:span text:style-name="T106">mult_q.v</text:span></text:p>
      <text:p text:style-name="P23"/>
      <text:p text:style-name="P123"><text:span text:style-name="T35">Modulul </text:span><text:span text:style-name="T107">mult</text:span><text:span text:style-name="Source_20_Text"><text:span text:style-name="T36">_q</text:span></text:span><text:span text:style-name="T35"> implementează </text:span><text:span text:style-name="T108">înmulțirea</text:span><text:span text:style-name="T35"> a două numere fixed-point în format Q </text:span><text:span text:style-name="T109">parametrizabil</text:span><text:span text:style-name="T35">, cu detecție de overflow și saturare.<text:line-break/>Modulul este sincron pe semnalul de ceas și produce rezultatul într-un registru </text:span><text:span text:style-name="T9">pentru a permite integrarea modulului într-un pipeline aritmetic fără a introduce bucle combinatoriale lungi.</text:span></text:p>
      <text:p text:style-name="P124"><text:span text:style-name="T79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5">Semnal</text:p>
          </table:table-cell>
          <table:table-cell table:style-name="Table3.A1" office:value-type="string">
            <text:p text:style-name="P125">Direcție</text:p>
          </table:table-cell>
          <table:table-cell table:style-name="Table3.A1" office:value-type="string">
            <text:p text:style-name="P125">Lățime biți</text:p>
          </table:table-cell>
          <table:table-cell table:style-name="Table3.D1" office:value-type="string">
            <text:p text:style-name="P125">Descriere</text:p>
          </table:table-cell>
        </table:table-row>
        <table:table-row>
          <table:table-cell table:style-name="Table3.A2" office:value-type="string">
            <text:p text:style-name="P126">clk</text:p>
          </table:table-cell>
          <table:table-cell table:style-name="Table3.A2" office:value-type="string">
            <text:p text:style-name="P127">input</text:p>
          </table:table-cell>
          <table:table-cell table:style-name="Table3.A2" office:value-type="string">
            <text:p text:style-name="P128">1</text:p>
          </table:table-cell>
          <table:table-cell table:style-name="Table3.D2" office:value-type="string">
            <text:p text:style-name="P129"><text:span text:style-name="T38">s</text:span>emnal de ceas</text:p>
          </table:table-cell>
        </table:table-row>
        <table:table-row>
          <table:table-cell table:style-name="Table3.A2" office:value-type="string">
            <text:p text:style-name="P126">rst_n</text:p>
          </table:table-cell>
          <table:table-cell table:style-name="Table3.A2" office:value-type="string">
            <text:p text:style-name="P127">input</text:p>
          </table:table-cell>
          <table:table-cell table:style-name="Table3.A2" office:value-type="string">
            <text:p text:style-name="P128">1</text:p>
          </table:table-cell>
          <table:table-cell table:style-name="Table3.D2" office:value-type="string">
            <text:p text:style-name="P129"><text:span text:style-name="T38">r</text:span>eset asincron, activ în 0 </text:p>
          </table:table-cell>
        </table:table-row>
        <table:table-row>
          <table:table-cell table:style-name="Table3.A2" office:value-type="string">
            <text:p text:style-name="P126">a</text:p>
          </table:table-cell>
          <table:table-cell table:style-name="Table3.A2" office:value-type="string">
            <text:p text:style-name="P127">input</text:p>
          </table:table-cell>
          <table:table-cell table:style-name="Table3.A2" office:value-type="string">
            <text:p text:style-name="P130">I+F</text:p>
          </table:table-cell>
          <table:table-cell table:style-name="Table3.D2" office:value-type="string">
            <text:p text:style-name="P129"><text:span text:style-name="T38">o</text:span>perand Q</text:p>
          </table:table-cell>
        </table:table-row>
        <table:table-row>
          <table:table-cell table:style-name="Table3.A2" office:value-type="string">
            <text:p text:style-name="P126">b</text:p>
          </table:table-cell>
          <table:table-cell table:style-name="Table3.A2" office:value-type="string">
            <text:p text:style-name="P127">input</text:p>
          </table:table-cell>
          <table:table-cell table:style-name="Table3.A2" office:value-type="string">
            <text:p text:style-name="P130">I+F</text:p>
          </table:table-cell>
          <table:table-cell table:style-name="Table3.D2" office:value-type="string">
            <text:p text:style-name="P129"><text:span text:style-name="T38">o</text:span>perand Q</text:p>
          </table:table-cell>
        </table:table-row>
        <table:table-row>
          <table:table-cell table:style-name="Table3.A2" office:value-type="string">
            <text:p text:style-name="P131">result</text:p>
          </table:table-cell>
          <table:table-cell table:style-name="Table3.A2" office:value-type="string">
            <text:p text:style-name="P127">output</text:p>
          </table:table-cell>
          <table:table-cell table:style-name="Table3.A2" office:value-type="string">
            <text:p text:style-name="P130">I+F</text:p>
          </table:table-cell>
          <table:table-cell table:style-name="Table3.D2" office:value-type="string">
            <text:p text:style-name="P129">rezultat Q saturat</text:p>
          </table:table-cell>
        </table:table-row>
        <table:table-row>
          <table:table-cell table:style-name="Table3.A2" office:value-type="string">
            <text:p text:style-name="P132">overflow</text:p>
          </table:table-cell>
          <table:table-cell table:style-name="Table3.A2" office:value-type="string">
            <text:p text:style-name="P127">output</text:p>
          </table:table-cell>
          <table:table-cell table:style-name="Table3.A2" office:value-type="string">
            <text:p text:style-name="P128">1</text:p>
          </table:table-cell>
          <table:table-cell table:style-name="Table3.D2" office:value-type="string">
            <text:p text:style-name="P133">flag overflow</text:p>
          </table:table-cell>
        </table:table-row>
      </table:table>
      <text:p text:style-name="P134"/>
      <text:p text:style-name="P135"><text:span text:style-name="T9">Pentru a evita utilizarea tipului </text:span><text:span text:style-name="T110">signed</text:span><text:span text:style-name="T9">, operanzii sunt transformați mai întâi în </text:span><text:span text:style-name="Strong_20_Emphasis"><text:span text:style-name="T9">valori absolute</text:span></text:span><text:span text:style-name="T9">, </text:span><text:span text:style-name="T111">asignate </text:span><text:span text:style-name="T112">de</text:span><text:span text:style-name="T111"> firele </text:span><text:span text:style-name="T113">abs_a</text:span><text:span text:style-name="T111"> și </text:span><text:span text:style-name="T113">abs_b</text:span><text:span text:style-name="T114">,</text:span><text:span text:style-name="T9"> iar semnul rezultatului este determinat separat.</text:span></text:p>
      <text:p text:style-name="P136"/>
      <text:p text:style-name="P137">Semnul produsului este determinat cu ajutorul unei porți XOR aplicate pe biții de semn ai operanzilor:</text:p>
      <text:p text:style-name="P137"/>
      <text:p text:style-name="P138">result_sign = a[<text:span text:style-name="T115">TOTAL-1</text:span>] ^ b[<text:span text:style-name="T115">TOTAL-1</text:span>]</text:p>
      <text:p text:style-name="P137"/>
      <text:p text:style-name="P139"><text:span text:style-name="T116">Dacă operanzii au semne diferite, rezultatul va fi negativ. </text:span><text:span text:style-name="T9">Operatorii sunt convertiți în valori absolute folosind reprezentarea în </text:span><text:span text:style-name="Strong_20_Emphasis"><text:span text:style-name="T9">complement față de 2</text:span></text:span><text:span text:style-name="T9">:</text:span></text:p>
      <text:p text:style-name="P140">abs_a = a[<text:span text:style-name="T115">TOTAL-1</text:span>] ? (~a + 1) : a</text:p>
      <text:p text:style-name="P140">abs_b = b[<text:span text:style-name="T115">TOTAL-1</text:span>] ? (~b + 1) : b</text:p>
      <text:p text:style-name="P141"/>
      <text:p text:style-name="P142"><text:span text:style-name="T117">Dacă bitul de semn este </text:span><text:span text:style-name="Source_20_Text"><text:span text:style-name="T9">1</text:span></text:span><text:span text:style-name="T117">, numărul este negativ și se calculează valoarea absolută.</text:span></text:p>
      <text:p text:style-name="P143"><text:span text:style-name="T21">Produsul brut este asignat de firul </text:span>raw_product = a<text:span text:style-name="T118">bs_a</text:span> * <text:span text:style-name="T118">a</text:span>b<text:span text:style-name="T118">s_b</text:span>. <text:span text:style-name="T21">Trebuie ținut cont că produsul </text:span><text:span text:style-name="T119">dintre 2 numere pe N biți </text:span><text:span text:style-name="T21">se va extinde pe 2*N biți</text:span><text:span text:style-name="T120">:</text:span></text:p>
      <text:p text:style-name="P144"><text:soft-page-break/></text:p>
      <text:p text:style-name="P145">a: INT_BITS . FRAC_BITS <text:tab/><text:tab/><text:tab/>(virgula la poziția FRAC_BITS)</text:p>
      <text:p text:style-name="P145">b: INT_BITS . FRAC_BITS<text:tab/><text:tab/> <text:s text:c="12"/>(virgula la poziția FRAC_BITS)</text:p>
      <text:p text:style-name="P145">raw_product: 2*INT_BITS . 2*FRAC_BITS (virgula la poziția 2*FRAC_BITS)</text:p>
      <text:p text:style-name="P145"/>
      <text:p text:style-name="P146"><text:span text:style-name="T9">Pentru a reveni la formatul </text:span><text:span text:style-name="Strong_20_Emphasis"><text:span text:style-name="T117">Q </text:span></text:span><text:span text:style-name="Strong_20_Emphasis"><text:span text:style-name="T121">dorit</text:span></text:span><text:span text:style-name="T9">, rezultatul trebuie deplasat la dreapta cu </text:span><text:span text:style-name="Strong_20_Emphasis"><text:span text:style-name="T122">FRAC_BITS</text:span></text:span><text:span text:style-name="Strong_20_Emphasis"><text:span text:style-name="T121">:</text:span></text:span></text:p>
      <text:p text:style-name="P147">shifted = raw_product &gt;&gt; <text:s/><text:span text:style-name="T115">FRAC_BITS</text:span></text:p>
      <text:p text:style-name="P148"><text:span text:style-name="T123">După această operație, rezultatul intermediar se află pe </text:span><text:span text:style-name="T124">2*TOTAL</text:span><text:span text:style-name="T123"> biți, </text:span><text:span text:style-name="T125">cu</text:span></text:p>
      <text:p text:style-name="P148"><text:span text:style-name="Source_20_Text"><text:span text:style-name="T126">shifted: 2*INT_BITS . FRAC_BITS <text:s/>(virgula la pozitia FRAC_BITS)</text:span></text:span></text:p>
      <text:p text:style-name="P149"><text:span text:style-name="T123">dar doar </text:span><text:span text:style-name="T127">TOTAL</text:span><text:span text:style-name="Strong_20_Emphasis"><text:span text:style-name="T128"> biți pot fi reprezentați în formatul final</text:span></text:span><text:span text:style-name="T123">.</text:span></text:p>
      <text:p text:style-name="P149"><text:span text:style-name="T129">Cum detectăm overflow la </text:span><text:span text:style-name="T130">înmulțire</text:span><text:span text:style-name="T129"> ?</text:span></text:p>
      <text:p text:style-name="P150">Overflow apare atunci când rezultatul nu poate fi reprezentat în intervalul MIN-MAX; cu toate acestea, verificarea depinde de semnul rezultatului.</text:p>
      <text:p text:style-name="P150"/>
      <text:p text:style-name="P151"><text:span text:style-name="T131">OVERFLOW POZITIV</text:span></text:p>
      <text:p text:style-name="P152">Într-un număr pozitiv pe <text:span text:style-name="T132">TOTAL</text:span> biți, bitul <text:span text:style-name="T133">de semn</text:span> trebuie să fie 0 și nu trebuie să existe biți de 1 mai sus. <text:span text:style-name="T134">V</text:span>erificarea se implementează prin:</text:p>
      <text:p text:style-name="P55">pos_overflow = !result_sign &amp;&amp; (|shifted[2*TOTAL-1 : TOTAL-1])</text:p>
      <text:p text:style-name="P153"><text:span text:style-name="T135">Operatorul | calculează bit-cu-bit funcția OR între toți biții </text:span><text:span text:style-name="T136">[2*TOTAL-1 : TOTAL-1]</text:span><text:span text:style-name="T135">. </text:span><text:span text:style-name="T9">Dacă oricare din acești biți este 1, magnitudinea nu încape în </text:span><text:span text:style-name="T137">TOTAL</text:span><text:span text:style-name="T9"> biți semnați. Includem bitul </text:span><text:span text:style-name="Source_20_Text"><text:span text:style-name="T138">TOTAL-1</text:span></text:span><text:span text:style-name="T9"> în test deoarece, pentru un rezultat pozitiv, acesta trebuie să fie 0 — altfel ar fi interpretat ca sign bit negativ.</text:span></text:p>
      <text:p text:style-name="P154"/>
      <text:p text:style-name="P155"><text:span text:style-name="T15">OVERFLOW </text:span><text:span text:style-name="T139">NEGATIV</text:span></text:p>
      <text:p text:style-name="P156"><text:span text:style-name="T140">Dacă rezultatul ar trebui să fie negativ (</text:span><text:span text:style-name="Source_20_Text"><text:span text:style-name="T140">result_sign = 1</text:span></text:span><text:span text:style-name="T140">), verific</text:span><text:span text:style-name="T141">ăm</text:span><text:span text:style-name="T140"> dacă valoarea absolută depășește intervalul reprezentabil pentru numere negative. </text:span><text:span text:style-name="T142">Pentru numere negative în complement față de 2, limita absolută este </text:span><text:span text:style-name="T143">MIN = </text:span><text:span text:style-name="T144">2^(TOTAL-1)</text:span><text:span text:style-name="T143"> </text:span><text:span text:style-name="T144">(</text:span><text:span text:style-name="T145">0x8000….0000</text:span><text:span text:style-name="T144">)</text:span><text:span text:style-name="T145">.</text:span></text:p>
      <text:p text:style-name="P157"><text:span text:style-name="T146">De aceea, verificarea este</text:span>:</text:p>
      <text:p text:style-name="P157"/>
      <text:p text:style-name="P158"><text:span text:style-name="T9">neg_overflow = <text:s/>result_sign &amp;&amp; (|shifted[2*TOTAL-1 : TOTAL] || (shifted[TOTAL-1:0] &gt; MIN))</text:span></text:p>
      <text:list text:style-name="L6">
        <text:list-item>
          <text:p text:style-name="P159"><text:span text:style-name="Source_20_Text"><text:span text:style-name="T138">|shifted[2*TOTAL-1 : TOTAL]</text:span></text:span> — există biți nenuli strict deasupra bitului <text:span text:style-name="Source_20_Text"><text:span text:style-name="T138">TOTAL-1</text:span></text:span>; magnitudinea depășește <text:span text:style-name="Source_20_Text"><text:span text:style-name="T138">TOTAL</text:span></text:span> biți, overflow clar</text:p>
        </text:list-item>
        <text:list-item>
          <text:p text:style-name="P160"><text:soft-page-break/><text:span text:style-name="Source_20_Text"><text:span text:style-name="T140">shifted[TOTAL-1:0] &gt; MIN —</text:span></text:span><text:span text:style-name="T140"> </text:span><text:span text:style-name="T147">toți biții de sus</text:span><text:span text:style-name="T140"> sunt 0, dar magnitudinea </text:span><text:span text:style-name="T148">în </text:span><text:span text:style-name="T149">TOTAL</text:span><text:span text:style-name="T148"> biți</text:span><text:span text:style-name="T140"> </text:span><text:span text:style-name="T144">depășește</text:span><text:span text:style-name="T140"> </text:span><text:span text:style-name="Source_20_Text"><text:span text:style-name="T140">2^</text:span></text:span><text:span text:style-name="Source_20_Text"><text:span text:style-name="T144">(TOTAL-1);</text:span></text:span><text:span text:style-name="T140"> </text:span><text:span text:style-name="T150">p</text:span><text:span text:style-name="T140">entru negativ putem reprezenta exact </text:span><text:span text:style-name="Source_20_Text"><text:span text:style-name="T150">MIN</text:span></text:span><text:span text:style-name="T140"> (care corespunde </text:span><text:span text:style-name="Source_20_Text"><text:span text:style-name="T140">-2^</text:span></text:span><text:span text:style-name="Source_20_Text"><text:span text:style-name="T151">(TOTAL-1)</text:span></text:span><text:span text:style-name="T140">), dar orice magnitudine mai mare nu încape, </text:span><text:span text:style-name="T152">deci</text:span><text:span text:style-name="T140"> overflow.</text:span></text:p>
        </text:list-item>
      </text:list>
      <text:p text:style-name="P161">Diferența față de cazul pozitiv: pragul este <text:span text:style-name="Source_20_Text"><text:span text:style-name="T138">TOTAL-1</text:span></text:span> biți utili pentru pozitiv, respectiv <text:span text:style-name="Source_20_Text"><text:span text:style-name="T138">TOTAL</text:span></text:span> biți (cu magnitudinea ≤ <text:span text:style-name="Source_20_Text"><text:span text:style-name="T138">MIN</text:span></text:span>) pentru negativ — asimetria clasică a complementului față de 2.</text:p>
      <text:p text:style-name="P161">Overflow-ul final este obținut prin:</text:p>
      <text:p text:style-name="P162">comb_overflow = pos_overflow || neg_overflow</text:p>
      <text:p text:style-name="P162"/>
      <text:p text:style-name="P163">APLICAREA SEMNULUI</text:p>
      <text:p text:style-name="P163"/>
      <text:p text:style-name="P164"><text:span text:style-name="T153">După calcularea produsului pe valori absolute, semnul este reaplicat. </text:span>Dacă rezultatul trebuie să fie negativ, se aplică din nou complementul față de 2:</text:p>
      <text:p text:style-name="P164"/>
      <text:p text:style-name="P165">neg_result = ~shifted[<text:span text:style-name="T154">TOTAL-1</text:span>:0] + 1</text:p>
      <text:p text:style-name="P164"/>
      <text:p text:style-name="P166">Rezultatul final devine:</text:p>
      <text:p text:style-name="P166"/>
      <text:p text:style-name="P165">final_result = result_sign ? neg_result : shifted[<text:span text:style-name="T155">TOTAL-1</text:span>:0]</text:p>
      <text:p text:style-name="P164"/>
      <text:p text:style-name="P167">APLICAREA SATURAȚIEI</text:p>
      <text:p text:style-name="P167"/>
      <text:p text:style-name="P164">Dacă apare overflow, rezultatul este saturat la valorile limită ale formatului Q16.16:</text:p>
      <text:p text:style-name="P164"/>
      <text:p text:style-name="P165">result &lt;= comb_overflow ? (result_sign ? MIN : MAX) : final_result</text:p>
      <text:p text:style-name="P165"/>
      <text:p text:style-name="P168">...<text:span text:style-name="T63">sau:</text:span></text:p>
      <text:p text:style-name="P169">DACĂ (<text:span text:style-name="T156">comb</text:span>_overflow <text:span text:style-name="T64">=</text:span> 1)</text:p>
      <text:p text:style-name="P170"><text:tab/>DACĂ (<text:span text:style-name="T156">result_sign</text:span> = 1)</text:p>
      <text:p text:style-name="P170"><text:tab/><text:tab/><text:span text:style-name="T157">result</text:span> = MIN</text:p>
      <text:p text:style-name="P170"><text:tab/>ALTFEL</text:p>
      <text:p text:style-name="P169"><text:tab/><text:tab/><text:span text:style-name="T157">result</text:span><text:span text:style-name="T64"> = MAX</text:span></text:p>
      <text:p text:style-name="P169">ALTFEL</text:p>
      <text:p text:style-name="P171"><text:span text:style-name="T39"><text:tab/></text:span><text:span text:style-name="T158">result</text:span><text:span text:style-name="T39"> = </text:span><text:span text:style-name="T159">final_result</text:span></text:p>
      <text:p text:style-name="P172"><text:soft-page-break/><text:span text:style-name="T3">La final, r</text:span>ezultatul <text:span text:style-name="T3">este actualizat pe frontul crescător al semnalului </text:span><text:span text:style-name="T68">clk</text:span><text:span text:style-name="T3">. După reset, ieșirile </text:span><text:span text:style-name="T160">result</text:span><text:span text:style-name="T3"> și </text:span><text:span text:style-name="T68">overflow</text:span><text:span text:style-name="T3"> sunt setate la 0.</text:span></text:p>
      <text:p text:style-name="P173">Exemple:</text:p>
      <text:p text:style-name="P17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74">a</text:p>
          </table:table-cell>
          <table:table-cell table:style-name="Table6.A1" office:value-type="string">
            <text:p text:style-name="P174">b</text:p>
          </table:table-cell>
          <table:table-cell table:style-name="Table6.A1" office:value-type="string">
            <text:p text:style-name="P175">Interpretare</text:p>
          </table:table-cell>
          <table:table-cell table:style-name="Table6.A1" office:value-type="string">
            <text:p text:style-name="P176">result</text:p>
          </table:table-cell>
          <table:table-cell table:style-name="Table6.E1" office:value-type="string">
            <text:p text:style-name="P174">overflow</text:p>
          </table:table-cell>
        </table:table-row>
        <table:table-row>
          <table:table-cell table:style-name="Table6.A2" office:value-type="string">
            <text:p text:style-name="P177">000<text:span text:style-name="T96">2</text:span>_0000</text:p>
          </table:table-cell>
          <table:table-cell table:style-name="Table6.A2" office:value-type="string">
            <text:p text:style-name="P177">0001_0000</text:p>
          </table:table-cell>
          <table:table-cell table:style-name="Table6.A2" office:value-type="string">
            <text:p text:style-name="P178"><text:span text:style-name="T96">2</text:span>.0 <text:span text:style-name="T161">*</text:span> 1.0 = <text:span text:style-name="T161">2</text:span>.0</text:p>
          </table:table-cell>
          <table:table-cell table:style-name="Table6.A2" office:value-type="string">
            <text:p text:style-name="P177">000<text:span text:style-name="T161">2</text:span>_0000</text:p>
          </table:table-cell>
          <table:table-cell table:style-name="Table6.E2" office:value-type="string">
            <text:p text:style-name="P179">0</text:p>
          </table:table-cell>
        </table:table-row>
        <table:table-row>
          <table:table-cell table:style-name="Table6.A2" office:value-type="string">
            <text:p text:style-name="P178">000<text:span text:style-name="T97">1</text:span>_<text:span text:style-name="T97">0</text:span>000</text:p>
          </table:table-cell>
          <table:table-cell table:style-name="Table6.A2" office:value-type="string">
            <text:p text:style-name="P178"><text:span text:style-name="T162">FFFF</text:span>_<text:span text:style-name="T97">0</text:span>000</text:p>
          </table:table-cell>
          <table:table-cell table:style-name="Table6.A2" office:value-type="string">
            <text:p text:style-name="P178"><text:span text:style-name="T97">1</text:span>.<text:span text:style-name="T97">0</text:span> <text:span text:style-name="T162">*</text:span> <text:span text:style-name="T162">(</text:span>-<text:span text:style-name="T97">1</text:span>.<text:span text:style-name="T97">0</text:span><text:span text:style-name="T162">)</text:span> = -<text:span text:style-name="T162">1.</text:span><text:span text:style-name="T163">0</text:span></text:p>
          </table:table-cell>
          <table:table-cell table:style-name="Table6.A2" office:value-type="string">
            <text:p text:style-name="P180">FFFF_0000</text:p>
          </table:table-cell>
          <table:table-cell table:style-name="Table6.E2" office:value-type="string">
            <text:p text:style-name="P178">0</text:p>
          </table:table-cell>
        </table:table-row>
        <table:table-row>
          <table:table-cell table:style-name="Table6.A2" office:value-type="string">
            <text:p text:style-name="P181">7FFF_FFFF</text:p>
          </table:table-cell>
          <table:table-cell table:style-name="Table6.A2" office:value-type="string">
            <text:p text:style-name="P177">000<text:span text:style-name="T164">2</text:span>_000<text:span text:style-name="T164">0</text:span></text:p>
          </table:table-cell>
          <table:table-cell table:style-name="Table6.A2" office:value-type="string">
            <text:p text:style-name="P181">MAX * 2.<text:span text:style-name="T163">0</text:span> = MAX</text:p>
          </table:table-cell>
          <table:table-cell table:style-name="Table6.A2" office:value-type="string">
            <text:p text:style-name="P181">7FFF_FFFF</text:p>
          </table:table-cell>
          <table:table-cell table:style-name="Table6.E2" office:value-type="string">
            <text:p text:style-name="P182">1</text:p>
          </table:table-cell>
        </table:table-row>
        <table:table-row>
          <table:table-cell table:style-name="Table6.A2" office:value-type="string">
            <text:p text:style-name="P183">8000_0000</text:p>
          </table:table-cell>
          <table:table-cell table:style-name="Table6.A2" office:value-type="string">
            <text:p text:style-name="P184">0002_0000</text:p>
          </table:table-cell>
          <table:table-cell table:style-name="Table6.A2" office:value-type="string">
            <text:p text:style-name="P183">MIN * 2.0 <text:span text:style-name="T165">= MIN</text:span></text:p>
          </table:table-cell>
          <table:table-cell table:style-name="Table6.A2" office:value-type="string">
            <text:p text:style-name="P181">8000_0000</text:p>
          </table:table-cell>
          <table:table-cell table:style-name="Table6.E2" office:value-type="string">
            <text:p text:style-name="P179">1</text:p>
          </table:table-cell>
        </table:table-row>
        <table:table-row>
          <table:table-cell table:style-name="Table6.A2" office:value-type="string">
            <text:p text:style-name="P183">0000_8000</text:p>
          </table:table-cell>
          <table:table-cell table:style-name="Table6.A2" office:value-type="string">
            <text:p text:style-name="P183">0000_8000</text:p>
          </table:table-cell>
          <table:table-cell table:style-name="Table6.A2" office:value-type="string">
            <text:p text:style-name="P183">0.5 * 0.5</text:p>
          </table:table-cell>
          <table:table-cell table:style-name="Table6.A2" office:value-type="string">
            <text:p text:style-name="P181">0000_4000</text:p>
          </table:table-cell>
          <table:table-cell table:style-name="Table6.E2" office:value-type="string">
            <text:p text:style-name="P182">0</text:p>
          </table:table-cell>
        </table:table-row>
      </table:table>
      <text:p text:style-name="P185"/>
      <text:p text:style-name="P164"/>
      <text:p text:style-name="P23">1.4. Modul împărțire</text:p>
      <text:p text:style-name="P22"/>
      <text:p text:style-name="P22"/>
      <text:p text:style-name="P22"/>
      <text:p text:style-name="P22"/>
      <text:p text:style-name="P186">1.<text:span text:style-name="T166">5</text:span>. <text:span text:style-name="T166">Limitări</text:span></text:p>
      <text:p text:style-name="P186"/>
      <text:list text:style-name="L7">
        <text:list-item>
          <text:p text:style-name="P187">modul<text:span text:style-name="T167">ele</text:span> operează doar pe format Q16.16</text:p>
        </text:list-item>
        <text:list-item>
          <text:p text:style-name="P187">nu există rotunjire, doar truncare implicită</text:p>
        </text:list-item>
        <text:list-item>
          <text:p text:style-name="P187">operațiile durează 1 ciclu de ceas (mai puțin cea de împărțire)</text:p>
        </text:list-item>
      </text:list>
      <text:p text:style-name="P188"/>
      <text:p text:style-name="P188"/>
      <text:p text:style-name="P21">2. Module <text:span text:style-name="T168">formule</text:span> matemati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T Sans" svg:font-family="'UT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0T17:37:57.033853787</meta:creation-date>
    <dc:date>2026-03-13T16:33:25.907596361</dc:date>
    <meta:editing-duration>PT7H28M22S</meta:editing-duration>
    <meta:editing-cycles>243</meta:editing-cycles>
    <meta:generator>LibreOffice/26.2.1.2$Linux_X86_64 LibreOffice_project/8399f6259d8c87f40e7255cdb3c9b958f5e08948</meta:generator>
    <meta:document-statistic meta:table-count="6" meta:image-count="0" meta:object-count="0" meta:page-count="10" meta:paragraph-count="361" meta:word-count="2118" meta:character-count="12945" meta:non-whitespace-character-count="11133"/>
  </office:meta>
</office:document-meta>
</file>