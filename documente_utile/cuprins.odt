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adornments="Bold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/>
      <style:text-properties style:font-name="Arial" fo:font-size="11pt" officeooo:rsid="000c4245" officeooo:paragraph-rsid="000c4245" style:font-size-asian="11pt" style:font-size-complex="11pt"/>
    </style:style>
    <style:style style:name="P2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0c4245" officeooo:paragraph-rsid="000c4245" style:font-size-asian="11pt" style:font-size-complex="11pt"/>
    </style:style>
    <style:style style:name="P3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89758" officeooo:paragraph-rsid="00189758" style:font-size-asian="11pt" style:font-size-complex="11pt"/>
    </style:style>
    <style:style style:name="P4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0d4668" officeooo:paragraph-rsid="000d4668" style:font-size-asian="11pt" style:font-size-complex="11pt"/>
    </style:style>
    <style:style style:name="P5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6a2e2" officeooo:paragraph-rsid="0016a2e2" style:font-size-asian="11pt" style:font-size-complex="11pt"/>
    </style:style>
    <style:style style:name="P6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0eb34d" officeooo:paragraph-rsid="000eb34d" style:font-size-asian="11pt" style:font-size-complex="11pt"/>
    </style:style>
    <style:style style:name="P7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2141e" officeooo:paragraph-rsid="0012141e" style:font-size-asian="11pt" style:font-size-complex="11pt"/>
    </style:style>
    <style:style style:name="P8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27057e" officeooo:paragraph-rsid="0027057e" style:font-size-asian="11pt" style:font-size-complex="11pt"/>
    </style:style>
    <style:style style:name="P9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27fee3" officeooo:paragraph-rsid="0027fee3" style:font-size-asian="11pt" style:font-size-complex="11pt"/>
    </style:style>
    <style:style style:name="P10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0c3d7" officeooo:paragraph-rsid="0010c3d7" style:font-size-asian="11pt" style:font-size-complex="11pt"/>
    </style:style>
    <style:style style:name="P11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29bb8c" officeooo:paragraph-rsid="0029bb8c" style:font-size-asian="11pt" style:font-size-complex="11pt"/>
    </style:style>
    <style:style style:name="P12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22631" officeooo:paragraph-rsid="00122631" style:font-size-asian="11pt" style:font-size-complex="11pt"/>
    </style:style>
    <style:style style:name="P13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07fe9" officeooo:paragraph-rsid="00107fe9" style:font-size-asian="11pt" style:font-size-complex="11pt"/>
    </style:style>
    <style:style style:name="P14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e395e" officeooo:paragraph-rsid="001e395e" style:font-size-asian="11pt" style:font-size-complex="11pt"/>
    </style:style>
    <style:style style:name="P15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ea0f1" officeooo:paragraph-rsid="001ea0f1" style:font-size-asian="11pt" style:font-size-complex="11pt"/>
    </style:style>
    <style:style style:name="P16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22f249" officeooo:paragraph-rsid="0022f249" style:font-size-asian="11pt" style:font-size-complex="11pt"/>
    </style:style>
    <style:style style:name="P17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24b095" officeooo:paragraph-rsid="0024b095" style:font-size-asian="11pt" style:font-size-complex="11pt"/>
    </style:style>
    <style:style style:name="P18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a8e4f" officeooo:paragraph-rsid="001a8e4f" style:font-size-asian="11pt" style:font-size-complex="11pt"/>
    </style:style>
    <style:style style:name="P19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fdea1" officeooo:paragraph-rsid="001fdea1" style:font-size-asian="11pt" style:font-size-complex="11pt"/>
    </style:style>
    <style:style style:name="P20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305dda" officeooo:paragraph-rsid="00305dda" style:font-size-asian="11pt" style:font-size-complex="11pt"/>
    </style:style>
    <style:style style:name="P21" style:family="paragraph" style:parent-style-name="Standard" style:list-style-name="L1">
      <style:paragraph-properties fo:margin-top="0in" fo:margin-bottom="0in" style:contextual-spacing="false" fo:line-height="115%"/>
      <style:text-properties style:font-name="Arial" fo:font-size="11pt" officeooo:rsid="001599b0" officeooo:paragraph-rsid="001599b0" style:font-size-asian="11pt" style:font-size-complex="11pt"/>
    </style:style>
    <style:style style:name="P22" style:family="paragraph" style:parent-style-name="Standard">
      <style:paragraph-properties fo:margin-top="0in" fo:margin-bottom="0in" style:contextual-spacing="false" fo:line-height="115%"/>
      <style:text-properties style:font-name="Arial" fo:font-size="11pt" officeooo:rsid="000d4668" officeooo:paragraph-rsid="000d4668" style:font-size-asian="11pt" style:font-size-complex="11pt"/>
    </style:style>
    <style:style style:name="T1" style:family="text">
      <style:text-properties officeooo:rsid="00146aaf"/>
    </style:style>
    <style:style style:name="T2" style:family="text">
      <style:text-properties officeooo:rsid="0012ca2e"/>
    </style:style>
    <style:style style:name="T3" style:family="text">
      <style:text-properties officeooo:rsid="0019a2f8"/>
    </style:style>
    <style:style style:name="T4" style:family="text">
      <style:text-properties officeooo:rsid="00191d79"/>
    </style:style>
    <style:style style:name="T5" style:family="text">
      <style:text-properties officeooo:rsid="000d4668"/>
    </style:style>
    <style:style style:name="T6" style:family="text">
      <style:text-properties officeooo:rsid="0029bb8c"/>
    </style:style>
    <style:style style:name="T7" style:family="text">
      <style:text-properties officeooo:rsid="00209983"/>
    </style:style>
    <style:style style:name="T8" style:family="text">
      <style:text-properties officeooo:rsid="00267cd2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<text:span text:style-name="T1">de </text:span>acronime</text:p>
      <text:list text:style-name="L1">
        <text:list-item>
          <text:p text:style-name="P2">Introducere</text:p>
          <text:list>
            <text:list-item>
              <text:p text:style-name="P2">Tema proiectului</text:p>
            </text:list-item>
            <text:list-item>
              <text:p text:style-name="P2">Obiectivele principale</text:p>
              <text:list>
                <text:list-item>
                  <text:p text:style-name="P3">Obiective hardware</text:p>
                </text:list-item>
                <text:list-item>
                  <text:p text:style-name="P3">Obiective documentatie</text:p>
                </text:list-item>
              </text:list>
            </text:list-item>
            <text:list-item>
              <text:p text:style-name="P2">Motiva<text:span text:style-name="T1">ț</text:span>i<text:span text:style-name="T2">e</text:span></text:p>
            </text:list-item>
          </text:list>
        </text:list-item>
        <text:list-item>
          <text:p text:style-name="P2"><text:span text:style-name="T3">Studiu</text:span> asupra <text:span text:style-name="T4">temei</text:span> ales<text:span text:style-name="T4">e</text:span></text:p>
          <text:list>
            <text:list-item>
              <text:p text:style-name="P2">Grafica 3D pe calculator</text:p>
            </text:list-item>
            <text:list-item>
              <text:p text:style-name="P2">Reprezentarea in virgul<text:span text:style-name="T1">ă</text:span> fix<text:span text:style-name="T1">ă</text:span></text:p>
            </text:list-item>
            <text:list-item>
              <text:p text:style-name="P2">Stadiul actual <text:span text:style-name="T1">î</text:span><text:span text:style-name="T5">n domeniul graficii 3D (</text:span><text:span text:style-name="T1">ș</text:span><text:span text:style-name="T5">tiin</text:span><text:span text:style-name="T1">ț</text:span><text:span text:style-name="T5">ific/comercial)</text:span></text:p>
            </text:list-item>
          </text:list>
        </text:list-item>
        <text:list-item>
          <text:p text:style-name="P4">Arhitectura hardware</text:p>
          <text:list>
            <text:list-item>
              <text:p text:style-name="P4">Placa de dezvoltare Zybo Z7</text:p>
              <text:list>
                <text:list-item>
                  <text:p text:style-name="P4">Specifica<text:span text:style-name="T1">ț</text:span>ii</text:p>
                </text:list-item>
                <text:list-item>
                  <text:p text:style-name="P4">Interfa<text:span text:style-name="T1">ț</text:span>a HDMI</text:p>
                </text:list-item>
              </text:list>
            </text:list-item>
          </text:list>
        </text:list-item>
        <text:list-item>
          <text:p text:style-name="P5">Arhitectura Software</text:p>
          <text:list>
            <text:list-item>
              <text:p text:style-name="P5">Programele folosite</text:p>
            </text:list-item>
            <text:list-item>
              <text:p text:style-name="P5">Cod-șablon în C (în Vitis)</text:p>
            </text:list-item>
            <text:list-item>
              <text:p text:style-name="P5">Generarea de valori ai LUT-ului pentru funcțiile sinus/cosinus </text:p>
            </text:list-item>
          </text:list>
        </text:list-item>
        <text:list-item>
          <text:p text:style-name="P6">Implementarea pe FPGA</text:p>
          <text:list>
            <text:list-item>
              <text:p text:style-name="P7">Componentele aritmetice</text:p>
              <text:list>
                <text:list-item>
                  <text:p text:style-name="P8">Divizarea a 2 numere</text:p>
                </text:list-item>
              </text:list>
            </text:list-item>
            <text:list-item>
              <text:p text:style-name="P6">Input Assembler</text:p>
            </text:list-item>
            <text:list-item>
              <text:p text:style-name="P6">Vertex Processing Unit</text:p>
              <text:list>
                <text:list-item>
                  <text:p text:style-name="P9">Arhitectura FSM-ului</text:p>
                </text:list-item>
                <text:list-item>
                  <text:p text:style-name="P10"><text:span text:style-name="T6">Algoritm 1: </text:span>Rota<text:span text:style-name="T1">ț</text:span>ie punct <text:span text:style-name="T1">î</text:span>n 3 dimensiuni</text:p>
                </text:list-item>
                <text:list-item>
                  <text:p text:style-name="P10"><text:span text:style-name="T6">Algoritm 2: </text:span>Proiec<text:span text:style-name="T1">ț</text:span>ia <text:span text:style-name="T1">î</text:span>n perspectiv<text:span text:style-name="T1">ă</text:span></text:p>
                </text:list-item>
                <text:list-item>
                  <text:p text:style-name="P10"><text:span text:style-name="T6">Algoritm 3: </text:span>Maparea pe ecran </text:p>
                </text:list-item>
                <text:list-item>
                  <text:p text:style-name="P11">Gestionare overflow</text:p>
                </text:list-item>
              </text:list>
            </text:list-item>
            <text:list-item>
              <text:p text:style-name="P12">Output assembler</text:p>
              <text:list>
                <text:list-item>
                  <text:p text:style-name="P12">Algoritmul Bresenham <text:span text:style-name="T2">de desenare a unei linii</text:span></text:p>
                </text:list-item>
              </text:list>
            </text:list-item>
            <text:list-item>
              <text:p text:style-name="P6">Framebuffer</text:p>
            </text:list-item>
            <text:list-item>
              <text:p text:style-name="P13">Controller HDMI</text:p>
            </text:list-item>
          </text:list>
        </text:list-item>
        <text:list-item>
          <text:p text:style-name="P14">Simularea preciziei calculelor efectuate</text:p>
          <text:list>
            <text:list-item>
              <text:p text:style-name="P15">Pierderea de precizie în reprezentarea virgulă fixă</text:p>
            </text:list-item>
            <text:list-item>
              <text:p text:style-name="P15">Scopul simulării</text:p>
            </text:list-item>
            <text:list-item>
              <text:p text:style-name="P16">Componente simulare</text:p>
              <text:list>
                <text:list-item>
                  <text:p text:style-name="P16">Arhitectură testbench</text:p>
                </text:list-item>
                <text:list-item>
                  <text:p text:style-name="P16">Configurare și parametri</text:p>
                </text:list-item>
                <text:list-item>
                  <text:p text:style-name="P16">Task-urile aferente</text:p>
                </text:list-item>
                <text:list-item>
                  <text:p text:style-name="P17">Raportarea rezultatelor</text:p>
                </text:list-item>
              </text:list>
            </text:list-item>
          </text:list>
        </text:list-item>
        <text:list-item>
          <text:p text:style-name="P18">Concluzii</text:p>
          <text:list>
            <text:list-item>
              <text:p text:style-name="P19">Rezultate experimentale</text:p>
            </text:list-item>
            <text:list-item>
              <text:p text:style-name="P20">Posibile îmbunătățiri</text:p>
            </text:list-item>
            <text:list-item>
              <text:p text:style-name="P19"><text:span text:style-name="T7">Direcții</text:span> viitoare <text:span text:style-name="T7">de cercetare</text:span></text:p>
            </text:list-item>
          </text:list>
        </text:list-item>
        <text:list-item>
          <text:p text:style-name="P21">Codul surs<text:span text:style-name="T8">ă</text:span> al proiectului</text:p>
        </text:list-item>
        <text:list-item>
          <text:p text:style-name="P14">Bibliografie</text:p>
        </text:list-item>
      </text:list>
      <text:p text:style-name="P22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adornments="Bold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3:00:16.382704635</meta:creation-date>
    <dc:date>2026-04-24T22:23:36.847082955</dc:date>
    <meta:editing-duration>PT39M27S</meta:editing-duration>
    <meta:editing-cycles>33</meta:editing-cycles>
    <meta:generator>LibreOffice/26.2.2.2$Linux_X86_64 LibreOffice_project/1f77d10d6938fd34972958f64b2bcfa54f8b1ba5</meta:generator>
    <meta:print-date>2026-04-24T13:37:03.924898684</meta:print-date>
    <meta:printed-by>PDF files</meta:printed-by>
    <meta:document-statistic meta:table-count="0" meta:image-count="0" meta:object-count="0" meta:page-count="1" meta:paragraph-count="48" meta:word-count="190" meta:character-count="1273" meta:non-whitespace-character-count="1173"/>
  </office:meta>
</office:document-meta>
</file>